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, Consolas"/>
    <style:font-face style:name="Arial1" svg:font-family="Arial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svg:stroke-width="0.081cm" svg:stroke-color="#00ffff" draw:marker-start-width="0.321cm" draw:marker-end-width="0.321cm" draw:fill="solid" draw:fill-color="#000000" draw:textarea-horizontal-align="justify" draw:textarea-vertical-align="top" draw:auto-grow-height="false" fo:min-height="32.69cm" fo:min-width="54.816cm" fo:padding-top="0.165cm" fo:padding-bottom="0.165cm" fo:padding-left="0.29cm" fo:padding-right="0.29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draw:fill="none" fo:min-height="0.674cm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draw:fill="none" fo:min-height="0.674cm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draw:fill="none" fo:min-height="3.867cm" loext:decorative="false"/>
      <style:paragraph-properties style:writing-mode="lr-tb"/>
    </style:style>
    <style:style style:name="gr5" style:family="graphic" style:parent-style-name="standard">
      <style:graphic-properties svg:stroke-width="0.081cm" svg:stroke-color="#00ffff" draw:marker-start-width="0.321cm" draw:marker-end-width="0.321cm" draw:fill="solid" draw:fill-color="#000000" draw:textarea-horizontal-align="justify" draw:textarea-vertical-align="top" draw:auto-grow-height="false" fo:min-height="27.467cm" fo:min-width="10.1cm" fo:padding-top="0.165cm" fo:padding-bottom="0.165cm" fo:padding-left="0.29cm" fo:padding-right="0.29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0.389cm" fo:min-width="9.478cm" fo:padding-top="0.165cm" fo:padding-bottom="0.165cm" fo:padding-left="0.29cm" fo:padding-right="0.29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81cm" svg:stroke-color="#ffff00" draw:marker-start-width="0.321cm" draw:marker-end-width="0.321cm" draw:fill="solid" draw:fill-color="#000000" draw:textarea-horizontal-align="justify" draw:textarea-vertical-align="middle" draw:auto-grow-height="false" fo:min-height="0.496cm" fo:min-width="9.478cm" fo:padding-top="0.165cm" fo:padding-bottom="0.165cm" fo:padding-left="0.29cm" fo:padding-right="0.29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81cm" svg:stroke-color="#00ffff" draw:marker-start-width="0.321cm" draw:marker-end-width="0.321cm" draw:fill="solid" draw:fill-color="#000000" draw:textarea-horizontal-align="justify" draw:textarea-vertical-align="top" draw:auto-grow-height="false" fo:min-height="5.504cm" fo:min-width="9.225cm" fo:padding-top="0.165cm" fo:padding-bottom="0.165cm" fo:padding-left="0.29cm" fo:padding-right="0.29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0.364cm" fo:min-width="8.883cm" fo:padding-top="0.165cm" fo:padding-bottom="0.165cm" fo:padding-left="0.29cm" fo:padding-right="0.29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081cm" svg:stroke-color="#00ffff" draw:marker-start-width="0.321cm" draw:marker-end-width="0.321cm" draw:fill="solid" draw:fill-color="#000000" draw:textarea-horizontal-align="justify" draw:textarea-vertical-align="top" draw:auto-grow-height="false" fo:min-height="5.883cm" fo:min-width="10.632cm" fo:padding-top="0.165cm" fo:padding-bottom="0.165cm" fo:padding-left="0.29cm" fo:padding-right="0.29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081cm" svg:stroke-color="#00ffff" draw:marker-start-width="0.321cm" draw:marker-end-width="0.321cm" draw:fill="solid" draw:fill-color="#000000" draw:textarea-horizontal-align="justify" draw:textarea-vertical-align="top" draw:auto-grow-height="false" fo:min-height="4.21cm" fo:min-width="9.318cm" fo:padding-top="0.165cm" fo:padding-bottom="0.165cm" fo:padding-left="0.29cm" fo:padding-right="0.29cm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0.336cm" fo:min-width="8.899cm" fo:padding-top="0.165cm" fo:padding-bottom="0.165cm" fo:padding-left="0.29cm" fo:padding-right="0.29cm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.081cm" svg:stroke-color="#ffff00" draw:marker-start-width="0.321cm" draw:marker-end-width="0.321cm" draw:fill="solid" draw:fill-color="#000000" draw:textarea-horizontal-align="justify" draw:textarea-vertical-align="middle" draw:auto-grow-height="false" fo:min-height="0.532cm" fo:min-width="8.899cm" fo:padding-top="0.165cm" fo:padding-bottom="0.165cm" fo:padding-left="0.29cm" fo:padding-right="0.29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1.679cm" fo:min-width="9.478cm" fo:padding-top="0.165cm" fo:padding-bottom="0.165cm" fo:padding-left="0.29cm" fo:padding-right="0.29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0.646cm" fo:min-width="9.478cm" fo:padding-top="0.165cm" fo:padding-bottom="0.165cm" fo:padding-left="0.29cm" fo:padding-right="0.29cm" style:writing-mode="lr-tb" loext:decorative="false"/>
      <style:paragraph-properties style:writing-mode="lr-tb"/>
    </style:style>
    <style:style style:name="gr16" style:family="graphic" style:parent-style-name="standard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0.35cm" fo:min-width="10.303cm" fo:padding-top="0.165cm" fo:padding-bottom="0.165cm" fo:padding-left="0.29cm" fo:padding-right="0.29cm" style:writing-mode="lr-tb" loext:decorative="false"/>
      <style:paragraph-properties style:writing-mode="lr-tb"/>
    </style:style>
    <style:style style:name="gr17" style:family="graphic" style:parent-style-name="standard">
      <style:graphic-properties svg:stroke-width="0.081cm" svg:stroke-color="#ffff00" draw:marker-start-width="0.321cm" draw:marker-end-width="0.321cm" draw:fill="solid" draw:fill-color="#000000" draw:textarea-horizontal-align="justify" draw:textarea-vertical-align="middle" draw:auto-grow-height="false" fo:min-height="0.523cm" fo:min-width="10.303cm" fo:padding-top="0.165cm" fo:padding-bottom="0.165cm" fo:padding-left="0.29cm" fo:padding-right="0.29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0.302cm" fo:min-width="10.303cm" fo:padding-top="0.165cm" fo:padding-bottom="0.165cm" fo:padding-left="0.29cm" fo:padding-right="0.29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0.372cm" fo:min-width="10.303cm" fo:padding-top="0.165cm" fo:padding-bottom="0.165cm" fo:padding-left="0.29cm" fo:padding-right="0.29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1.642cm" fo:min-width="9.478cm" fo:padding-top="0.165cm" fo:padding-bottom="0.165cm" fo:padding-left="0.29cm" fo:padding-right="0.29cm" style:writing-mode="lr-tb" loext:decorative="false"/>
      <style:paragraph-properties style:writing-mode="lr-tb"/>
    </style:style>
    <style:style style:name="gr21" style:family="graphic" style:parent-style-name="standard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0.364cm" fo:min-width="8.896cm" fo:padding-top="0.165cm" fo:padding-bottom="0.165cm" fo:padding-left="0.29cm" fo:padding-right="0.29cm" style:writing-mode="lr-tb" loext:decorative="false"/>
      <style:paragraph-properties style:writing-mode="lr-tb"/>
    </style:style>
    <style:style style:name="gr22" style:family="graphic" style:parent-style-name="standard">
      <style:graphic-properties svg:stroke-width="0.081cm" svg:stroke-color="#ffff00" draw:marker-start-width="0.321cm" draw:marker-end-width="0.321cm" draw:fill="solid" draw:fill-color="#000000" draw:textarea-horizontal-align="justify" draw:textarea-vertical-align="middle" draw:auto-grow-height="false" fo:min-height="0.349cm" fo:min-width="8.899cm" fo:padding-top="0.165cm" fo:padding-bottom="0.165cm" fo:padding-left="0.29cm" fo:padding-right="0.29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draw:fill="none" fo:min-height="0.674cm" loext:decorative="false"/>
      <style:paragraph-properties style:writing-mode="lr-tb"/>
    </style:style>
    <style:style style:name="gr24" style:family="graphic" style:parent-style-name="standard">
      <style:graphic-properties svg:stroke-width="0.081cm" svg:stroke-color="#00ffff" draw:marker-start-width="0.321cm" draw:marker-end-width="0.321cm" draw:fill="solid" draw:fill-color="#000000" draw:textarea-horizontal-align="justify" draw:textarea-vertical-align="top" draw:auto-grow-height="false" fo:min-height="8.158cm" fo:min-width="9.225cm" fo:padding-top="0.165cm" fo:padding-bottom="0.165cm" fo:padding-left="0.29cm" fo:padding-right="0.29cm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1.79cm" fo:min-width="9.478cm" fo:padding-top="0.165cm" fo:padding-bottom="0.165cm" fo:padding-left="0.29cm" fo:padding-right="0.29cm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0.415cm" fo:min-width="9.478cm" fo:padding-top="0.165cm" fo:padding-bottom="0.165cm" fo:padding-left="0.29cm" fo:padding-right="0.29cm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0.415cm" fo:min-width="9.478cm" fo:padding-top="0.165cm" fo:padding-bottom="0.165cm" fo:padding-left="0.29cm" fo:padding-right="0.29cm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0.415cm" fo:min-width="9.478cm" fo:padding-top="0.165cm" fo:padding-bottom="0.165cm" fo:padding-left="0.29cm" fo:padding-right="0.29cm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0.415cm" fo:min-width="9.478cm" fo:padding-top="0.165cm" fo:padding-bottom="0.165cm" fo:padding-left="0.29cm" fo:padding-right="0.29cm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0.415cm" fo:min-width="9.478cm" fo:padding-top="0.165cm" fo:padding-bottom="0.165cm" fo:padding-left="0.29cm" fo:padding-right="0.29cm" style:writing-mode="lr-tb" loext:decorative="false"/>
      <style:paragraph-properties style:writing-mode="lr-tb"/>
    </style:style>
    <style:style style:name="P1" style:family="paragraph">
      <loext:graphic-properties draw:fill="solid" draw:fill-color="#000000"/>
      <style:paragraph-properties fo:text-align="center" style:writing-mode="lr-tb"/>
      <style:text-properties fo:color="#00ffff" loext:opacity="100%" fo:font-size="17pt" fo:text-shadow="1pt 1pt" fo:font-weight="bold" style:font-size-asian="17pt" style:font-weight-asian="bold" style:font-size-complex="17pt" style:font-weight-complex="bold"/>
    </style:style>
    <style:style style:name="P2" style:family="paragraph">
      <loext:graphic-properties draw:fill="none"/>
      <style:text-properties fo:color="#a9a9a9" loext:opacity="100%" fo:font-size="17pt" fo:font-weight="bold" style:font-size-asian="17pt" style:font-size-complex="17pt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indent="0cm"/>
      <style:text-properties fo:color="#a9a9a9" loext:opacity="100%" fo:font-size="17pt" fo:font-weight="bold" style:font-size-asian="17pt" style:font-size-complex="17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indent="0cm"/>
      <style:text-properties fo:color="#00ffff" loext:opacity="100%" fo:font-size="16pt" fo:font-weight="bold" style:font-size-asian="16pt" style:font-size-complex="16pt"/>
    </style:style>
    <style:style style:name="P6" style:family="paragraph">
      <style:paragraph-properties fo:text-align="center"/>
      <style:text-properties fo:color="#00ffff" loext:opacity="100%" fo:font-size="17pt" fo:text-shadow="1pt 1pt" fo:font-weight="bold" style:font-size-asian="17pt" style:font-weight-asian="bold" style:font-size-complex="17pt" style:font-weight-complex="bold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color="#00ffff" loext:opacity="100%" fo:font-size="17pt" fo:text-shadow="1pt 1pt" fo:font-weight="bold" style:font-size-asian="17pt" style:font-weight-asian="bold" style:font-size-complex="17pt" style:font-weight-complex="bold"/>
    </style:style>
    <style:style style:name="P8" style:family="paragraph">
      <style:paragraph-properties fo:text-align="start"/>
      <style:text-properties fo:color="#ffffff" loext:opacity="100%" fo:font-size="15pt" fo:font-weight="bold" style:font-size-asian="15pt" style:font-size-complex="15pt"/>
    </style:style>
    <style:style style:name="P9" style:family="paragraph">
      <loext:graphic-properties draw:fill="solid" draw:fill-color="#000000"/>
      <style:paragraph-properties fo:text-align="start" style:writing-mode="lr-tb"/>
      <style:text-properties fo:color="#ffffff" loext:opacity="100%" fo:font-size="15pt" fo:font-weight="bold" style:font-size-asian="15pt" style:font-size-complex="15pt"/>
    </style:style>
    <style:style style:name="P10" style:family="paragraph">
      <style:paragraph-properties fo:text-align="start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1" style:family="paragraph">
      <loext:graphic-properties draw:fill="solid" draw:fill-color="#000000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2" style:family="paragraph">
      <style:paragraph-properties fo:text-align="start"/>
      <style:text-properties fo:font-size="15pt" fo:font-weight="bold" style:font-size-asian="15pt" style:font-weight-asian="bold" style:font-size-complex="15pt" style:font-weight-complex="bold"/>
    </style:style>
    <style:style style:name="P13" style:family="paragraph">
      <loext:graphic-properties draw:fill="solid" draw:fill-color="#000000"/>
      <style:paragraph-properties fo:text-align="start" style:writing-mode="lr-tb"/>
      <style:text-properties fo:font-size="15pt" fo:font-weight="bold" style:font-size-asian="15pt" style:font-weight-asian="bold" style:font-size-complex="15pt" style:font-weight-complex="bold"/>
    </style:style>
    <style:style style:name="P14" style:family="paragraph">
      <style:paragraph-properties fo:margin-left="0cm" fo:margin-right="0cm" fo:margin-top="0cm" fo:margin-bottom="0cm" fo:line-height="100%" fo:text-align="start" fo:text-indent="0cm"/>
      <style:text-properties fo:color="#ffffff" loext:opacity="100%" fo:font-size="15pt" fo:font-weight="bold" style:font-size-asian="15pt" style:font-size-complex="15pt"/>
    </style:style>
    <style:style style:name="P15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 fo:font-size="15pt" fo:font-weight="bold" style:font-size-asian="15pt" style:font-size-complex="15pt"/>
    </style:style>
    <style:style style:name="P16" style:family="paragraph">
      <style:paragraph-properties fo:margin-left="0cm" fo:margin-right="0cm" fo:margin-top="0cm" fo:margin-bottom="0cm" fo:line-height="100%" fo:text-align="start" fo:text-indent="0cm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7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1" style:family="text">
      <style:text-properties fo:font-variant="normal" fo:text-transform="none" fo:color="#a9a9a9" loext:opacity="100%" style:text-outline="false" style:text-line-through-style="none" style:text-line-through-type="none" style:font-name="Arial" fo:font-size="17pt" fo:font-style="normal" fo:text-shadow="none" style:text-underline-style="none" fo:font-weight="bold" style:letter-kerning="true" style:font-name-asian="Microsoft YaHei" style:font-size-asian="17pt" style:font-style-asian="normal" style:font-weight-asian="normal" style:font-name-complex="Arial" style:font-size-complex="17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ffff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ffff" loext:opacity="100%" fo:font-size="17pt" fo:text-shadow="1pt 1pt" fo:font-weight="bold" style:font-size-asian="17pt" style:font-weight-asian="bold" style:font-size-complex="17pt" style:font-weight-complex="bold"/>
    </style:style>
    <style:style style:name="T4" style:family="text">
      <style:text-properties fo:font-variant="normal" fo:text-transform="none" fo:color="#ffc0cb" loext:opacity="100%" style:text-outline="false" style:text-line-through-style="none" style:text-line-through-type="none" style:font-name="Liberation Sans" fo:font-size="17pt" fo:font-style="normal" fo:text-shadow="1pt 1pt" style:text-underline-style="none" fo:font-weight="bold" style:letter-kerning="true" style:font-name-asian="Microsoft YaHei" style:font-size-asian="17pt" style:font-style-asian="normal" style:font-weight-asian="bold" style:font-name-complex="Arial2" style:font-size-complex="17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ffc0cb" loext:opacity="100%" fo:font-size="17pt" fo:text-shadow="1pt 1pt" fo:font-weight="bold" style:font-size-asian="17pt" style:font-weight-asian="bold" style:font-size-complex="17pt" style:font-weight-complex="bold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Microsoft YaHei" style:font-size-asian="15pt" style:font-style-asian="normal" style:font-weight-asian="normal" style:font-name-complex="Arial2" style:font-size-complex="1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bcb4ff" loext:opacity="100%" style:font-name="Arial" fo:font-size="15pt" fo:font-weight="bold" style:font-size-asian="15pt" style:font-name-complex="Arial" style:font-size-complex="15pt"/>
    </style:style>
    <style:style style:name="T8" style:family="text">
      <style:text-properties fo:color="#ffffff" loext:opacity="100%" fo:font-size="15pt" fo:font-weight="bold" style:font-size-asian="15pt" style:font-size-complex="15pt"/>
    </style:style>
    <style:style style:name="T9" style:family="text">
      <style:text-properties fo:color="#ffff00" loext:opacity="100%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Microsoft YaHei" style:font-size-asian="15pt" style:font-style-asian="normal" style:font-weight-asian="bold" style:font-name-complex="Arial2" style:font-size-complex="15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bcb4ff" loext:opacity="100%" style:font-name="Arial" fo:font-size="15pt" fo:font-weight="bold" style:font-size-asian="15pt" style:font-weight-asian="bold" style:font-name-complex="Arial" style:font-size-complex="15pt" style:font-weight-complex="bold"/>
    </style:style>
    <style:style style:name="T13" style:family="text">
      <style:text-properties fo:font-variant="normal" fo:text-transform="none" fo:color="#ffff00" loext:opacity="10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Microsoft YaHei" style:font-size-asian="15pt" style:font-style-asian="normal" style:font-weight-asian="bold" style:font-name-complex="Arial2" style:font-size-complex="15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00ffff" loext:opacity="100%" fo:font-size="15pt" fo:font-weight="bold" style:font-size-asian="15pt" style:font-size-complex="15pt"/>
    </style:style>
    <style:style style:name="T15" style:family="text">
      <style:text-properties fo:color="#ffc0cb" loext:opacity="100%" fo:font-size="15pt" fo:font-weight="bold" style:font-size-asian="15pt" style:font-size-complex="15pt"/>
    </style:style>
    <style:style style:name="T16" style:family="text">
      <style:text-properties fo:font-variant="normal" fo:text-transform="none" fo:color="#bcb4ff" loext:opacity="100%" style:text-outline="false" style:text-line-through-style="none" style:text-line-through-type="none" style:font-name="Arial" fo:font-size="15pt" fo:font-style="normal" fo:text-shadow="none" style:text-underline-style="none" fo:font-weight="bold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bcb4ff" loext:opacity="100%" style:text-outline="false" style:text-line-through-style="none" style:text-line-through-type="none" style:font-name="Arial" fo:font-size="15pt" fo:font-style="normal" fo:text-shadow="none" style:text-underline-style="none" fo:font-weight="bold" style:letter-kerning="true" style:font-name-asian="Microsoft YaHei" style:font-size-asian="15pt" style:font-style-asian="normal" style:font-weight-asian="bold" style:font-name-complex="Arial" style:font-size-complex="15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ffff00" loext:opacity="100%" fo:font-size="15pt" fo:font-weight="bold" style:font-size-asian="15pt" style:font-size-complex="15pt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Arial" fo:font-size="15pt" fo:font-style="normal" fo:text-shadow="none" style:text-underline-style="none" fo:font-weight="bold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00" loext:opacity="10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Microsoft YaHei" style:font-size-asian="15pt" style:font-style-asian="normal" style:font-weight-asian="normal" style:font-name-complex="Arial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bcb4ff" loext:opacity="10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Microsoft YaHei" style:font-size-asian="15pt" style:font-style-asian="normal" style:font-weight-asian="normal" style:font-name-complex="Arial2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5.396cm" svg:height="33.02cm" svg:x="-0.151cm" svg:y="0cm">
          <draw:glue-point draw:id="4" svg:x="2.533cm" svg:y="5.051cm"/>
          <draw:glue-point draw:id="5" svg:x="-2.027cm" svg:y="5.051cm"/>
          <draw:glue-point draw:id="6" svg:x="0.089cm" svg:y="5.001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8.883cm" svg:height="0.924cm" svg:x="7.329cm" svg:y="0.307cm">
          <draw:text-box>
            <text:p><text:span text:style-name="T1">Christopher Andrew Topalian</text:span></text:p>
          </draw:text-box>
        </draw:frame>
        <draw:frame draw:style-name="gr3" draw:text-style-name="P4" draw:layer="layout" svg:width="14.445cm" svg:height="0.924cm" svg:x="7.362cm" svg:y="1.21cm">
          <draw:text-box>
            <text:p text:style-name="P3"><text:span text:style-name="T1">https://github.com/ChristopherAndrewTopalian</text:span></text:p>
          </draw:text-box>
        </draw:frame>
        <draw:frame draw:style-name="gr4" draw:text-style-name="P5" draw:layer="layout" svg:width="7.271cm" svg:height="4.117cm" svg:x="0.388cm" svg:y="0.117cm">
          <draw:text-box>
            <text:p text:style-name="P3"><text:span text:style-name="T2">Component</text:span></text:p>
            <text:p text:style-name="P3"><text:span text:style-name="T2">Based</text:span></text:p>
            <text:p text:style-name="P3"><text:span text:style-name="T2">Architecture</text:span></text:p>
          </draw:text-box>
        </draw:frame>
        <draw:custom-shape draw:style-name="gr5" draw:text-style-name="P1" draw:layer="layout" svg:width="10.68cm" svg:height="27.797cm" svg:x="0.75cm" svg:y="4.27cm">
          <draw:glue-point draw:id="4" svg:x="2.533cm" svg:y="5.051cm"/>
          <draw:glue-point draw:id="5" svg:x="-2.027cm" svg:y="5.051cm"/>
          <draw:glue-point draw:id="6" svg:x="0.089cm" svg:y="5.001cm"/>
          <text:p text:style-name="P6"><text:span text:style-name="T3">Drone</text:span></text:p>
          <text:p text:style-name="P7"><text:span text:style-name="T4">constructor(</text:span><text:span text:style-name="T5">id, startX, startY, speed = 2, maxDistance = 20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0.058cm" svg:height="0.719cm" svg:x="1.054cm" svg:y="6.651cm">
          <text:p text:style-name="P8"><text:span text:style-name="T6">- </text:span><text:span text:style-name="T7">id</text:span><text:span text:style-name="T8">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0.058cm" svg:height="0.826cm" svg:x="1.054cm" svg:y="20.69cm">
          <draw:glue-point draw:id="4" svg:x="2.582cm" svg:y="4.488cm"/>
          <draw:glue-point draw:id="5" svg:x="-2.215cm" svg:y="4.711cm"/>
          <draw:glue-point draw:id="6" svg:x="-0.201cm" svg:y="5.036cm"/>
          <text:p text:style-name="P8"><text:span text:style-name="T8">+ </text:span><text:span text:style-name="T9">flyRight</text:span><text:span text:style-name="T10">()</text:span><text:span text:style-name="T8">: vo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0.058cm" svg:height="0.826cm" svg:x="1.054cm" svg:y="19.736cm">
          <draw:glue-point draw:id="4" svg:x="2.582cm" svg:y="4.488cm"/>
          <draw:glue-point draw:id="5" svg:x="-2.215cm" svg:y="4.711cm"/>
          <draw:glue-point draw:id="6" svg:x="-0.201cm" svg:y="5.036cm"/>
          <text:p text:style-name="P8"><text:span text:style-name="T8">+ </text:span><text:span text:style-name="T9">flyLeft</text:span><text:span text:style-name="T10">()</text:span><text:span text:style-name="T8">: vo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9.805cm" svg:height="5.834cm" svg:x="34.221cm" svg:y="4.273cm">
          <text:p text:style-name="P6"><text:span text:style-name="T3">DistanceComponent</text:span></text:p>
          <text:p text:style-name="P6"><text:span text:style-name="T5">constructor(elementId, originX = 0, originY = 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9.463cm" svg:height="0.694cm" svg:x="34.374cm" svg:y="6.671cm">
          <text:p text:style-name="P10"><text:span text:style-name="T11">- </text:span><text:span text:style-name="T12">elementId</text:span><text:span text:style-name="T10">: HTMLElement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1.212cm" svg:height="6.213cm" svg:x="11.971cm" svg:y="4.26cm">
          <text:p text:style-name="P6"><text:span text:style-name="T3">LocationComponent</text:span></text:p>
          <text:p text:style-name="P6"><text:span text:style-name="T5">constructor(elementId, startX, start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9.898cm" svg:height="4.54cm" svg:x="23.715cm" svg:y="4.262cm">
          <text:p text:style-name="P6"><text:span text:style-name="T3">LEDComponent</text:span></text:p>
          <text:p text:style-name="P6"><text:span text:style-name="T5">constructor(elementId)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9.479cm" svg:height="0.666cm" svg:x="23.929cm" svg:y="5.886cm">
          <text:p text:style-name="P12"><text:span text:style-name="T11">- </text:span><text:span text:style-name="T12">element</text:span><text:span text:style-name="T10">: HTMLElement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9.479cm" svg:height="0.862cm" svg:x="23.929cm" svg:y="6.713cm">
          <text:p text:style-name="P10"><text:span text:style-name="T11">+ </text:span><text:span text:style-name="T13">setColor</text:span><text:span text:style-name="T11">(</text:span><text:span text:style-name="T12">newColor</text:span><text:span text:style-name="T10">: String): void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10.058cm" svg:height="2.009cm" svg:x="1.054cm" svg:y="11.996cm">
          <text:p text:style-name="P14"><text:span text:style-name="T6">- </text:span><text:span text:style-name="T7">location</text:span><text:span text:style-name="T8">: new </text:span><text:span text:style-name="T14">LocationComponent</text:span><text:span text:style-name="T15">(id, startX, start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10.058cm" svg:height="0.976cm" svg:x="1.054cm" svg:y="14.173cm">
          <text:p text:style-name="P14"><text:span text:style-name="T6">- </text:span><text:span text:style-name="T7">led</text:span><text:span text:style-name="T8">: new </text:span><text:span text:style-name="T14">LEDComponent</text:span><text:span text:style-name="T15">(id) = 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10.883cm" svg:height="0.68cm" svg:x="12.148cm" svg:y="5.898cm">
          <text:p text:style-name="P10"><text:span text:style-name="T11">- </text:span><text:span text:style-name="T12">element</text:span><text:span text:style-name="T10">: HTMLElement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0.883cm" svg:height="0.853cm" svg:x="12.148cm" svg:y="9.387cm">
          <text:p text:style-name="P8"><text:span text:style-name="T8">+ </text:span><text:span text:style-name="T9">moveRight</text:span><text:span text:style-name="T10">()</text:span><text:span text:style-name="T8">: void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0.883cm" svg:height="0.853cm" svg:x="12.148cm" svg:y="8.373cm">
          <text:p text:style-name="P8"><text:span text:style-name="T8">+ </text:span><text:span text:style-name="T9">moveLeft</text:span><text:span text:style-name="T10">()</text:span><text:span text:style-name="T8">: void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10.883cm" svg:height="0.632cm" svg:x="12.148cm" svg:y="6.698cm">
          <text:p text:style-name="P16"><text:span text:style-name="T11">- </text:span><text:span text:style-name="T12">x</text:span><text:span text:style-name="T10">: Numb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10.883cm" svg:height="0.702cm" svg:x="12.148cm" svg:y="7.498cm">
          <text:p text:style-name="P16"><text:span text:style-name="T11">- </text:span><text:span text:style-name="T12">y</text:span><text:span text:style-name="T10">: Number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10.058cm" svg:height="1.972cm" svg:x="1.054cm" svg:y="15.323cm">
          <text:p text:style-name="P14"><text:span text:style-name="T6">- </text:span><text:span text:style-name="T16">distanceTracker</text:span><text:span text:style-name="T8">: new </text:span><text:span text:style-name="T14">DistanceComponent</text:span><text:span text:style-name="T15">(id, startX, startY) = 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9.476cm" svg:height="0.694cm" svg:x="34.374cm" svg:y="7.516cm">
          <text:p text:style-name="P10"><text:span text:style-name="T11">- </text:span><text:span text:style-name="T17">originX</text:span><text:span text:style-name="T10">: Numb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9.476cm" svg:height="0.694cm" svg:x="34.374cm" svg:y="8.362cm">
          <text:p text:style-name="P10"><text:span text:style-name="T11">- </text:span><text:span text:style-name="T17">originY</text:span><text:span text:style-name="T10">: Numb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9.479cm" svg:height="0.679cm" svg:x="34.374cm" svg:y="9.198cm">
          <text:p text:style-name="P10"><text:span text:style-name="T11">+ </text:span><text:span text:style-name="T13">getDistanceFromOrigin</text:span><text:span text:style-name="T11">(</text:span><text:span text:style-name="T10">): Object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83cm" svg:height="0.924cm" svg:x="40.925cm" svg:y="30.934cm">
          <draw:text-box>
            <text:p><text:span text:style-name="T1">Christopher Andrew Topalian</text:span></text:p>
          </draw:text-box>
        </draw:frame>
        <draw:frame draw:style-name="gr23" draw:text-style-name="P4" draw:layer="layout" svg:width="14.094cm" svg:height="0.924cm" svg:x="40.958cm" svg:y="31.837cm">
          <draw:text-box>
            <text:p text:style-name="P3"><text:span text:style-name="T1">https://github.com/ChristopherAndrewTopalian</text:span></text:p>
          </draw:text-box>
        </draw:frame>
        <draw:custom-shape draw:style-name="gr24" draw:text-style-name="P1" draw:layer="layout" svg:width="9.805cm" svg:height="8.488cm" svg:x="44.637cm" svg:y="4.273cm">
          <text:p text:style-name="P6"><text:span text:style-name="T3">EvasionComponent</text:span></text:p>
          <text:p text:style-name="P6"><text:span text:style-name="T5">constructor(targetId, speed, maxDistan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9.463cm" svg:height="0.694cm" svg:x="44.79cm" svg:y="6.671cm">
          <text:p text:style-name="P10"><text:span text:style-name="T11">- </text:span><text:span text:style-name="T17">targetId</text:span><text:span text:style-name="T10">: HTMLElement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9.476cm" svg:height="0.694cm" svg:x="44.79cm" svg:y="7.516cm">
          <text:p text:style-name="P10"><text:span text:style-name="T11">- </text:span><text:span text:style-name="T17">speed</text:span><text:span text:style-name="T10">: Numb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9.476cm" svg:height="0.694cm" svg:x="44.79cm" svg:y="8.362cm">
          <text:p text:style-name="P10"><text:span text:style-name="T11">- </text:span><text:span text:style-name="T17">maxDistance</text:span><text:span text:style-name="T10">: Numb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9.479cm" svg:height="0.679cm" svg:x="44.79cm" svg:y="11.798cm">
          <text:p text:style-name="P10"><text:span text:style-name="T11">+ </text:span><text:span text:style-name="T13">update</text:span><text:span text:style-name="T11">(</text:span><text:span text:style-name="T10">): void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9.476cm" svg:height="0.694cm" svg:x="44.79cm" svg:y="9.262cm">
          <text:p text:style-name="P10"><text:span text:style-name="T11">- </text:span><text:span text:style-name="T17">direction</text:span><text:span text:style-name="T10">: Numb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9.476cm" svg:height="0.694cm" svg:x="44.79cm" svg:y="10.124cm">
          <text:p text:style-name="P10"><text:span text:style-name="T11">- </text:span><text:span text:style-name="T17">startX</text:span><text:span text:style-name="T10">: Numb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9.476cm" svg:height="0.694cm" svg:x="44.79cm" svg:y="10.962cm">
          <text:p text:style-name="P10"><text:span text:style-name="T11">- </text:span><text:span text:style-name="T17">isInitialized</text:span><text:span text:style-name="T10">: Boolean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10.058cm" svg:height="2.12cm" svg:x="1.054cm" svg:y="17.427cm">
          <text:p text:style-name="P14"><text:span text:style-name="T6">- </text:span><text:span text:style-name="T16">evasion</text:span><text:span text:style-name="T8">: new </text:span><text:span text:style-name="T14">EvasionComponent</text:span><text:span text:style-name="T15">(id, speed, maxDistance) = 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7" draw:layer="layout" svg:width="9.479cm" svg:height="0.862cm" svg:x="23.929cm" svg:y="7.732cm">
          <text:p text:style-name="P16"><text:span text:style-name="T10">+ </text:span><text:span text:style-name="T9">randomColor</text:span><text:span text:style-name="T10">(): void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0.058cm" svg:height="0.826cm" svg:x="1.054cm" svg:y="21.652cm">
          <draw:glue-point draw:id="4" svg:x="2.582cm" svg:y="4.488cm"/>
          <draw:glue-point draw:id="5" svg:x="-2.215cm" svg:y="4.711cm"/>
          <draw:glue-point draw:id="6" svg:x="-0.201cm" svg:y="5.036cm"/>
          <text:p text:style-name="P8"><text:span text:style-name="T8">+ </text:span><text:span text:style-name="T18">startEvasion</text:span><text:span text:style-name="T10">()</text:span><text:span text:style-name="T8">: vo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0.058cm" svg:height="0.826cm" svg:x="1.054cm" svg:y="22.598cm">
          <draw:glue-point draw:id="4" svg:x="2.582cm" svg:y="4.488cm"/>
          <draw:glue-point draw:id="5" svg:x="-2.215cm" svg:y="4.711cm"/>
          <draw:glue-point draw:id="6" svg:x="-0.201cm" svg:y="5.036cm"/>
          <text:p text:style-name="P8"><text:span text:style-name="T8">+ </text:span><text:span text:style-name="T18">haltEvasion</text:span><text:span text:style-name="T10">()</text:span><text:span text:style-name="T8">: vo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10.058cm" svg:height="0.745cm" svg:x="1.054cm" svg:y="11.099cm">
          <text:p text:style-name="P14"><text:span text:style-name="T6">- </text:span><text:span text:style-name="T16">patrolTimer</text:span><text:span text:style-name="T19">: Number = 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0.058cm" svg:height="0.826cm" svg:x="1.054cm" svg:y="23.698cm">
          <draw:glue-point draw:id="4" svg:x="2.582cm" svg:y="4.488cm"/>
          <draw:glue-point draw:id="5" svg:x="-2.215cm" svg:y="4.711cm"/>
          <draw:glue-point draw:id="6" svg:x="-0.201cm" svg:y="5.036cm"/>
          <text:p text:style-name="P8"><text:span text:style-name="T8">+ </text:span><text:span text:style-name="T18">addLocationComponent</text:span><text:span text:style-name="T10">()</text:span><text:span text:style-name="T8">: vo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0.058cm" svg:height="0.826cm" svg:x="1.054cm" svg:y="24.698cm">
          <draw:glue-point draw:id="4" svg:x="2.582cm" svg:y="4.488cm"/>
          <draw:glue-point draw:id="5" svg:x="-2.215cm" svg:y="4.711cm"/>
          <draw:glue-point draw:id="6" svg:x="-0.201cm" svg:y="5.036cm"/>
          <text:p text:style-name="P8"><text:span text:style-name="T8">+ </text:span><text:span text:style-name="T18">removeLocationComponent</text:span><text:span text:style-name="T10">()</text:span><text:span text:style-name="T8">: vo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0.058cm" svg:height="0.826cm" svg:x="1.054cm" svg:y="25.698cm">
          <draw:glue-point draw:id="4" svg:x="2.582cm" svg:y="4.488cm"/>
          <draw:glue-point draw:id="5" svg:x="-2.215cm" svg:y="4.711cm"/>
          <draw:glue-point draw:id="6" svg:x="-0.201cm" svg:y="5.036cm"/>
          <text:p text:style-name="P8"><text:span text:style-name="T8">+ </text:span><text:span text:style-name="T18">addLEDComponent</text:span><text:span text:style-name="T10">()</text:span><text:span text:style-name="T8">: vo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0.058cm" svg:height="0.826cm" svg:x="1.054cm" svg:y="26.698cm">
          <draw:glue-point draw:id="4" svg:x="2.582cm" svg:y="4.488cm"/>
          <draw:glue-point draw:id="5" svg:x="-2.215cm" svg:y="4.711cm"/>
          <draw:glue-point draw:id="6" svg:x="-0.201cm" svg:y="5.036cm"/>
          <text:p text:style-name="P8"><text:span text:style-name="T8">+ </text:span><text:span text:style-name="T18">removeLEDComponent</text:span><text:span text:style-name="T10">()</text:span><text:span text:style-name="T8">: vo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0.058cm" svg:height="0.826cm" svg:x="1.054cm" svg:y="27.698cm">
          <draw:glue-point draw:id="4" svg:x="2.582cm" svg:y="4.488cm"/>
          <draw:glue-point draw:id="5" svg:x="-2.215cm" svg:y="4.711cm"/>
          <draw:glue-point draw:id="6" svg:x="-0.201cm" svg:y="5.036cm"/>
          <text:p text:style-name="P8"><text:span text:style-name="T8">+ </text:span><text:span text:style-name="T18">addDistanceComponent</text:span><text:span text:style-name="T10">()</text:span><text:span text:style-name="T8">: vo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0.058cm" svg:height="0.826cm" svg:x="1.054cm" svg:y="28.698cm">
          <draw:glue-point draw:id="4" svg:x="2.582cm" svg:y="4.488cm"/>
          <draw:glue-point draw:id="5" svg:x="-2.215cm" svg:y="4.711cm"/>
          <draw:glue-point draw:id="6" svg:x="-0.201cm" svg:y="5.036cm"/>
          <text:p text:style-name="P8"><text:span text:style-name="T6">+ </text:span><text:span text:style-name="T20">remove</text:span><text:span text:style-name="T18">DistanceComponent</text:span><text:span text:style-name="T10">()</text:span><text:span text:style-name="T8">: vo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0.058cm" svg:height="0.826cm" svg:x="1.054cm" svg:y="29.698cm">
          <draw:glue-point draw:id="4" svg:x="2.582cm" svg:y="4.488cm"/>
          <draw:glue-point draw:id="5" svg:x="-2.215cm" svg:y="4.711cm"/>
          <draw:glue-point draw:id="6" svg:x="-0.201cm" svg:y="5.036cm"/>
          <text:p text:style-name="P8"><text:span text:style-name="T8">+ </text:span><text:span text:style-name="T18">addEvasionComponent</text:span><text:span text:style-name="T10">()</text:span><text:span text:style-name="T8">: vo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0.058cm" svg:height="0.826cm" svg:x="1.054cm" svg:y="30.698cm">
          <draw:glue-point draw:id="4" svg:x="2.582cm" svg:y="4.488cm"/>
          <draw:glue-point draw:id="5" svg:x="-2.215cm" svg:y="4.711cm"/>
          <draw:glue-point draw:id="6" svg:x="-0.201cm" svg:y="5.036cm"/>
          <text:p text:style-name="P8"><text:span text:style-name="T6">+ </text:span><text:span text:style-name="T20">removeEvasion</text:span><text:span text:style-name="T18">Component</text:span><text:span text:style-name="T10">()</text:span><text:span text:style-name="T8">: vo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5" draw:layer="layout" svg:width="10.058cm" svg:height="0.745cm" svg:x="1.054cm" svg:y="7.509cm">
          <text:p text:style-name="P14"><text:span text:style-name="T6">- </text:span><text:span text:style-name="T21">startX</text:span><text:span text:style-name="T19">: Num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5" draw:layer="layout" svg:width="10.058cm" svg:height="0.745cm" svg:x="1.054cm" svg:y="8.409cm">
          <text:p text:style-name="P14"><text:span text:style-name="T6">- </text:span><text:span text:style-name="T21">startY</text:span><text:span text:style-name="T19">: Num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5" draw:layer="layout" svg:width="10.058cm" svg:height="0.745cm" svg:x="1.054cm" svg:y="9.309cm">
          <text:p text:style-name="P14"><text:span text:style-name="T6">- </text:span><text:span text:style-name="T21">speed</text:span><text:span text:style-name="T19">: Number =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5" draw:layer="layout" svg:width="10.058cm" svg:height="0.745cm" svg:x="1.054cm" svg:y="10.209cm">
          <text:p text:style-name="P14"><text:span text:style-name="T6">- </text:span><text:span text:style-name="T21">maxDistance</text:span><text:span text:style-name="T19">: Number = 200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, Consolas"/>
    <style:font-face style:name="Arial1" svg:font-family="Arial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Index" style:family="graphic">
      <style:paragraph-properties style:text-autospace="none"/>
      <style:text-properties style:font-name-complex="Arial3" style:font-family-complex="Arial" style:font-family-generic-complex="swiss"/>
    </style:style>
    <style:style style:name="List" style:family="graphic">
      <style:paragraph-properties style:text-autospace="none"/>
      <style:text-properties style:font-name-complex="Arial3" style:font-family-complex="Arial" style:font-family-generic-complex="swiss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egoe UI" style:font-family-asian="'Segoe UI'" style:font-family-generic-asian="roman" style:font-pitch-asian="variable" style:font-size-asian="12pt" style:language-asian="zh" style:country-asian="CN" style:font-name-complex="Arial1" style:font-family-complex="Arial" style:font-pitch-complex="variable" style:font-size-complex="12pt" style:language-complex="hi" style:country-complex="IN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</office:styles>
  <office:automatic-styles>
    <style:page-layout style:name="PM0">
      <style:page-layout-properties fo:margin-top="0cm" fo:margin-bottom="0cm" fo:margin-left="0cm" fo:margin-right="0cm" fo:page-width="127cm" fo:page-height="12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11T09:08:14.822314600</meta:creation-date>
    <dc:date>2026-05-06T19:18:56.805407500</dc:date>
    <meta:editing-duration>P13DT22H26M15S</meta:editing-duration>
    <meta:editing-cycles>276</meta:editing-cycles>
    <meta:generator>LibreOffice/25.2.3.2$Windows_X86_64 LibreOffice_project/bbb074479178df812d175f709636b368952c2ce3</meta:generator>
    <dc:title>CATopalian JavaScript Component Based Architecture Flow</dc:title>
    <dc:publisher>Christopher Andrew Topalian</dc:publisher>
    <meta:document-statistic meta:object-count="52"/>
  </office:meta>
</office:document-meta>
</file>