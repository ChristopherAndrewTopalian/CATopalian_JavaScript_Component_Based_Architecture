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, Consolas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104.127cm" fo:min-width="115.963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0.674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0.674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draw:fill="none" fo:min-height="3.867cm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15.602cm" fo:min-width="8.83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89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ffff00" draw:marker-start-width="0.321cm" draw:marker-end-width="0.321cm" draw:fill="solid" draw:fill-color="#000000" draw:textarea-horizontal-align="justify" draw:textarea-vertical-align="middle" draw:auto-grow-height="false" fo:min-height="0.496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5.504cm" fo:min-width="9.225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64cm" fo:min-width="8.883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5.883cm" fo:min-width="10.632cm" fo:padding-top="0.165cm" fo:padding-bottom="0.165cm" fo:padding-left="0.29cm" fo:padding-right="0.29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4.21cm" fo:min-width="9.318cm" fo:padding-top="0.165cm" fo:padding-bottom="0.165cm" fo:padding-left="0.29cm" fo:padding-right="0.29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36cm" fo:min-width="8.899cm" fo:padding-top="0.165cm" fo:padding-bottom="0.165cm" fo:padding-left="0.29cm" fo:padding-right="0.29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81cm" svg:stroke-color="#ffff00" draw:marker-start-width="0.321cm" draw:marker-end-width="0.321cm" draw:fill="solid" draw:fill-color="#000000" draw:textarea-horizontal-align="justify" draw:textarea-vertical-align="middle" draw:auto-grow-height="false" fo:min-height="0.532cm" fo:min-width="8.899cm" fo:padding-top="0.165cm" fo:padding-bottom="0.165cm" fo:padding-left="0.29cm" fo:padding-right="0.29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1.109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1.064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5cm" fo:min-width="10.303cm" fo:padding-top="0.165cm" fo:padding-bottom="0.165cm" fo:padding-left="0.29cm" fo:padding-right="0.29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81cm" svg:stroke-color="#ffff00" draw:marker-start-width="0.321cm" draw:marker-end-width="0.321cm" draw:fill="solid" draw:fill-color="#000000" draw:textarea-horizontal-align="justify" draw:textarea-vertical-align="middle" draw:auto-grow-height="false" fo:min-height="0.523cm" fo:min-width="10.303cm" fo:padding-top="0.165cm" fo:padding-bottom="0.165cm" fo:padding-left="0.29cm" fo:padding-right="0.29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02cm" fo:min-width="10.303cm" fo:padding-top="0.165cm" fo:padding-bottom="0.165cm" fo:padding-left="0.29cm" fo:padding-right="0.29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72cm" fo:min-width="10.303cm" fo:padding-top="0.165cm" fo:padding-bottom="0.165cm" fo:padding-left="0.29cm" fo:padding-right="0.29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1.79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64cm" fo:min-width="8.896cm" fo:padding-top="0.165cm" fo:padding-bottom="0.165cm" fo:padding-left="0.29cm" fo:padding-right="0.29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81cm" svg:stroke-color="#ffff00" draw:marker-start-width="0.321cm" draw:marker-end-width="0.321cm" draw:fill="solid" draw:fill-color="#000000" draw:textarea-horizontal-align="justify" draw:textarea-vertical-align="middle" draw:auto-grow-height="false" fo:min-height="0.349cm" fo:min-width="8.899cm" fo:padding-top="0.165cm" fo:padding-bottom="0.165cm" fo:padding-left="0.29cm" fo:padding-right="0.29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0.674cm" loext:decorative="false"/>
      <style:paragraph-properties style:writing-mode="lr-tb"/>
    </style:style>
    <style:style style:name="gr24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8.158cm" fo:min-width="9.225cm" fo:padding-top="0.165cm" fo:padding-bottom="0.165cm" fo:padding-left="0.29cm" fo:padding-right="0.29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1.79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415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svg:stroke-color="#00bfff" draw:fill="solid" draw:fill-color="#000000" fo:min-height="80.8cm" loext:decorative="false"/>
      <style:paragraph-properties style:writing-mode="lr-tb"/>
    </style:style>
    <style:style style:name="gr28" style:family="graphic" style:parent-style-name="standard">
      <style:graphic-properties draw:stroke="solid" svg:stroke-color="#00bfff" draw:fill="solid" draw:fill-color="#000000" fo:min-height="52.717cm" loext:decorative="false"/>
      <style:paragraph-properties style:writing-mode="lr-tb"/>
    </style:style>
    <style:style style:name="gr29" style:family="graphic" style:parent-style-name="standard">
      <style:graphic-properties draw:stroke="solid" svg:stroke-color="#00bfff" draw:fill="none" fo:min-height="27.552cm" loext:decorative="false"/>
      <style:paragraph-properties style:writing-mode="lr-tb"/>
    </style:style>
    <style:style style:name="gr30" style:family="graphic" style:parent-style-name="standard">
      <style:graphic-properties draw:stroke="solid" svg:stroke-color="#00bfff" draw:fill="none" fo:min-height="22.155cm" loext:decorative="false"/>
      <style:paragraph-properties style:writing-mode="lr-tb"/>
    </style:style>
    <style:style style:name="gr31" style:family="graphic" style:parent-style-name="standard">
      <style:graphic-properties draw:stroke="solid" svg:stroke-color="#00bfff" draw:fill="none" fo:min-height="39.617cm" loext:decorative="false"/>
      <style:paragraph-properties style:writing-mode="lr-tb"/>
    </style:style>
    <style:style style:name="gr32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20.396cm" fo:min-width="53.228cm" fo:padding-top="0.165cm" fo:padding-bottom="0.165cm" fo:padding-left="0.29cm" fo:padding-right="0.29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draw:fill="none" fo:min-height="0.674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="none" fo:min-height="3.867cm" loext:decorative="false"/>
      <style:paragraph-properties style:writing-mode="lr-tb"/>
    </style:style>
    <style:style style:name="gr35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1.109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1.064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02cm" fo:min-width="10.303cm" fo:padding-top="0.165cm" fo:padding-bottom="0.165cm" fo:padding-left="0.29cm" fo:padding-right="0.29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72cm" fo:min-width="10.303cm" fo:padding-top="0.165cm" fo:padding-bottom="0.165cm" fo:padding-left="0.29cm" fo:padding-right="0.29cm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1.79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draw:fill="none" fo:min-height="0.674cm" loext:decorative="false"/>
      <style:paragraph-properties style:writing-mode="lr-tb"/>
    </style:style>
    <style:style style:name="gr41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1.79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415cm" fo:min-width="8.223cm" fo:padding-top="0.165cm" fo:padding-bottom="0.165cm" fo:padding-left="0.29cm" fo:padding-right="0.29cm" style:writing-mode="lr-tb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 style:writing-mode="lr-tb"/>
      <style:text-properties fo:color="#00ffff" loext:opacity="100%" fo:font-size="17pt" fo:text-shadow="1pt 1pt" fo:font-weight="bold" style:font-size-asian="17pt" style:font-weight-asian="bold" style:font-size-complex="17pt" style:font-weight-complex="bold"/>
    </style:style>
    <style:style style:name="P2" style:family="paragraph">
      <loext:graphic-properties draw:fill="none"/>
      <style:text-properties fo:color="#a9a9a9" loext:opacity="100%" fo:font-size="17pt" fo:font-weight="bold" style:font-size-asian="17pt" style:font-size-complex="17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a9a9a9" loext:opacity="100%" fo:font-size="17pt" fo:font-weight="bold" style:font-size-asian="17pt" style:font-size-complex="17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00ffff" loext:opacity="100%" fo:font-size="16pt" fo:font-weight="bold" style:font-size-asian="16pt" style:font-size-complex="16pt"/>
    </style:style>
    <style:style style:name="P6" style:family="paragraph">
      <style:paragraph-properties fo:text-align="center"/>
      <style:text-properties fo:color="#00ffff" loext:opacity="100%" fo:font-size="17pt" fo:text-shadow="1pt 1pt" fo:font-weight="bold" style:font-size-asian="17pt" style:font-weight-asian="bold" style:font-size-complex="17pt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00ffff" loext:opacity="100%" fo:font-size="17pt" fo:text-shadow="1pt 1pt" fo:font-weight="bold" style:font-size-asian="17pt" style:font-weight-asian="bold" style:font-size-complex="17pt" style:font-weight-complex="bold"/>
    </style:style>
    <style:style style:name="P8" style:family="paragraph">
      <style:paragraph-properties fo:text-align="start"/>
      <style:text-properties fo:color="#ffffff" loext:opacity="100%" fo:font-size="15pt" fo:font-weight="bold" style:font-size-asian="15pt" style:font-size-complex="15pt"/>
    </style:style>
    <style:style style:name="P9" style:family="paragraph">
      <loext:graphic-properties draw:fill="solid" draw:fill-color="#000000"/>
      <style:paragraph-properties fo:text-align="start" style:writing-mode="lr-tb"/>
      <style:text-properties fo:color="#ffffff" loext:opacity="100%" fo:font-size="15pt" fo:font-weight="bold" style:font-size-asian="15pt" style:font-size-complex="15pt"/>
    </style:style>
    <style:style style:name="P10" style:family="paragraph">
      <style:paragraph-properties fo:text-align="start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00000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2" style:family="paragraph"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000000"/>
      <style:paragraph-properties fo:text-align="start" style:writing-mode="lr-tb"/>
      <style:text-properties fo:font-size="15pt" fo:font-weight="bold" style:font-size-asian="15pt" style:font-weight-asian="bold" style:font-size-complex="15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fo:font-size="15pt" fo:font-weight="bold" style:font-size-asian="15pt" style:font-size-complex="15pt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15pt" fo:font-weight="bold" style:font-size-asian="15pt" style:font-size-complex="15pt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margin-left="0cm" fo:margin-right="0cm" style:line-height-at-least="1.085cm" fo:text-indent="0cm"/>
    </style:style>
    <style:style style:name="P19" style:family="paragraph">
      <style:paragraph-properties style:line-height-at-least="1.085cm"/>
    </style:style>
    <style:style style:name="P20" style:family="paragraph">
      <loext:graphic-properties draw:fill="solid" draw:fill-color="#000000"/>
      <style:paragraph-properties fo:margin-left="0cm" fo:margin-right="0cm" style:line-height-at-least="1.085cm" fo:text-indent="0cm"/>
      <style:text-properties style:font-name="Arial" fo:font-size="22.5pt" fo:font-weight="bold" style:font-name-complex="Arial"/>
    </style:style>
    <style:style style:name="P21" style:family="paragraph">
      <loext:graphic-properties draw:fill="none"/>
      <style:paragraph-properties fo:margin-left="0cm" fo:margin-right="0cm" style:line-height-at-least="1.085cm" fo:text-indent="0cm"/>
      <style:text-properties style:font-name="Arial" fo:font-size="22.5pt" fo:font-weight="bold" style:font-name-complex="Arial"/>
    </style:style>
    <style:style style:name="T1" style:family="text">
      <style:text-properties fo:font-variant="normal" fo:text-transform="none" fo:color="#a9a9a9" loext:opacity="100%" style:text-outline="false" style:text-line-through-style="none" style:text-line-through-type="none" style:font-name="Arial" fo:font-size="17pt" fo:font-style="normal" fo:text-shadow="none" style:text-underline-style="none" fo:font-weight="bold" style:letter-kerning="true" style:font-name-asian="Microsoft YaHei" style:font-size-asian="17pt" style:font-style-asian="normal" style:font-weight-asian="normal" style:font-name-complex="Arial" style:font-size-complex="17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ffff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ffff" loext:opacity="100%" fo:font-size="17pt" fo:text-shadow="1pt 1pt" fo:font-weight="bold" style:font-size-asian="17pt" style:font-weight-asian="bold" style:font-size-complex="17pt" style:font-weight-complex="bold"/>
    </style:style>
    <style:style style:name="T4" style:family="text">
      <style:text-properties fo:font-variant="normal" fo:text-transform="none" fo:color="#ffc0cb" loext:opacity="100%" style:text-outline="false" style:text-line-through-style="none" style:text-line-through-type="none" style:font-name="Liberation Sans" fo:font-size="17pt" fo:font-style="normal" fo:text-shadow="1pt 1pt" style:text-underline-style="none" fo:font-weight="bold" style:letter-kerning="true" style:font-name-asian="Microsoft YaHei" style:font-size-asian="17pt" style:font-style-asian="normal" style:font-weight-asian="bold" style:font-name-complex="Arial2" style:font-size-complex="17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c0cb" loext:opacity="100%" fo:font-size="17pt" fo:text-shadow="1pt 1pt" fo:font-weight="bold" style:font-size-asian="17pt" style:font-weight-asian="bold" style:font-size-complex="17pt" style:font-weight-complex="bold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normal" style:font-name-complex="Arial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bcb4ff" loext:opacity="100%" style:font-name="Arial" fo:font-size="15pt" fo:font-weight="bold" style:font-size-asian="15pt" style:font-name-complex="Arial" style:font-size-complex="15pt"/>
    </style:style>
    <style:style style:name="T8" style:family="text">
      <style:text-properties fo:color="#ffffff" loext:opacity="100%" fo:font-size="15pt" fo:font-weight="bold" style:font-size-asian="15pt" style:font-size-complex="15pt"/>
    </style:style>
    <style:style style:name="T9" style:family="text">
      <style:text-properties fo:color="#ffff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2" style:font-size-complex="15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bcb4ff" loext:opacity="100%" style:font-name="Arial" fo:font-size="15pt" fo:font-weight="bold" style:font-size-asian="15pt" style:font-weight-asian="bold" style:font-name-complex="Arial" style:font-size-complex="15pt" style:font-weight-complex="bold"/>
    </style:style>
    <style:style style:name="T13" style:family="text">
      <style:text-properties fo:font-variant="normal" fo:text-transform="none" fo:color="#ffff00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2" style:font-size-complex="1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ffff" loext:opacity="100%" fo:font-size="15pt" fo:font-weight="bold" style:font-size-asian="15pt" style:font-size-complex="15pt"/>
    </style:style>
    <style:style style:name="T15" style:family="text">
      <style:text-properties fo:color="#ffc0cb" loext:opacity="100%" fo:font-size="15pt" fo:font-weight="bold" style:font-size-asian="15pt" style:font-size-complex="15pt"/>
    </style:style>
    <style:style style:name="T16" style:family="text">
      <style:text-properties fo:font-variant="normal" fo:text-transform="none" fo:color="#bcb4ff" loext:opacity="100%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bcb4ff" loext:opacity="100%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" style:font-size-complex="15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ffff00" loext:opacity="100%" fo:font-size="15pt" fo:font-weight="bold" style:font-size-asian="15pt" style:font-size-complex="15pt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9cccc" loext:opacity="100%" style:font-name="Arial" fo:font-size="22.5pt" fo:font-weight="bold" style:font-name-complex="Arial"/>
    </style:style>
    <style:style style:name="T21" style:family="text">
      <style:text-properties fo:color="#d4d4d4" loext:opacity="100%" style:font-name="Arial" fo:font-size="22.5pt" fo:font-weight="bold" style:font-name-complex="Arial"/>
    </style:style>
    <style:style style:name="T22" style:family="text">
      <style:text-properties fo:color="#00ffff" loext:opacity="100%" style:font-name="Arial" fo:font-size="22.5pt" fo:font-weight="bold" style:font-name-complex="Arial"/>
    </style:style>
    <style:style style:name="T23" style:family="text">
      <style:text-properties fo:color="#ffffff" loext:opacity="100%" style:font-name="Arial" fo:font-size="22.5pt" fo:font-weight="bold" style:font-name-complex="Arial"/>
    </style:style>
    <style:style style:name="T24" style:family="text">
      <style:text-properties fo:color="#d4d4d4" loext:opacity="100%"/>
    </style:style>
    <style:style style:name="T25" style:family="text">
      <style:text-properties fo:color="#bcb4ff" loext:opacity="100%" style:font-name="Arial" fo:font-size="22.5pt" fo:font-weight="bold" style:font-name-complex="Arial"/>
    </style:style>
    <style:style style:name="T26" style:family="text">
      <style:text-properties fo:color="#d3d3d3" loext:opacity="100%" style:font-name="Arial" fo:font-size="22.5pt" fo:font-weight="bold" style:font-name-complex="Arial"/>
    </style:style>
    <style:style style:name="T27" style:family="text">
      <style:text-properties fo:color="#569cd6" loext:opacity="100%" style:font-name="Arial" fo:font-size="22.5pt" fo:font-weight="bold" style:font-name-complex="Arial"/>
    </style:style>
    <style:style style:name="T28" style:family="text">
      <style:text-properties fo:color="#ffffff" loext:opacity="100%"/>
    </style:style>
    <style:style style:name="T29" style:family="text">
      <style:text-properties fo:color="#959595" loext:opacity="100%" style:font-name="Arial" fo:font-size="22.5pt" fo:font-weight="bold" style:font-name-complex="Arial"/>
    </style:style>
    <style:style style:name="T30" style:family="text">
      <style:text-properties fo:color="#fffb00" loext:opacity="100%" style:font-name="Arial" fo:font-size="22.5pt" fo:font-weight="bold" style:font-name-complex="Arial"/>
    </style:style>
    <style:style style:name="T31" style:family="text">
      <style:text-properties fo:color="#9cdcfe" loext:opacity="100%" style:font-name="Arial" fo:font-size="22.5pt" fo:font-weight="bold" style:font-name-complex="Arial"/>
    </style:style>
    <style:style style:name="T32" style:family="text">
      <style:text-properties fo:color="#f09dff" loext:opacity="100%" style:font-name="Arial" fo:font-size="22.5pt" fo:font-weight="bold" style:font-name-complex="Arial"/>
    </style:style>
    <style:style style:name="T33" style:family="text">
      <style:text-properties fo:color="#ffff00" loext:opacity="100%" style:font-name="Arial" fo:font-size="22.5pt" fo:font-weight="bold" style:font-name-complex="Arial"/>
    </style:style>
    <style:style style:name="T34" style:family="text">
      <style:text-properties fo:color="#cccccc" loext:opacity="100%" style:font-name="Arial" fo:font-size="22.5pt" fo:font-weight="bold" style:font-name-complex="Arial"/>
    </style:style>
    <style:style style:name="T35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cccccc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6.543cm" svg:height="104.457cm" svg:x="0.05cm" svg:y="0cm">
          <draw:glue-point draw:id="4" svg:x="2.533cm" svg:y="5.051cm"/>
          <draw:glue-point draw:id="5" svg:x="-2.027cm" svg:y="5.051cm"/>
          <draw:glue-point draw:id="6" svg:x="0.089cm" svg:y="5.00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8.883cm" svg:height="0.924cm" svg:x="7.329cm" svg:y="0.307cm">
          <draw:text-box>
            <text:p><text:span text:style-name="T1">Christopher Andrew Topalian</text:span></text:p>
          </draw:text-box>
        </draw:frame>
        <draw:frame draw:style-name="gr3" draw:text-style-name="P4" draw:layer="layout" svg:width="14.445cm" svg:height="0.924cm" svg:x="7.362cm" svg:y="1.21cm">
          <draw:text-box>
            <text:p text:style-name="P3"><text:span text:style-name="T1">https://github.com/ChristopherAndrewTopalian</text:span></text:p>
          </draw:text-box>
        </draw:frame>
        <draw:frame draw:style-name="gr4" draw:text-style-name="P5" draw:layer="layout" svg:width="7.271cm" svg:height="4.117cm" svg:x="0.388cm" svg:y="0.117cm">
          <draw:text-box>
            <text:p text:style-name="P3"><text:span text:style-name="T2">Component</text:span></text:p>
            <text:p text:style-name="P3"><text:span text:style-name="T2">Based</text:span></text:p>
            <text:p text:style-name="P3"><text:span text:style-name="T2">Architecture</text:span></text:p>
          </draw:text-box>
        </draw:frame>
        <draw:custom-shape draw:style-name="gr5" draw:text-style-name="P1" draw:layer="layout" svg:width="9.41cm" svg:height="15.932cm" svg:x="9.15cm" svg:y="4.87cm">
          <draw:glue-point draw:id="4" svg:x="2.533cm" svg:y="5.051cm"/>
          <draw:glue-point draw:id="5" svg:x="-2.027cm" svg:y="5.051cm"/>
          <draw:glue-point draw:id="6" svg:x="0.089cm" svg:y="5.001cm"/>
          <text:p text:style-name="P6"><text:span text:style-name="T3">Drone</text:span></text:p>
          <text:p text:style-name="P7"><text:span text:style-name="T4">constructor(</text:span><text:span text:style-name="T5">id, startX, startY, speed = 2, maxDistance = 20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8.803cm" svg:height="0.719cm" svg:x="9.454cm" svg:y="7.251cm">
          <text:p text:style-name="P8"><text:span text:style-name="T6">- </text:span><text:span text:style-name="T7">id</text:span><text:span text:style-name="T8">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8.803cm" svg:height="0.826cm" svg:x="9.454cm" svg:y="17.69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9">flyRight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8.803cm" svg:height="0.826cm" svg:x="9.454cm" svg:y="16.736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9">flyLeft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9.805cm" svg:height="5.834cm" svg:x="73.917cm" svg:y="14.841cm">
          <text:p text:style-name="P6"><text:span text:style-name="T3">DistanceComponent</text:span></text:p>
          <text:p text:style-name="P6"><text:span text:style-name="T5">constructor(elementId, originX = 0, originY =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9.463cm" svg:height="0.694cm" svg:x="74.07cm" svg:y="17.239cm">
          <text:p text:style-name="P10"><text:span text:style-name="T11">- </text:span><text:span text:style-name="T12">elementId</text:span><text:span text:style-name="T10">: HTMLElem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212cm" svg:height="6.213cm" svg:x="32.067cm" svg:y="14.628cm">
          <text:p text:style-name="P6"><text:span text:style-name="T3">LocationComponent</text:span></text:p>
          <text:p text:style-name="P6"><text:span text:style-name="T5">constructor(elementId, startX, star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9.898cm" svg:height="4.54cm" svg:x="51.911cm" svg:y="16.23cm">
          <text:p text:style-name="P6"><text:span text:style-name="T3">LEDComponent</text:span></text:p>
          <text:p text:style-name="P6"><text:span text:style-name="T5">constructor(elementId)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9.479cm" svg:height="0.666cm" svg:x="52.125cm" svg:y="17.854cm">
          <text:p text:style-name="P12"><text:span text:style-name="T11">- </text:span><text:span text:style-name="T12">element</text:span><text:span text:style-name="T10">: HTMLElem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9.479cm" svg:height="0.862cm" svg:x="52.125cm" svg:y="18.681cm">
          <text:p text:style-name="P10"><text:span text:style-name="T11">+ </text:span><text:span text:style-name="T13">setColor</text:span><text:span text:style-name="T11">(</text:span><text:span text:style-name="T12">newColor</text:span><text:span text:style-name="T10">: String): void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8.803cm" svg:height="1.439cm" svg:x="9.454cm" svg:y="8.116cm">
          <text:p text:style-name="P14"><text:span text:style-name="T6">- </text:span><text:span text:style-name="T7">location</text:span><text:span text:style-name="T8">: </text:span><text:span text:style-name="T14">LocationComponent</text:span></text:p>
          <text:p text:style-name="P14"><text:span text:style-name="T15">constructor(id, startX, star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8.803cm" svg:height="1.394cm" svg:x="9.454cm" svg:y="9.707cm">
          <text:p text:style-name="P14"><text:span text:style-name="T6">- </text:span><text:span text:style-name="T7">led</text:span><text:span text:style-name="T8">: </text:span><text:span text:style-name="T14">LEDComponent</text:span></text:p>
          <text:p text:style-name="P14"><text:span text:style-name="T15">constructor(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0.883cm" svg:height="0.68cm" svg:x="32.244cm" svg:y="16.266cm">
          <text:p text:style-name="P10"><text:span text:style-name="T11">- </text:span><text:span text:style-name="T12">element</text:span><text:span text:style-name="T10">: HTMLElem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0.883cm" svg:height="0.853cm" svg:x="32.244cm" svg:y="19.755cm">
          <text:p text:style-name="P8"><text:span text:style-name="T8">+ </text:span><text:span text:style-name="T9">moveRight</text:span><text:span text:style-name="T10">()</text:span><text:span text:style-name="T8">: void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0.883cm" svg:height="0.853cm" svg:x="32.244cm" svg:y="18.741cm">
          <text:p text:style-name="P8"><text:span text:style-name="T8">+ </text:span><text:span text:style-name="T9">moveLeft</text:span><text:span text:style-name="T10">()</text:span><text:span text:style-name="T8">: void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10.883cm" svg:height="0.632cm" svg:x="32.244cm" svg:y="17.066cm">
          <text:p text:style-name="P16"><text:span text:style-name="T11">- </text:span><text:span text:style-name="T12">x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0.883cm" svg:height="0.702cm" svg:x="32.244cm" svg:y="17.866cm">
          <text:p text:style-name="P16"><text:span text:style-name="T11">- </text:span><text:span text:style-name="T12">y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8.803cm" svg:height="2.12cm" svg:x="9.454cm" svg:y="11.247cm">
          <text:p text:style-name="P14"><text:span text:style-name="T6">- </text:span><text:span text:style-name="T16">distanceTracker</text:span><text:span text:style-name="T8">: </text:span><text:span text:style-name="T14">DistanceComponent</text:span></text:p>
          <text:p text:style-name="P14"><text:span text:style-name="T15">constructor(id, startX, star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9.476cm" svg:height="0.694cm" svg:x="74.07cm" svg:y="18.084cm">
          <text:p text:style-name="P10"><text:span text:style-name="T11">- </text:span><text:span text:style-name="T17">originX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74.07cm" svg:y="18.93cm">
          <text:p text:style-name="P10"><text:span text:style-name="T11">- </text:span><text:span text:style-name="T17">originY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9.479cm" svg:height="0.679cm" svg:x="74.07cm" svg:y="19.766cm">
          <text:p text:style-name="P10"><text:span text:style-name="T11">+ </text:span><text:span text:style-name="T13">getDistanceFromOrigin</text:span><text:span text:style-name="T11">(</text:span><text:span text:style-name="T10">): Object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83cm" svg:height="0.924cm" svg:x="102.043cm" svg:y="102.378cm">
          <draw:text-box>
            <text:p><text:span text:style-name="T1">Christopher Andrew Topalian</text:span></text:p>
          </draw:text-box>
        </draw:frame>
        <draw:frame draw:style-name="gr23" draw:text-style-name="P4" draw:layer="layout" svg:width="14.094cm" svg:height="0.924cm" svg:x="102.076cm" svg:y="103.281cm">
          <draw:text-box>
            <text:p text:style-name="P3"><text:span text:style-name="T1">https://github.com/ChristopherAndrewTopalian</text:span></text:p>
          </draw:text-box>
        </draw:frame>
        <draw:custom-shape draw:style-name="gr24" draw:text-style-name="P1" draw:layer="layout" svg:width="9.805cm" svg:height="8.488cm" svg:x="97.433cm" svg:y="12.241cm">
          <text:p text:style-name="P6"><text:span text:style-name="T3">EvasionComponent</text:span></text:p>
          <text:p text:style-name="P6"><text:span text:style-name="T5">constructor(targetId, speed, maxDistan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9.463cm" svg:height="0.694cm" svg:x="97.586cm" svg:y="14.639cm">
          <text:p text:style-name="P10"><text:span text:style-name="T11">- </text:span><text:span text:style-name="T17">targetId</text:span><text:span text:style-name="T10">: HTMLElem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97.586cm" svg:y="15.484cm">
          <text:p text:style-name="P10"><text:span text:style-name="T11">- </text:span><text:span text:style-name="T17">speed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97.586cm" svg:y="16.33cm">
          <text:p text:style-name="P10"><text:span text:style-name="T11">- </text:span><text:span text:style-name="T17">maxDistance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9.479cm" svg:height="0.679cm" svg:x="97.586cm" svg:y="19.766cm">
          <text:p text:style-name="P10"><text:span text:style-name="T11">+ </text:span><text:span text:style-name="T13">update</text:span><text:span text:style-name="T11">(</text:span><text:span text:style-name="T10">): void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97.586cm" svg:y="17.23cm">
          <text:p text:style-name="P10"><text:span text:style-name="T11">- </text:span><text:span text:style-name="T17">direction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97.586cm" svg:y="18.092cm">
          <text:p text:style-name="P10"><text:span text:style-name="T11">- </text:span><text:span text:style-name="T17">startX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97.586cm" svg:y="18.93cm">
          <text:p text:style-name="P10"><text:span text:style-name="T11">- </text:span><text:span text:style-name="T17">isInitialized</text:span><text:span text:style-name="T10">: Boolean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8.803cm" svg:height="2.12cm" svg:x="9.454cm" svg:y="13.547cm">
          <text:p text:style-name="P14"><text:span text:style-name="T6">- </text:span><text:span text:style-name="T16">evasion</text:span><text:span text:style-name="T8">: </text:span><text:span text:style-name="T14">EvasionComponent</text:span></text:p>
          <text:p text:style-name="P14"><text:span text:style-name="T15">constructor(id, speed, maxDistan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9.479cm" svg:height="0.862cm" svg:x="52.125cm" svg:y="19.7cm">
          <text:p text:style-name="P16"><text:span text:style-name="T10">+ </text:span><text:span text:style-name="T9">randomColor</text:span><text:span text:style-name="T10">(): void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8.803cm" svg:height="0.826cm" svg:x="9.454cm" svg:y="18.652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18">startEvasion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8.803cm" svg:height="0.826cm" svg:x="9.454cm" svg:y="19.598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18">haltEvasion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8.803cm" svg:height="0.745cm" svg:x="9.454cm" svg:y="15.847cm">
          <text:p text:style-name="P14"><text:span text:style-name="T6">- </text:span><text:span text:style-name="T16">patrolTimer</text:span><text:span text:style-name="T19">: 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0" draw:layer="layout" svg:width="26.77cm" svg:height="81.05cm" svg:x="1.035cm" svg:y="21.185cm">
          <draw:text-box>
            <text:p text:style-name="P18"><text:span text:style-name="T20">class</text:span><text:span text:style-name="T21"> </text:span><text:span text:style-name="T22">Drone</text:span></text:p>
            <text:p text:style-name="P18"><text:span text:style-name="T23">{</text:span></text:p>
            <text:p text:style-name="P18"><text:span text:style-name="T24">    </text:span><text:span text:style-name="T20">constructor</text:span><text:span text:style-name="T23">(</text:span><text:span text:style-name="T25">id</text:span><text:span text:style-name="T23">,</text:span><text:span text:style-name="T21"> </text:span><text:span text:style-name="T25">startX</text:span><text:span text:style-name="T23">,</text:span><text:span text:style-name="T21"> </text:span><text:span text:style-name="T25">startY</text:span><text:span text:style-name="T23">,</text:span><text:span text:style-name="T21"> </text:span><text:span text:style-name="T25">speed</text:span><text:span text:style-name="T21"> </text:span><text:span text:style-name="T23">=</text:span><text:span text:style-name="T21"> </text:span><text:span text:style-name="T26">2</text:span><text:span text:style-name="T23">,</text:span><text:span text:style-name="T21"> </text:span><text:span text:style-name="T25">maxDistance</text:span><text:span text:style-name="T21"> </text:span><text:span text:style-name="T23">=</text:span><text:span text:style-name="T21"> </text:span><text:span text:style-name="T26">200</text:span><text:span text:style-name="T23">)</text:span></text:p>
            <text:p text:style-name="P18"><text:span text:style-name="T24">    </text:span><text:span text:style-name="T23">{</text:span></text:p>
            <text:p text:style-name="P18"><text:span text:style-name="T24">        </text:span><text:span text:style-name="T27">this</text:span><text:span text:style-name="T23">.</text:span><text:span text:style-name="T25">id</text:span><text:span text:style-name="T21"> </text:span><text:span text:style-name="T23">=</text:span><text:span text:style-name="T21"> </text:span><text:span text:style-name="T25">id</text:span><text:span text:style-name="T23">;</text:span></text:p>
            <text:p text:style-name="P19"/>
            <text:p text:style-name="P18"><text:span text:style-name="T24">        </text:span><text:span text:style-name="T27">this</text:span><text:span text:style-name="T23">.</text:span><text:span text:style-name="T25">location</text:span><text:span text:style-name="T21"> </text:span><text:span text:style-name="T23">=</text:span><text:span text:style-name="T21"> </text:span><text:span text:style-name="T27">new</text:span><text:span text:style-name="T21"> </text:span><text:span text:style-name="T22">LocationComponent</text:span><text:span text:style-name="T21">(</text:span><text:span text:style-name="T25">id</text:span><text:span text:style-name="T23">,</text:span><text:span text:style-name="T21"> </text:span><text:span text:style-name="T25">startX</text:span><text:span text:style-name="T23">,</text:span><text:span text:style-name="T21"> </text:span><text:span text:style-name="T25">startY</text:span><text:span text:style-name="T21">)</text:span><text:span text:style-name="T23">;</text:span></text:p>
            <text:p text:style-name="P18"><text:span text:style-name="T24">        </text:span></text:p>
            <text:p text:style-name="P18"><text:span text:style-name="T24">        </text:span><text:span text:style-name="T27">this</text:span><text:span text:style-name="T23">.</text:span><text:span text:style-name="T25">led</text:span><text:span text:style-name="T21"> </text:span><text:span text:style-name="T23">=</text:span><text:span text:style-name="T21"> </text:span><text:span text:style-name="T27">new</text:span><text:span text:style-name="T21"> </text:span><text:span text:style-name="T22">LEDComponent</text:span><text:span text:style-name="T21">(</text:span><text:span text:style-name="T25">id</text:span><text:span text:style-name="T21">)</text:span><text:span text:style-name="T23">;</text:span></text:p>
            <text:p text:style-name="P19"/>
            <text:p text:style-name="P18"><text:span text:style-name="T28">        </text:span><text:span text:style-name="T29">// Initialize the distance chip, setting startX and startY as the origin</text:span></text:p>
            <text:p text:style-name="P18"><text:span text:style-name="T24">        </text:span><text:span text:style-name="T27">this</text:span><text:span text:style-name="T23">.</text:span><text:span text:style-name="T25">distanceTracker</text:span><text:span text:style-name="T21"> </text:span><text:span text:style-name="T23">=</text:span><text:span text:style-name="T21"> </text:span><text:span text:style-name="T27">new</text:span><text:span text:style-name="T21"> </text:span><text:span text:style-name="T22">DistanceComponent</text:span><text:span text:style-name="T21">(</text:span><text:span text:style-name="T25">id</text:span><text:span text:style-name="T23">,</text:span><text:span text:style-name="T21"> </text:span><text:span text:style-name="T25">startX</text:span><text:span text:style-name="T23">,</text:span><text:span text:style-name="T21"> </text:span><text:span text:style-name="T25">startY</text:span><text:span text:style-name="T21">)</text:span><text:span text:style-name="T23">;</text:span></text:p>
            <text:p text:style-name="P19"/>
            <text:p text:style-name="P18"><text:span text:style-name="T28">        </text:span><text:span text:style-name="T29">// Initialize the Evasion Chip</text:span></text:p>
            <text:p text:style-name="P18"><text:span text:style-name="T24">        </text:span><text:span text:style-name="T27">this</text:span><text:span text:style-name="T23">.</text:span><text:span text:style-name="T25">evasion</text:span><text:span text:style-name="T21"> </text:span><text:span text:style-name="T23">=</text:span><text:span text:style-name="T21"> </text:span><text:span text:style-name="T27">new</text:span><text:span text:style-name="T21"> </text:span><text:span text:style-name="T22">EvasionComponent</text:span><text:span text:style-name="T21">(</text:span><text:span text:style-name="T25">id</text:span><text:span text:style-name="T23">,</text:span><text:span text:style-name="T21"> </text:span><text:span text:style-name="T25">speed</text:span><text:span text:style-name="T23">,</text:span><text:span text:style-name="T21"> </text:span><text:span text:style-name="T25">maxDistance</text:span><text:span text:style-name="T21">)</text:span><text:span text:style-name="T23">;</text:span></text:p>
            <text:p text:style-name="P19"/>
            <text:p text:style-name="P18"><text:span text:style-name="T28">        </text:span><text:span text:style-name="T29">// A variable to store the engine loop so we can turn it off later</text:span></text:p>
            <text:p text:style-name="P18"><text:span text:style-name="T24">        </text:span><text:span text:style-name="T27">this</text:span><text:span text:style-name="T23">.</text:span><text:span text:style-name="T25">patrolTimer</text:span><text:span text:style-name="T21"> </text:span><text:span text:style-name="T23">=</text:span><text:span text:style-name="T21"> </text:span><text:span text:style-name="T27">null</text:span><text:span text:style-name="T23">;</text:span><text:span text:style-name="T21"> </text:span></text:p>
            <text:p text:style-name="P18"><text:span text:style-name="T24">    </text:span><text:span text:style-name="T23">}</text:span></text:p>
            <text:p text:style-name="P19"/>
            <text:p text:style-name="P18"><text:span text:style-name="T24">    </text:span><text:span text:style-name="T30">flyLeft</text:span><text:span text:style-name="T23">()</text:span></text:p>
            <text:p text:style-name="P18"><text:span text:style-name="T24">    </text:span><text:span text:style-name="T23">{</text:span></text:p>
            <text:p text:style-name="P18"><text:span text:style-name="T24">        </text:span><text:span text:style-name="T27">this</text:span><text:span text:style-name="T23">.</text:span><text:span text:style-name="T25">location</text:span><text:span text:style-name="T23">.</text:span><text:span text:style-name="T30">moveLeft</text:span><text:span text:style-name="T21">()</text:span><text:span text:style-name="T23">;</text:span></text:p>
            <text:p text:style-name="P19"/>
            <text:p text:style-name="P18"><text:span text:style-name="T24">        </text:span><text:span text:style-name="T20">let</text:span><text:span text:style-name="T21"> </text:span><text:span text:style-name="T25">distanceData</text:span><text:span text:style-name="T21"> </text:span><text:span text:style-name="T23">=</text:span><text:span text:style-name="T21"> </text:span><text:span text:style-name="T27">this</text:span><text:span text:style-name="T23">.</text:span><text:span text:style-name="T25">distanceTracker</text:span><text:span text:style-name="T23">.</text:span><text:span text:style-name="T30">getDistanceFromOrigin</text:span><text:span text:style-name="T21">()</text:span><text:span text:style-name="T23">;</text:span></text:p>
            <text:p text:style-name="P18"><text:span text:style-name="T24">        </text:span><text:span text:style-name="T30">ge</text:span><text:span text:style-name="T21">(</text:span><text:span text:style-name="T23">'</text:span><text:span text:style-name="T26">distanceBox</text:span><text:span text:style-name="T23">'</text:span><text:span text:style-name="T21">)</text:span><text:span text:style-name="T23">.</text:span><text:span text:style-name="T31">textContent</text:span><text:span text:style-name="T21"> </text:span><text:span text:style-name="T23">=</text:span><text:span text:style-name="T21"> </text:span><text:span text:style-name="T23">`</text:span><text:span text:style-name="T26">Distance from origin: </text:span><text:span text:style-name="T27">${</text:span><text:span text:style-name="T25">distanceData</text:span><text:span text:style-name="T23">.</text:span><text:span text:style-name="T25">total</text:span><text:span text:style-name="T27">}</text:span><text:span text:style-name="T26">px</text:span><text:span text:style-name="T23">`;</text:span></text:p>
            <text:p text:style-name="P18"><text:span text:style-name="T24">        </text:span><text:span text:style-name="T30">ge</text:span><text:span text:style-name="T21">(</text:span><text:span text:style-name="T23">'</text:span><text:span text:style-name="T26">infoBox</text:span><text:span text:style-name="T23">'</text:span><text:span text:style-name="T21">)</text:span><text:span text:style-name="T23">.</text:span><text:span text:style-name="T31">textContent</text:span><text:span text:style-name="T21"> </text:span><text:span text:style-name="T23">=</text:span><text:span text:style-name="T21"> </text:span><text:span text:style-name="T23">"</text:span><text:span text:style-name="T26">Status: Drone flying left.</text:span><text:span text:style-name="T23">";</text:span></text:p>
            <text:p text:style-name="P18"><text:span text:style-name="T24">    </text:span><text:span text:style-name="T23">}</text:span></text:p>
            <text:p text:style-name="P19"/>
            <text:p text:style-name="P18"><text:span text:style-name="T24">    </text:span><text:span text:style-name="T30">flyRight</text:span><text:span text:style-name="T23">()</text:span></text:p>
            <text:p text:style-name="P18"><text:span text:style-name="T24">    </text:span><text:span text:style-name="T23">{</text:span></text:p>
            <text:p text:style-name="P18"><text:span text:style-name="T24">        </text:span><text:span text:style-name="T27">this</text:span><text:span text:style-name="T23">.</text:span><text:span text:style-name="T25">location</text:span><text:span text:style-name="T23">.</text:span><text:span text:style-name="T30">moveRight</text:span><text:span text:style-name="T21">()</text:span><text:span text:style-name="T23">;</text:span></text:p>
            <text:p text:style-name="P19"/>
            <text:p text:style-name="P18"><text:span text:style-name="T24">        </text:span><text:span text:style-name="T20">let</text:span><text:span text:style-name="T21"> </text:span><text:span text:style-name="T25">distanceData</text:span><text:span text:style-name="T21"> </text:span><text:span text:style-name="T23">=</text:span><text:span text:style-name="T21"> </text:span><text:span text:style-name="T27">this</text:span><text:span text:style-name="T23">.</text:span><text:span text:style-name="T25">distanceTracker</text:span><text:span text:style-name="T23">.</text:span><text:span text:style-name="T30">getDistanceFromOrigin</text:span><text:span text:style-name="T21">()</text:span><text:span text:style-name="T23">;</text:span></text:p>
            <text:p text:style-name="P18"><text:span text:style-name="T24">        </text:span><text:span text:style-name="T30">ge</text:span><text:span text:style-name="T21">(</text:span><text:span text:style-name="T23">'</text:span><text:span text:style-name="T26">distanceBox</text:span><text:span text:style-name="T23">'</text:span><text:span text:style-name="T21">)</text:span><text:span text:style-name="T23">.</text:span><text:span text:style-name="T31">textContent</text:span><text:span text:style-name="T21"> </text:span><text:span text:style-name="T23">=</text:span><text:span text:style-name="T21"> </text:span><text:span text:style-name="T23">`</text:span><text:span text:style-name="T26">Distance from origin: </text:span><text:span text:style-name="T27">${</text:span><text:span text:style-name="T25">distanceData</text:span><text:span text:style-name="T23">.</text:span><text:span text:style-name="T25">total</text:span><text:span text:style-name="T27">}</text:span><text:span text:style-name="T26">px</text:span><text:span text:style-name="T23">`;</text:span></text:p>
            <text:p text:style-name="P18"><text:span text:style-name="T24">        </text:span><text:span text:style-name="T30">ge</text:span><text:span text:style-name="T21">(</text:span><text:span text:style-name="T23">'</text:span><text:span text:style-name="T26">infoBox</text:span><text:span text:style-name="T23">'</text:span><text:span text:style-name="T21">)</text:span><text:span text:style-name="T23">.</text:span><text:span text:style-name="T31">textContent</text:span><text:span text:style-name="T21"> </text:span><text:span text:style-name="T23">=</text:span><text:span text:style-name="T21"> </text:span><text:span text:style-name="T23">"</text:span><text:span text:style-name="T26">Status: Drone flying right.</text:span><text:span text:style-name="T23">";</text:span></text:p>
            <text:p text:style-name="P18"><text:span text:style-name="T24">    </text:span><text:span text:style-name="T23">}</text:span></text:p>
            <text:p text:style-name="P19"/>
            <text:p text:style-name="P18"><text:span text:style-name="T24">    </text:span><text:span text:style-name="T30">startEvasion</text:span><text:span text:style-name="T23">()</text:span></text:p>
            <text:p text:style-name="P18"><text:span text:style-name="T24">    </text:span><text:span text:style-name="T23">{</text:span></text:p>
            <text:p text:style-name="P18"><text:span text:style-name="T24">        </text:span><text:span text:style-name="T32">if</text:span><text:span text:style-name="T21"> (</text:span><text:span text:style-name="T27">this</text:span><text:span text:style-name="T23">.</text:span><text:span text:style-name="T25">patrolTimer</text:span><text:span text:style-name="T21"> !== </text:span><text:span text:style-name="T27">null</text:span><text:span text:style-name="T21">) </text:span><text:span text:style-name="T32">return</text:span><text:span text:style-name="T23">;</text:span><text:span text:style-name="T21"> </text:span></text:p>
            <text:p text:style-name="P19"/>
            <text:p text:style-name="P18"><text:span text:style-name="T24">        </text:span><text:span text:style-name="T30">ge</text:span><text:span text:style-name="T21">(</text:span><text:span text:style-name="T23">'</text:span><text:span text:style-name="T26">infoBox</text:span><text:span text:style-name="T23">'</text:span><text:span text:style-name="T21">)</text:span><text:span text:style-name="T23">.</text:span><text:span text:style-name="T31">textContent</text:span><text:span text:style-name="T21"> </text:span><text:span text:style-name="T23">=</text:span><text:span text:style-name="T21"> </text:span><text:span text:style-name="T23">"</text:span><text:span text:style-name="T26">Status: Drone executing evasive maneuvers.</text:span><text:span text:style-name="T23">";</text:span></text:p>
            <text:p text:style-name="P19"/>
            <text:p text:style-name="P18"><text:span text:style-name="T24">        </text:span><text:span text:style-name="T27">this</text:span><text:span text:style-name="T23">.</text:span><text:span text:style-name="T25">patrolTimer</text:span><text:span text:style-name="T21"> </text:span><text:span text:style-name="T23">=</text:span><text:span text:style-name="T21"> </text:span><text:span text:style-name="T33">setInterval</text:span><text:span text:style-name="T21">(</text:span><text:span text:style-name="T23">()</text:span><text:span text:style-name="T21"> </text:span><text:span text:style-name="T20">=&gt;</text:span><text:span text:style-name="T21"> </text:span></text:p>
            <text:p text:style-name="P18"><text:span text:style-name="T24">        </text:span><text:span text:style-name="T23">{</text:span></text:p>
            <text:p text:style-name="P18"><text:span text:style-name="T28">            </text:span><text:span text:style-name="T29">// The Evasion chip physically moves the element</text:span></text:p>
            <text:p text:style-name="P18"><text:span text:style-name="T24">            </text:span><text:span text:style-name="T27">this</text:span><text:span text:style-name="T23">.</text:span><text:span text:style-name="T25">evasion</text:span><text:span text:style-name="T23">.</text:span><text:span text:style-name="T30">update</text:span><text:span text:style-name="T21">()</text:span><text:span text:style-name="T23">;</text:span></text:p>
            <text:p text:style-name="P19"/>
            <text:p text:style-name="P18"><text:span text:style-name="T28">            </text:span><text:span text:style-name="T29">// We read the raw DOM location</text:span></text:p>
            <text:p text:style-name="P18"><text:span text:style-name="T24">            </text:span><text:span text:style-name="T20">let</text:span><text:span text:style-name="T21"> </text:span><text:span text:style-name="T25">rect</text:span><text:span text:style-name="T21"> </text:span><text:span text:style-name="T23">=</text:span><text:span text:style-name="T21"> </text:span><text:span text:style-name="T30">ge</text:span><text:span text:style-name="T21">(</text:span><text:span text:style-name="T27">this</text:span><text:span text:style-name="T23">.</text:span><text:span text:style-name="T25">id</text:span><text:span text:style-name="T21">)</text:span><text:span text:style-name="T23">.</text:span><text:span text:style-name="T30">getBoundingClientRect</text:span><text:span text:style-name="T21">()</text:span><text:span text:style-name="T23">;</text:span></text:p>
            <text:p text:style-name="P19"/>
            <text:p text:style-name="P18"><text:span text:style-name="T28">            </text:span><text:span text:style-name="T29">// We update the UI directly from the raw data</text:span></text:p>
            <text:p text:style-name="P18"><text:span text:style-name="T24">            </text:span><text:span text:style-name="T30">ge</text:span><text:span text:style-name="T21">(</text:span><text:span text:style-name="T23">'</text:span><text:span text:style-name="T26">distanceBox</text:span><text:span text:style-name="T23">'</text:span><text:span text:style-name="T21">)</text:span><text:span text:style-name="T23">.</text:span><text:span text:style-name="T31">textContent</text:span><text:span text:style-name="T21"> </text:span><text:span text:style-name="T23">=</text:span><text:span text:style-name="T21"> </text:span><text:span text:style-name="T23">`</text:span><text:span text:style-name="T26">Current Screen Position X: </text:span><text:span text:style-name="T27">${</text:span><text:span text:style-name="T31">Math</text:span><text:span text:style-name="T23">.</text:span><text:span text:style-name="T30">round</text:span><text:span text:style-name="T21">(</text:span><text:span text:style-name="T25">rect</text:span><text:span text:style-name="T23">.</text:span><text:span text:style-name="T31">left</text:span><text:span text:style-name="T21">)</text:span><text:span text:style-name="T27">}</text:span><text:span text:style-name="T26">px</text:span><text:span text:style-name="T23">`;</text:span></text:p>
            <text:p text:style-name="P19"/>
            <text:p text:style-name="P18"><text:span text:style-name="T24">        </text:span><text:span text:style-name="T23">},</text:span><text:span text:style-name="T21"> </text:span><text:span text:style-name="T26">1000</text:span><text:span text:style-name="T21"> / </text:span><text:span text:style-name="T26">60</text:span><text:span text:style-name="T21">)</text:span><text:span text:style-name="T23">;</text:span><text:span text:style-name="T21"> </text:span></text:p>
            <text:p text:style-name="P18"><text:span text:style-name="T24">    </text:span><text:span text:style-name="T23">}</text:span></text:p>
            <text:p text:style-name="P19"/>
            <text:p text:style-name="P18"><text:span text:style-name="T24">    </text:span><text:span text:style-name="T30">haltEvasion</text:span><text:span text:style-name="T23">()</text:span></text:p>
            <text:p text:style-name="P18"><text:span text:style-name="T24">    </text:span><text:span text:style-name="T23">{</text:span></text:p>
            <text:p text:style-name="P18"><text:span text:style-name="T28">        </text:span><text:span text:style-name="T29">// cut the power to the loop</text:span></text:p>
            <text:p text:style-name="P18"><text:span text:style-name="T24">        </text:span><text:span text:style-name="T33">clearInterval</text:span><text:span text:style-name="T21">(</text:span><text:span text:style-name="T27">this</text:span><text:span text:style-name="T23">.</text:span><text:span text:style-name="T25">patrolTimer</text:span><text:span text:style-name="T21">)</text:span><text:span text:style-name="T23">;</text:span></text:p>
            <text:p text:style-name="P18"><text:span text:style-name="T24">        </text:span><text:span text:style-name="T27">this</text:span><text:span text:style-name="T23">.</text:span><text:span text:style-name="T25">patrolTimer</text:span><text:span text:style-name="T21"> </text:span><text:span text:style-name="T23">=</text:span><text:span text:style-name="T21"> </text:span><text:span text:style-name="T27">null</text:span><text:span text:style-name="T23">;</text:span></text:p>
            <text:p text:style-name="P19"/>
            <text:p text:style-name="P18"><text:span text:style-name="T24">        </text:span><text:span text:style-name="T30">ge</text:span><text:span text:style-name="T21">(</text:span><text:span text:style-name="T23">'</text:span><text:span text:style-name="T26">infoBox</text:span><text:span text:style-name="T23">'</text:span><text:span text:style-name="T21">)</text:span><text:span text:style-name="T23">.</text:span><text:span text:style-name="T31">textContent</text:span><text:span text:style-name="T21"> </text:span><text:span text:style-name="T23">=</text:span><text:span text:style-name="T21"> </text:span><text:span text:style-name="T23">"</text:span><text:span text:style-name="T26">Status: Evasive maneuvers halted. Holding position.</text:span><text:span text:style-name="T23">";</text:span></text:p>
            <text:p text:style-name="P18"><text:span text:style-name="T24">    </text:span><text:span text:style-name="T23">}</text:span></text:p>
            <text:p text:style-name="P18"><text:span text:style-name="T23">}</text:span></text:p>
          </draw:text-box>
        </draw:frame>
        <draw:frame draw:style-name="gr28" draw:text-style-name="P20" draw:layer="layout" svg:width="25.083cm" svg:height="52.967cm" svg:x="90.27cm" svg:y="21.185cm">
          <draw:text-box>
            <text:p text:style-name="P18"><text:span text:style-name="T20">class</text:span><text:span text:style-name="T21"> </text:span><text:span text:style-name="T22">EvasionComponent</text:span><text:span text:style-name="T21"> </text:span></text:p>
            <text:p text:style-name="P18"><text:span text:style-name="T23">{</text:span></text:p>
            <text:p text:style-name="P18"><text:span text:style-name="T24">    </text:span><text:span text:style-name="T20">constructor</text:span><text:span text:style-name="T23">(</text:span><text:span text:style-name="T25">targetId</text:span><text:span text:style-name="T23">,</text:span><text:span text:style-name="T21"> </text:span><text:span text:style-name="T25">speed</text:span><text:span text:style-name="T23">,</text:span><text:span text:style-name="T21"> </text:span><text:span text:style-name="T25">maxDistance</text:span><text:span text:style-name="T23">)</text:span><text:span text:style-name="T21"> </text:span></text:p>
            <text:p text:style-name="P18"><text:span text:style-name="T24">    </text:span><text:span text:style-name="T23">{</text:span></text:p>
            <text:p text:style-name="P18"><text:span text:style-name="T28">        </text:span><text:span text:style-name="T29">// Data injected from the Container (The Drone)</text:span></text:p>
            <text:p text:style-name="P18"><text:span text:style-name="T24">        </text:span><text:span text:style-name="T27">this</text:span><text:span text:style-name="T23">.</text:span><text:span text:style-name="T25">targetId</text:span><text:span text:style-name="T21"> </text:span><text:span text:style-name="T23">=</text:span><text:span text:style-name="T21"> </text:span><text:span text:style-name="T25">targetId</text:span><text:span text:style-name="T23">;</text:span></text:p>
            <text:p text:style-name="P18"><text:span text:style-name="T24">        </text:span><text:span text:style-name="T27">this</text:span><text:span text:style-name="T23">.</text:span><text:span text:style-name="T25">speed</text:span><text:span text:style-name="T21"> </text:span><text:span text:style-name="T23">=</text:span><text:span text:style-name="T21"> </text:span><text:span text:style-name="T25">speed</text:span><text:span text:style-name="T23">;</text:span></text:p>
            <text:p text:style-name="P18"><text:span text:style-name="T24">        </text:span><text:span text:style-name="T27">this</text:span><text:span text:style-name="T23">.</text:span><text:span text:style-name="T25">maxDistance</text:span><text:span text:style-name="T21"> </text:span><text:span text:style-name="T23">=</text:span><text:span text:style-name="T21"> </text:span><text:span text:style-name="T25">maxDistance</text:span><text:span text:style-name="T23">;</text:span></text:p>
            <text:p text:style-name="P19"/>
            <text:p text:style-name="P18"><text:span text:style-name="T28">        </text:span><text:span text:style-name="T29">// Internal state data</text:span></text:p>
            <text:p text:style-name="P18"><text:span text:style-name="T24">        </text:span><text:span text:style-name="T27">this</text:span><text:span text:style-name="T23">.</text:span><text:span text:style-name="T25">direction</text:span><text:span text:style-name="T21"> </text:span><text:span text:style-name="T23">=</text:span><text:span text:style-name="T21"> </text:span><text:span text:style-name="T26">1</text:span><text:span text:style-name="T23">;</text:span><text:span text:style-name="T21">  </text:span><text:span text:style-name="T29">// 1 moves right, -1 moves left</text:span></text:p>
            <text:p text:style-name="P18"><text:span text:style-name="T24">        </text:span><text:span text:style-name="T27">this</text:span><text:span text:style-name="T23">.</text:span><text:span text:style-name="T25">startX</text:span><text:span text:style-name="T21"> </text:span><text:span text:style-name="T23">=</text:span><text:span text:style-name="T21"> </text:span><text:span text:style-name="T27">null</text:span><text:span text:style-name="T23">;</text:span><text:span text:style-name="T21">  </text:span><text:span text:style-name="T29">// Will record the starting position</text:span></text:p>
            <text:p text:style-name="P18"><text:span text:style-name="T24">        </text:span><text:span text:style-name="T27">this</text:span><text:span text:style-name="T23">.</text:span><text:span text:style-name="T25">isInitialized</text:span><text:span text:style-name="T21"> </text:span><text:span text:style-name="T23">=</text:span><text:span text:style-name="T21"> </text:span><text:span text:style-name="T27">false</text:span><text:span text:style-name="T23">;</text:span><text:span text:style-name="T21"> </text:span></text:p>
            <text:p text:style-name="P18"><text:span text:style-name="T24">    </text:span><text:span text:style-name="T23">}</text:span></text:p>
            <text:p text:style-name="P19"/>
            <text:p text:style-name="P18"><text:span text:style-name="T24">    </text:span><text:span text:style-name="T30">update</text:span><text:span text:style-name="T23">()</text:span><text:span text:style-name="T21"> </text:span></text:p>
            <text:p text:style-name="P18"><text:span text:style-name="T24">    </text:span><text:span text:style-name="T23">{</text:span></text:p>
            <text:p text:style-name="P18"><text:span text:style-name="T24">        </text:span><text:span text:style-name="T20">let</text:span><text:span text:style-name="T21"> </text:span><text:span text:style-name="T25">el</text:span><text:span text:style-name="T21"> </text:span><text:span text:style-name="T23">=</text:span><text:span text:style-name="T21"> </text:span><text:span text:style-name="T30">ge</text:span><text:span text:style-name="T21">(</text:span><text:span text:style-name="T27">this</text:span><text:span text:style-name="T23">.</text:span><text:span text:style-name="T25">targetId</text:span><text:span text:style-name="T21">)</text:span><text:span text:style-name="T23">;</text:span></text:p>
            <text:p text:style-name="P18"><text:span text:style-name="T24">        </text:span><text:span text:style-name="T32">if</text:span><text:span text:style-name="T21"> (!</text:span><text:span text:style-name="T25">el</text:span><text:span text:style-name="T21">) </text:span><text:span text:style-name="T32">return</text:span><text:span text:style-name="T23">;</text:span></text:p>
            <text:p text:style-name="P19"/>
            <text:p text:style-name="P18"><text:span text:style-name="T24">        </text:span><text:span text:style-name="T20">let</text:span><text:span text:style-name="T21"> </text:span><text:span text:style-name="T25">rect</text:span><text:span text:style-name="T21"> </text:span><text:span text:style-name="T23">=</text:span><text:span text:style-name="T21"> </text:span><text:span text:style-name="T25">el</text:span><text:span text:style-name="T23">.</text:span><text:span text:style-name="T30">getBoundingClientRect</text:span><text:span text:style-name="T21">()</text:span><text:span text:style-name="T23">;</text:span><text:span text:style-name="T21"> </text:span></text:p>
            <text:p text:style-name="P19"/>
            <text:p text:style-name="P18"><text:span text:style-name="T28">        </text:span><text:span text:style-name="T29">// Lock in the starting position on the very first frame</text:span></text:p>
            <text:p text:style-name="P18"><text:span text:style-name="T24">        </text:span><text:span text:style-name="T32">if</text:span><text:span text:style-name="T21"> (!</text:span><text:span text:style-name="T27">this</text:span><text:span text:style-name="T23">.</text:span><text:span text:style-name="T25">isInitialized</text:span><text:span text:style-name="T21">) </text:span></text:p>
            <text:p text:style-name="P18"><text:span text:style-name="T24">        </text:span><text:span text:style-name="T23">{</text:span></text:p>
            <text:p text:style-name="P18"><text:span text:style-name="T24">            </text:span><text:span text:style-name="T27">this</text:span><text:span text:style-name="T23">.</text:span><text:span text:style-name="T25">startX</text:span><text:span text:style-name="T21"> </text:span><text:span text:style-name="T23">=</text:span><text:span text:style-name="T21"> </text:span><text:span text:style-name="T25">rect</text:span><text:span text:style-name="T23">.</text:span><text:span text:style-name="T31">left</text:span><text:span text:style-name="T23">;</text:span></text:p>
            <text:p text:style-name="P18"><text:span text:style-name="T24">            </text:span><text:span text:style-name="T27">this</text:span><text:span text:style-name="T23">.</text:span><text:span text:style-name="T25">isInitialized</text:span><text:span text:style-name="T21"> </text:span><text:span text:style-name="T23">=</text:span><text:span text:style-name="T21"> </text:span><text:span text:style-name="T27">true</text:span><text:span text:style-name="T23">;</text:span></text:p>
            <text:p text:style-name="P18"><text:span text:style-name="T24">        </text:span><text:span text:style-name="T23">}</text:span></text:p>
            <text:p text:style-name="P19"/>
            <text:p text:style-name="P18"><text:span text:style-name="T28">        </text:span><text:span text:style-name="T29">// Calculate how far the drone has traveled from its origin</text:span></text:p>
            <text:p text:style-name="P18"><text:span text:style-name="T24">        </text:span><text:span text:style-name="T20">let</text:span><text:span text:style-name="T21"> </text:span><text:span text:style-name="T25">distanceTraveled</text:span><text:span text:style-name="T21"> </text:span><text:span text:style-name="T23">=</text:span><text:span text:style-name="T21"> </text:span><text:span text:style-name="T25">rect</text:span><text:span text:style-name="T23">.</text:span><text:span text:style-name="T31">left</text:span><text:span text:style-name="T21"> - </text:span><text:span text:style-name="T27">this</text:span><text:span text:style-name="T23">.</text:span><text:span text:style-name="T25">startX</text:span><text:span text:style-name="T23">;</text:span></text:p>
            <text:p text:style-name="P19"/>
            <text:p text:style-name="P18"><text:span text:style-name="T28">        </text:span><text:span text:style-name="T29">// If it moved too far right, flip direction to negative (left)</text:span></text:p>
            <text:p text:style-name="P18"><text:span text:style-name="T24">        </text:span><text:span text:style-name="T32">if</text:span><text:span text:style-name="T21"> (</text:span><text:span text:style-name="T25">distanceTraveled</text:span><text:span text:style-name="T21"> &gt;= </text:span><text:span text:style-name="T27">this</text:span><text:span text:style-name="T23">.</text:span><text:span text:style-name="T25">maxDistance</text:span><text:span text:style-name="T21">) </text:span></text:p>
            <text:p text:style-name="P18"><text:span text:style-name="T24">        </text:span><text:span text:style-name="T23">{</text:span></text:p>
            <text:p text:style-name="P18"><text:span text:style-name="T24">            </text:span><text:span text:style-name="T27">this</text:span><text:span text:style-name="T23">.</text:span><text:span text:style-name="T25">direction</text:span><text:span text:style-name="T21"> </text:span><text:span text:style-name="T23">=</text:span><text:span text:style-name="T21"> -</text:span><text:span text:style-name="T26">1</text:span><text:span text:style-name="T23">;</text:span></text:p>
            <text:p text:style-name="P18"><text:span text:style-name="T24">        </text:span><text:span text:style-name="T23">}</text:span></text:p>
            <text:p text:style-name="P18"><text:span text:style-name="T28">        </text:span><text:span text:style-name="T29">// If it made it back to the start, flip direction to positive (right)</text:span></text:p>
            <text:p text:style-name="P18"><text:span text:style-name="T24">        </text:span><text:span text:style-name="T32">else</text:span><text:span text:style-name="T21"> </text:span><text:span text:style-name="T32">if</text:span><text:span text:style-name="T21"> (</text:span><text:span text:style-name="T25">distanceTraveled</text:span><text:span text:style-name="T21"> &lt;= </text:span><text:span text:style-name="T26">0</text:span><text:span text:style-name="T21">) </text:span></text:p>
            <text:p text:style-name="P18"><text:span text:style-name="T24">        </text:span><text:span text:style-name="T23">{</text:span></text:p>
            <text:p text:style-name="P18"><text:span text:style-name="T24">            </text:span><text:span text:style-name="T27">this</text:span><text:span text:style-name="T23">.</text:span><text:span text:style-name="T25">direction</text:span><text:span text:style-name="T21"> </text:span><text:span text:style-name="T23">=</text:span><text:span text:style-name="T21"> </text:span><text:span text:style-name="T26">1</text:span><text:span text:style-name="T23">;</text:span></text:p>
            <text:p text:style-name="P18"><text:span text:style-name="T24">        </text:span><text:span text:style-name="T23">}</text:span></text:p>
            <text:p text:style-name="P19"/>
            <text:p text:style-name="P18"><text:span text:style-name="T28">        </text:span><text:span text:style-name="T29">// Apply the speed and direction to the exact current position</text:span></text:p>
            <text:p text:style-name="P18"><text:span text:style-name="T24">        </text:span><text:span text:style-name="T20">let</text:span><text:span text:style-name="T21"> </text:span><text:span text:style-name="T25">newX</text:span><text:span text:style-name="T21"> </text:span><text:span text:style-name="T23">=</text:span><text:span text:style-name="T21"> </text:span><text:span text:style-name="T25">rect</text:span><text:span text:style-name="T23">.</text:span><text:span text:style-name="T31">left</text:span><text:span text:style-name="T21"> + (</text:span><text:span text:style-name="T27">this</text:span><text:span text:style-name="T23">.</text:span><text:span text:style-name="T25">speed</text:span><text:span text:style-name="T21"> * </text:span><text:span text:style-name="T27">this</text:span><text:span text:style-name="T23">.</text:span><text:span text:style-name="T25">direction</text:span><text:span text:style-name="T21">)</text:span><text:span text:style-name="T23">;</text:span></text:p>
            <text:p text:style-name="P18"><text:span text:style-name="T24">        </text:span><text:span text:style-name="T25">el</text:span><text:span text:style-name="T23">.</text:span><text:span text:style-name="T31">style</text:span><text:span text:style-name="T23">.</text:span><text:span text:style-name="T31">left</text:span><text:span text:style-name="T21"> </text:span><text:span text:style-name="T23">=</text:span><text:span text:style-name="T21"> </text:span><text:span text:style-name="T25">newX</text:span><text:span text:style-name="T21"> + </text:span><text:span text:style-name="T23">"</text:span><text:span text:style-name="T26">px</text:span><text:span text:style-name="T23">";</text:span></text:p>
            <text:p text:style-name="P18"><text:span text:style-name="T24">    </text:span><text:span text:style-name="T23">}</text:span></text:p>
            <text:p text:style-name="P18"><text:span text:style-name="T23">}</text:span></text:p>
          </draw:text-box>
        </draw:frame>
        <draw:frame draw:style-name="gr29" draw:text-style-name="P21" draw:layer="layout" svg:width="16.475cm" svg:height="27.802cm" svg:x="29.187cm" svg:y="21.185cm">
          <draw:text-box>
            <text:p text:style-name="P18"><text:span text:style-name="T20">class</text:span><text:span text:style-name="T34"> </text:span><text:span text:style-name="T22">LocationComponent</text:span></text:p>
            <text:p text:style-name="P18"><text:span text:style-name="T23">{</text:span></text:p>
            <text:p text:style-name="P18"><text:span text:style-name="T35">    </text:span><text:span text:style-name="T20">constructor</text:span><text:span text:style-name="T23">(</text:span><text:span text:style-name="T34">elementId</text:span><text:span text:style-name="T23">,</text:span><text:span text:style-name="T34"> startX</text:span><text:span text:style-name="T23">,</text:span><text:span text:style-name="T34"> startY</text:span><text:span text:style-name="T23">)</text:span></text:p>
            <text:p text:style-name="P18"><text:span text:style-name="T36">    </text:span><text:span text:style-name="T23">{</text:span></text:p>
            <text:p text:style-name="P18"><text:span text:style-name="T36">        </text:span><text:span text:style-name="T27">this</text:span><text:span text:style-name="T23">.</text:span><text:span text:style-name="T25">element</text:span><text:span text:style-name="T34"> </text:span><text:span text:style-name="T23">=</text:span><text:span text:style-name="T34"> </text:span><text:span text:style-name="T30">ge</text:span><text:span text:style-name="T23">(</text:span><text:span text:style-name="T25">elementId</text:span><text:span text:style-name="T23">);</text:span></text:p>
            <text:p text:style-name="P18"><text:span text:style-name="T36">        </text:span><text:span text:style-name="T27">this</text:span><text:span text:style-name="T23">.</text:span><text:span text:style-name="T25">x</text:span><text:span text:style-name="T34"> </text:span><text:span text:style-name="T23">=</text:span><text:span text:style-name="T34"> </text:span><text:span text:style-name="T25">startX</text:span><text:span text:style-name="T23">;</text:span></text:p>
            <text:p text:style-name="P18"><text:span text:style-name="T36">        </text:span><text:span text:style-name="T27">this</text:span><text:span text:style-name="T23">.</text:span><text:span text:style-name="T25">y</text:span><text:span text:style-name="T34"> </text:span><text:span text:style-name="T23">=</text:span><text:span text:style-name="T34"> </text:span><text:span text:style-name="T25">startY</text:span><text:span text:style-name="T23">;</text:span></text:p>
            <text:p text:style-name="P19"/>
            <text:p text:style-name="P18"><text:span text:style-name="T28">        </text:span><text:span text:style-name="T29">// set the starting position in the DOM</text:span></text:p>
            <text:p text:style-name="P18"><text:span text:style-name="T36">        </text:span><text:span text:style-name="T27">this</text:span><text:span text:style-name="T23">.</text:span><text:span text:style-name="T25">element</text:span><text:span text:style-name="T23">.</text:span><text:span text:style-name="T25">style</text:span><text:span text:style-name="T23">.</text:span><text:span text:style-name="T25">left</text:span><text:span text:style-name="T34"> </text:span><text:span text:style-name="T23">=</text:span><text:span text:style-name="T34"> </text:span><text:span text:style-name="T27">this</text:span><text:span text:style-name="T23">.</text:span><text:span text:style-name="T25">x</text:span><text:span text:style-name="T34"> </text:span><text:span text:style-name="T21">+</text:span><text:span text:style-name="T34"> </text:span><text:span text:style-name="T23">"</text:span><text:span text:style-name="T26">px</text:span><text:span text:style-name="T23">";</text:span></text:p>
            <text:p text:style-name="P18"><text:span text:style-name="T36">        </text:span><text:span text:style-name="T27">this</text:span><text:span text:style-name="T23">.</text:span><text:span text:style-name="T25">element</text:span><text:span text:style-name="T23">.</text:span><text:span text:style-name="T25">style</text:span><text:span text:style-name="T23">.</text:span><text:span text:style-name="T25">top</text:span><text:span text:style-name="T34"> </text:span><text:span text:style-name="T23">=</text:span><text:span text:style-name="T34"> </text:span><text:span text:style-name="T27">this</text:span><text:span text:style-name="T23">.</text:span><text:span text:style-name="T25">y</text:span><text:span text:style-name="T34"> </text:span><text:span text:style-name="T21">+</text:span><text:span text:style-name="T34"> </text:span><text:span text:style-name="T23">"</text:span><text:span text:style-name="T26">px</text:span><text:span text:style-name="T23">";</text:span></text:p>
            <text:p text:style-name="P18"><text:span text:style-name="T36">    </text:span><text:span text:style-name="T23">}</text:span></text:p>
            <text:p text:style-name="P19"/>
            <text:p text:style-name="P18"><text:span text:style-name="T36">    </text:span><text:span text:style-name="T30">moveLeft</text:span><text:span text:style-name="T23">()</text:span></text:p>
            <text:p text:style-name="P18"><text:span text:style-name="T36">    </text:span><text:span text:style-name="T23">{</text:span></text:p>
            <text:p text:style-name="P18"><text:span text:style-name="T36">        </text:span><text:span text:style-name="T27">this</text:span><text:span text:style-name="T23">.</text:span><text:span text:style-name="T25">x</text:span><text:span text:style-name="T34"> </text:span><text:span text:style-name="T23">-=</text:span><text:span text:style-name="T34"> </text:span><text:span text:style-name="T26">50</text:span><text:span text:style-name="T23">;</text:span></text:p>
            <text:p text:style-name="P18"><text:span text:style-name="T36">        </text:span><text:span text:style-name="T27">this</text:span><text:span text:style-name="T23">.</text:span><text:span text:style-name="T25">element</text:span><text:span text:style-name="T23">.</text:span><text:span text:style-name="T25">style</text:span><text:span text:style-name="T23">.</text:span><text:span text:style-name="T25">left</text:span><text:span text:style-name="T34"> </text:span><text:span text:style-name="T23">=</text:span><text:span text:style-name="T34"> </text:span><text:span text:style-name="T27">this</text:span><text:span text:style-name="T23">.</text:span><text:span text:style-name="T25">x</text:span><text:span text:style-name="T34"> </text:span><text:span text:style-name="T21">+</text:span><text:span text:style-name="T34"> </text:span><text:span text:style-name="T23">"</text:span><text:span text:style-name="T26">px</text:span><text:span text:style-name="T23">";</text:span></text:p>
            <text:p text:style-name="P18"><text:span text:style-name="T36">    </text:span><text:span text:style-name="T23">}</text:span></text:p>
            <text:p text:style-name="P19"/>
            <text:p text:style-name="P18"><text:span text:style-name="T36">    </text:span><text:span text:style-name="T30">moveRight</text:span><text:span text:style-name="T23">()</text:span></text:p>
            <text:p text:style-name="P18"><text:span text:style-name="T36">    </text:span><text:span text:style-name="T23">{</text:span></text:p>
            <text:p text:style-name="P18"><text:span text:style-name="T36">        </text:span><text:span text:style-name="T27">this</text:span><text:span text:style-name="T23">.</text:span><text:span text:style-name="T25">x</text:span><text:span text:style-name="T34"> </text:span><text:span text:style-name="T23">+=</text:span><text:span text:style-name="T34"> </text:span><text:span text:style-name="T26">50</text:span><text:span text:style-name="T23">;</text:span></text:p>
            <text:p text:style-name="P18"><text:span text:style-name="T36">        </text:span><text:span text:style-name="T27">this</text:span><text:span text:style-name="T23">.</text:span><text:span text:style-name="T25">element</text:span><text:span text:style-name="T23">.</text:span><text:span text:style-name="T25">style</text:span><text:span text:style-name="T23">.</text:span><text:span text:style-name="T25">left</text:span><text:span text:style-name="T34"> </text:span><text:span text:style-name="T23">=</text:span><text:span text:style-name="T34"> </text:span><text:span text:style-name="T27">this</text:span><text:span text:style-name="T23">.</text:span><text:span text:style-name="T25">x</text:span><text:span text:style-name="T34"> </text:span><text:span text:style-name="T21">+</text:span><text:span text:style-name="T34"> </text:span><text:span text:style-name="T23">"</text:span><text:span text:style-name="T26">px</text:span><text:span text:style-name="T23">";</text:span></text:p>
            <text:p text:style-name="P18"><text:span text:style-name="T36">    </text:span><text:span text:style-name="T23">}</text:span></text:p>
            <text:p text:style-name="P18"><text:span text:style-name="T23">}</text:span></text:p>
          </draw:text-box>
        </draw:frame>
        <draw:frame draw:style-name="gr30" draw:text-style-name="P21" draw:layer="layout" svg:width="20.243cm" svg:height="22.405cm" svg:x="47.031cm" svg:y="21.185cm">
          <draw:text-box>
            <text:p text:style-name="P18"><text:span text:style-name="T20">class</text:span><text:span text:style-name="T21"> </text:span><text:span text:style-name="T22">LEDComponent</text:span></text:p>
            <text:p text:style-name="P18"><text:span text:style-name="T23">{</text:span></text:p>
            <text:p text:style-name="P18"><text:span text:style-name="T24">    </text:span><text:span text:style-name="T20">constructor</text:span><text:span text:style-name="T23">(</text:span><text:span text:style-name="T25">elementId</text:span><text:span text:style-name="T23">)</text:span></text:p>
            <text:p text:style-name="P18"><text:span text:style-name="T24">    </text:span><text:span text:style-name="T23">{</text:span></text:p>
            <text:p text:style-name="P18"><text:span text:style-name="T24">        </text:span><text:span text:style-name="T27">this</text:span><text:span text:style-name="T23">.</text:span><text:span text:style-name="T25">element</text:span><text:span text:style-name="T21"> </text:span><text:span text:style-name="T23">=</text:span><text:span text:style-name="T21"> </text:span><text:span text:style-name="T30">ge</text:span><text:span text:style-name="T21">(</text:span><text:span text:style-name="T25">elementId</text:span><text:span text:style-name="T21">)</text:span><text:span text:style-name="T23">;</text:span></text:p>
            <text:p text:style-name="P18"><text:span text:style-name="T24">    </text:span><text:span text:style-name="T23">}</text:span></text:p>
            <text:p text:style-name="P19"/>
            <text:p text:style-name="P18"><text:span text:style-name="T24">    </text:span><text:span text:style-name="T30">setColor</text:span><text:span text:style-name="T23">(</text:span><text:span text:style-name="T25">newColor</text:span><text:span text:style-name="T23">)</text:span></text:p>
            <text:p text:style-name="P18"><text:span text:style-name="T24">    </text:span><text:span text:style-name="T23">{</text:span></text:p>
            <text:p text:style-name="P18"><text:span text:style-name="T24">        </text:span><text:span text:style-name="T27">this</text:span><text:span text:style-name="T23">.</text:span><text:span text:style-name="T25">element</text:span><text:span text:style-name="T23">.</text:span><text:span text:style-name="T31">style</text:span><text:span text:style-name="T23">.</text:span><text:span text:style-name="T31">backgroundColor</text:span><text:span text:style-name="T21"> </text:span><text:span text:style-name="T23">=</text:span><text:span text:style-name="T21"> </text:span><text:span text:style-name="T25">newColor</text:span><text:span text:style-name="T23">;</text:span></text:p>
            <text:p text:style-name="P18"><text:span text:style-name="T24">    </text:span><text:span text:style-name="T23">}</text:span></text:p>
            <text:p text:style-name="P19"/>
            <text:p text:style-name="P18"><text:span text:style-name="T24">    </text:span><text:span text:style-name="T30">randomColor</text:span><text:span text:style-name="T23">()</text:span></text:p>
            <text:p text:style-name="P18"><text:span text:style-name="T24">    </text:span><text:span text:style-name="T23">{</text:span></text:p>
            <text:p text:style-name="P18"><text:span text:style-name="T24">        </text:span><text:span text:style-name="T20">let</text:span><text:span text:style-name="T21"> </text:span><text:span text:style-name="T25">r</text:span><text:span text:style-name="T21"> </text:span><text:span text:style-name="T23">=</text:span><text:span text:style-name="T21"> </text:span><text:span text:style-name="T31">Math</text:span><text:span text:style-name="T23">.</text:span><text:span text:style-name="T30">floor</text:span><text:span text:style-name="T21">(</text:span><text:span text:style-name="T31">Math</text:span><text:span text:style-name="T23">.</text:span><text:span text:style-name="T30">random</text:span><text:span text:style-name="T21">() * </text:span><text:span text:style-name="T26">255</text:span><text:span text:style-name="T21">)</text:span><text:span text:style-name="T23">;</text:span></text:p>
            <text:p text:style-name="P18"><text:span text:style-name="T24">        </text:span><text:span text:style-name="T20">let</text:span><text:span text:style-name="T21"> </text:span><text:span text:style-name="T25">g</text:span><text:span text:style-name="T21"> </text:span><text:span text:style-name="T23">=</text:span><text:span text:style-name="T21"> </text:span><text:span text:style-name="T31">Math</text:span><text:span text:style-name="T23">.</text:span><text:span text:style-name="T30">floor</text:span><text:span text:style-name="T21">(</text:span><text:span text:style-name="T31">Math</text:span><text:span text:style-name="T23">.</text:span><text:span text:style-name="T30">random</text:span><text:span text:style-name="T21">() * </text:span><text:span text:style-name="T26">255</text:span><text:span text:style-name="T21">)</text:span><text:span text:style-name="T23">;</text:span></text:p>
            <text:p text:style-name="P18"><text:span text:style-name="T24">        </text:span><text:span text:style-name="T20">let</text:span><text:span text:style-name="T21"> </text:span><text:span text:style-name="T25">b</text:span><text:span text:style-name="T21"> </text:span><text:span text:style-name="T23">=</text:span><text:span text:style-name="T21"> </text:span><text:span text:style-name="T31">Math</text:span><text:span text:style-name="T23">.</text:span><text:span text:style-name="T30">floor</text:span><text:span text:style-name="T21">(</text:span><text:span text:style-name="T31">Math</text:span><text:span text:style-name="T23">.</text:span><text:span text:style-name="T30">random</text:span><text:span text:style-name="T21">() * </text:span><text:span text:style-name="T26">255</text:span><text:span text:style-name="T21">)</text:span><text:span text:style-name="T23">;</text:span></text:p>
            <text:p text:style-name="P18"><text:span text:style-name="T24">        </text:span><text:span text:style-name="T27">this</text:span><text:span text:style-name="T23">.</text:span><text:span text:style-name="T30">setColor</text:span><text:span text:style-name="T21">(</text:span><text:span text:style-name="T23">`</text:span><text:span text:style-name="T26">rgb(</text:span><text:span text:style-name="T27">${</text:span><text:span text:style-name="T25">r</text:span><text:span text:style-name="T27">}</text:span><text:span text:style-name="T26">, </text:span><text:span text:style-name="T27">${</text:span><text:span text:style-name="T25">g</text:span><text:span text:style-name="T27">}</text:span><text:span text:style-name="T26">, </text:span><text:span text:style-name="T27">${</text:span><text:span text:style-name="T25">b</text:span><text:span text:style-name="T27">}</text:span><text:span text:style-name="T26">)</text:span><text:span text:style-name="T23">`</text:span><text:span text:style-name="T21">)</text:span><text:span text:style-name="T23">;</text:span></text:p>
            <text:p text:style-name="P18"><text:span text:style-name="T24">    </text:span><text:span text:style-name="T23">}</text:span></text:p>
            <text:p text:style-name="P18"><text:span text:style-name="T23">}</text:span></text:p>
          </draw:text-box>
        </draw:frame>
        <draw:frame draw:style-name="gr31" draw:text-style-name="P21" draw:layer="layout" svg:width="20.135cm" svg:height="39.867cm" svg:x="68.672cm" svg:y="21.185cm">
          <draw:text-box>
            <text:p text:style-name="P18"><text:span text:style-name="T20">class</text:span><text:span text:style-name="T21"> </text:span><text:span text:style-name="T22">DistanceComponent</text:span></text:p>
            <text:p text:style-name="P18"><text:span text:style-name="T23">{</text:span></text:p>
            <text:p text:style-name="P18"><text:span text:style-name="T24">    </text:span><text:span text:style-name="T20">constructor</text:span><text:span text:style-name="T23">(</text:span><text:span text:style-name="T25">elementId</text:span><text:span text:style-name="T23">,</text:span><text:span text:style-name="T21"> </text:span><text:span text:style-name="T25">originX</text:span><text:span text:style-name="T21"> </text:span><text:span text:style-name="T23">=</text:span><text:span text:style-name="T21"> </text:span><text:span text:style-name="T26">0</text:span><text:span text:style-name="T23">,</text:span><text:span text:style-name="T21"> </text:span><text:span text:style-name="T25">originY</text:span><text:span text:style-name="T21"> </text:span><text:span text:style-name="T23">=</text:span><text:span text:style-name="T21"> </text:span><text:span text:style-name="T26">0</text:span><text:span text:style-name="T23">)</text:span></text:p>
            <text:p text:style-name="P18"><text:span text:style-name="T24">    </text:span><text:span text:style-name="T23">{</text:span></text:p>
            <text:p text:style-name="P18"><text:span text:style-name="T24">        </text:span><text:span text:style-name="T27">this</text:span><text:span text:style-name="T23">.</text:span><text:span text:style-name="T25">elementId</text:span><text:span text:style-name="T21"> </text:span><text:span text:style-name="T23">=</text:span><text:span text:style-name="T21"> </text:span><text:span text:style-name="T25">elementId</text:span><text:span text:style-name="T23">;</text:span></text:p>
            <text:p text:style-name="P19"/>
            <text:p text:style-name="P18"><text:span text:style-name="T28">        </text:span><text:span text:style-name="T29">// The anchor point we are measuring from</text:span></text:p>
            <text:p text:style-name="P18"><text:span text:style-name="T24">        </text:span><text:span text:style-name="T27">this</text:span><text:span text:style-name="T23">.</text:span><text:span text:style-name="T25">originX</text:span><text:span text:style-name="T21"> </text:span><text:span text:style-name="T23">=</text:span><text:span text:style-name="T21"> </text:span><text:span text:style-name="T25">originX</text:span><text:span text:style-name="T23">;</text:span></text:p>
            <text:p text:style-name="P18"><text:span text:style-name="T24">        </text:span><text:span text:style-name="T27">this</text:span><text:span text:style-name="T23">.</text:span><text:span text:style-name="T25">originY</text:span><text:span text:style-name="T21"> </text:span><text:span text:style-name="T23">=</text:span><text:span text:style-name="T21"> </text:span><text:span text:style-name="T25">originY</text:span><text:span text:style-name="T23">;</text:span></text:p>
            <text:p text:style-name="P18"><text:span text:style-name="T24">    </text:span><text:span text:style-name="T23">}</text:span></text:p>
            <text:p text:style-name="P19"/>
            <text:p text:style-name="P18"><text:span text:style-name="T28">    </text:span><text:span text:style-name="T29">// asks the DOM for position, returns the math</text:span></text:p>
            <text:p text:style-name="P18"><text:span text:style-name="T24">    </text:span><text:span text:style-name="T30">getDistanceFromOrigin</text:span><text:span text:style-name="T23">()</text:span></text:p>
            <text:p text:style-name="P18"><text:span text:style-name="T24">    </text:span><text:span text:style-name="T23">{</text:span></text:p>
            <text:p text:style-name="P18"><text:span text:style-name="T28">        </text:span><text:span text:style-name="T29">// Uses our shortcut to get the physical DOM rect</text:span></text:p>
            <text:p text:style-name="P18"><text:span text:style-name="T24">        </text:span><text:span text:style-name="T20">let</text:span><text:span text:style-name="T21"> </text:span><text:span text:style-name="T25">rect</text:span><text:span text:style-name="T21"> </text:span><text:span text:style-name="T23">=</text:span><text:span text:style-name="T21"> </text:span><text:span text:style-name="T30">gr</text:span><text:span text:style-name="T21">(</text:span><text:span text:style-name="T27">this</text:span><text:span text:style-name="T23">.</text:span><text:span text:style-name="T25">elementId</text:span><text:span text:style-name="T21">)</text:span><text:span text:style-name="T23">;</text:span><text:span text:style-name="T21"> </text:span></text:p>
            <text:p text:style-name="P18"><text:span text:style-name="T24">        </text:span></text:p>
            <text:p text:style-name="P18"><text:span text:style-name="T28">        </text:span><text:span text:style-name="T29">// Calculate the difference between current position and origin</text:span></text:p>
            <text:p text:style-name="P18"><text:span text:style-name="T24">        </text:span><text:span text:style-name="T20">let</text:span><text:span text:style-name="T21"> </text:span><text:span text:style-name="T25">diffX</text:span><text:span text:style-name="T21"> </text:span><text:span text:style-name="T23">=</text:span><text:span text:style-name="T21"> </text:span><text:span text:style-name="T31">Math</text:span><text:span text:style-name="T23">.</text:span><text:span text:style-name="T30">abs</text:span><text:span text:style-name="T21">(</text:span><text:span text:style-name="T25">rect</text:span><text:span text:style-name="T23">.</text:span><text:span text:style-name="T31">x</text:span><text:span text:style-name="T21"> - </text:span><text:span text:style-name="T27">this</text:span><text:span text:style-name="T23">.</text:span><text:span text:style-name="T25">originX</text:span><text:span text:style-name="T21">)</text:span><text:span text:style-name="T23">;</text:span></text:p>
            <text:p text:style-name="P18"><text:span text:style-name="T24">        </text:span><text:span text:style-name="T20">let</text:span><text:span text:style-name="T21"> </text:span><text:span text:style-name="T25">diffY</text:span><text:span text:style-name="T21"> </text:span><text:span text:style-name="T23">=</text:span><text:span text:style-name="T21"> </text:span><text:span text:style-name="T31">Math</text:span><text:span text:style-name="T23">.</text:span><text:span text:style-name="T30">abs</text:span><text:span text:style-name="T21">(</text:span><text:span text:style-name="T25">rect</text:span><text:span text:style-name="T23">.</text:span><text:span text:style-name="T31">y</text:span><text:span text:style-name="T21"> - </text:span><text:span text:style-name="T27">this</text:span><text:span text:style-name="T23">.</text:span><text:span text:style-name="T25">originY</text:span><text:span text:style-name="T21">)</text:span><text:span text:style-name="T23">;</text:span></text:p>
            <text:p text:style-name="P19"/>
            <text:p text:style-name="P18"><text:span text:style-name="T28">        </text:span><text:span text:style-name="T29">// Calculate the true straight-line distance (Radial)</text:span></text:p>
            <text:p text:style-name="P18"><text:span text:style-name="T24">        </text:span><text:span text:style-name="T20">let</text:span><text:span text:style-name="T21"> </text:span><text:span text:style-name="T25">radialDistance</text:span><text:span text:style-name="T21"> </text:span><text:span text:style-name="T23">=</text:span><text:span text:style-name="T21"> </text:span><text:span text:style-name="T31">Math</text:span><text:span text:style-name="T23">.</text:span><text:span text:style-name="T30">floor</text:span><text:span text:style-name="T21">(</text:span><text:span text:style-name="T31">Math</text:span><text:span text:style-name="T23">.</text:span><text:span text:style-name="T30">sqrt</text:span><text:span text:style-name="T21">((</text:span><text:span text:style-name="T25">diffX</text:span><text:span text:style-name="T21"> * </text:span><text:span text:style-name="T25">diffX</text:span><text:span text:style-name="T21">) + (</text:span><text:span text:style-name="T25">diffY</text:span><text:span text:style-name="T21"> * </text:span><text:span text:style-name="T25">diffY</text:span><text:span text:style-name="T21">)))</text:span><text:span text:style-name="T23">;</text:span></text:p>
            <text:p text:style-name="P19"/>
            <text:p text:style-name="P18"><text:span text:style-name="T24">        </text:span><text:span text:style-name="T32">return</text:span><text:span text:style-name="T21"> </text:span><text:span text:style-name="T23">{</text:span><text:span text:style-name="T21"> </text:span></text:p>
            <text:p text:style-name="P18"><text:span text:style-name="T24">            </text:span><text:span text:style-name="T25">x</text:span><text:span text:style-name="T23">:</text:span><text:span text:style-name="T21"> </text:span><text:span text:style-name="T25">diffX</text:span><text:span text:style-name="T23">,</text:span><text:span text:style-name="T21"> </text:span></text:p>
            <text:p text:style-name="P18"><text:span text:style-name="T24">            </text:span><text:span text:style-name="T25">y</text:span><text:span text:style-name="T23">:</text:span><text:span text:style-name="T21"> </text:span><text:span text:style-name="T25">diffY</text:span><text:span text:style-name="T23">,</text:span><text:span text:style-name="T21"> </text:span></text:p>
            <text:p text:style-name="P18"><text:span text:style-name="T24">            </text:span><text:span text:style-name="T25">total</text:span><text:span text:style-name="T23">:</text:span><text:span text:style-name="T21"> </text:span><text:span text:style-name="T25">radialDistance</text:span><text:span text:style-name="T21"> </text:span></text:p>
            <text:p text:style-name="P18"><text:span text:style-name="T24">        </text:span><text:span text:style-name="T23">};</text:span></text:p>
            <text:p text:style-name="P18"><text:span text:style-name="T24">    </text:span><text:span text:style-name="T23">}</text:span></text:p>
            <text:p text:style-name="P18"><text:span text:style-name="T23">}</text:span></text:p>
          </draw:text-box>
        </draw:frame>
      </draw:page>
      <draw:page draw:name="page2" draw:style-name="dp1" draw:master-page-name="Default">
        <draw:custom-shape draw:style-name="gr32" draw:text-style-name="P1" draw:layer="layout" svg:width="53.808cm" svg:height="20.726cm" svg:x="0.05cm" svg:y="0cm">
          <draw:glue-point draw:id="4" svg:x="2.533cm" svg:y="5.051cm"/>
          <draw:glue-point draw:id="5" svg:x="-2.027cm" svg:y="5.051cm"/>
          <draw:glue-point draw:id="6" svg:x="0.089cm" svg:y="5.00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8.883cm" svg:height="0.924cm" svg:x="7.329cm" svg:y="0.307cm">
          <draw:text-box>
            <text:p><text:span text:style-name="T1">Christopher Andrew Topalian</text:span></text:p>
          </draw:text-box>
        </draw:frame>
        <draw:frame draw:style-name="gr33" draw:text-style-name="P4" draw:layer="layout" svg:width="14.445cm" svg:height="0.924cm" svg:x="7.362cm" svg:y="1.21cm">
          <draw:text-box>
            <text:p text:style-name="P3"><text:span text:style-name="T1">https://github.com/ChristopherAndrewTopalian</text:span></text:p>
          </draw:text-box>
        </draw:frame>
        <draw:frame draw:style-name="gr34" draw:text-style-name="P5" draw:layer="layout" svg:width="7.271cm" svg:height="4.117cm" svg:x="0.388cm" svg:y="0.117cm">
          <draw:text-box>
            <text:p text:style-name="P3"><text:span text:style-name="T2">Component</text:span></text:p>
            <text:p text:style-name="P3"><text:span text:style-name="T2">Based</text:span></text:p>
            <text:p text:style-name="P3"><text:span text:style-name="T2">Architecture</text:span></text:p>
          </draw:text-box>
        </draw:frame>
        <draw:custom-shape draw:style-name="gr5" draw:text-style-name="P1" draw:layer="layout" svg:width="9.41cm" svg:height="15.932cm" svg:x="0.75cm" svg:y="4.27cm">
          <draw:glue-point draw:id="4" svg:x="2.533cm" svg:y="5.051cm"/>
          <draw:glue-point draw:id="5" svg:x="-2.027cm" svg:y="5.051cm"/>
          <draw:glue-point draw:id="6" svg:x="0.089cm" svg:y="5.001cm"/>
          <text:p text:style-name="P6"><text:span text:style-name="T3">Drone</text:span></text:p>
          <text:p text:style-name="P7"><text:span text:style-name="T4">constructor(</text:span><text:span text:style-name="T5">id, startX, startY, speed = 2, maxDistance = 20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8.803cm" svg:height="0.719cm" svg:x="1.054cm" svg:y="6.651cm">
          <text:p text:style-name="P8"><text:span text:style-name="T6">- </text:span><text:span text:style-name="T7">id</text:span><text:span text:style-name="T8">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8.803cm" svg:height="0.826cm" svg:x="1.054cm" svg:y="17.09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9">flyRight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8.803cm" svg:height="0.826cm" svg:x="1.054cm" svg:y="16.136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9">flyLeft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9.805cm" svg:height="5.834cm" svg:x="32.917cm" svg:y="4.273cm">
          <text:p text:style-name="P6"><text:span text:style-name="T3">DistanceComponent</text:span></text:p>
          <text:p text:style-name="P6"><text:span text:style-name="T5">constructor(elementId, originX = 0, originY =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9.463cm" svg:height="0.694cm" svg:x="33.07cm" svg:y="6.671cm">
          <text:p text:style-name="P10"><text:span text:style-name="T11">- </text:span><text:span text:style-name="T12">elementId</text:span><text:span text:style-name="T10">: HTMLElem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212cm" svg:height="6.213cm" svg:x="10.667cm" svg:y="4.26cm">
          <text:p text:style-name="P6"><text:span text:style-name="T3">LocationComponent</text:span></text:p>
          <text:p text:style-name="P6"><text:span text:style-name="T5">constructor(elementId, startX, star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9.898cm" svg:height="4.54cm" svg:x="22.411cm" svg:y="4.262cm">
          <text:p text:style-name="P6"><text:span text:style-name="T3">LEDComponent</text:span></text:p>
          <text:p text:style-name="P6"><text:span text:style-name="T5">constructor(elementId)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9.479cm" svg:height="0.666cm" svg:x="22.625cm" svg:y="5.886cm">
          <text:p text:style-name="P12"><text:span text:style-name="T11">- </text:span><text:span text:style-name="T12">element</text:span><text:span text:style-name="T10">: HTMLElem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9.479cm" svg:height="0.862cm" svg:x="22.625cm" svg:y="6.713cm">
          <text:p text:style-name="P10"><text:span text:style-name="T11">+ </text:span><text:span text:style-name="T13">setColor</text:span><text:span text:style-name="T11">(</text:span><text:span text:style-name="T12">newColor</text:span><text:span text:style-name="T10">: String): void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8.803cm" svg:height="1.439cm" svg:x="1.054cm" svg:y="7.516cm">
          <text:p text:style-name="P14"><text:span text:style-name="T6">- </text:span><text:span text:style-name="T7">location</text:span><text:span text:style-name="T8">: </text:span><text:span text:style-name="T14">LocationComponent</text:span></text:p>
          <text:p text:style-name="P14"><text:span text:style-name="T15">constructor(id, startX, star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5" draw:layer="layout" svg:width="8.803cm" svg:height="1.394cm" svg:x="1.054cm" svg:y="9.107cm">
          <text:p text:style-name="P14"><text:span text:style-name="T6">- </text:span><text:span text:style-name="T7">led</text:span><text:span text:style-name="T8">: </text:span><text:span text:style-name="T14">LEDComponent</text:span></text:p>
          <text:p text:style-name="P14"><text:span text:style-name="T15">constructor(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0.883cm" svg:height="0.68cm" svg:x="10.844cm" svg:y="5.898cm">
          <text:p text:style-name="P10"><text:span text:style-name="T11">- </text:span><text:span text:style-name="T12">element</text:span><text:span text:style-name="T10">: HTMLElem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0.883cm" svg:height="0.853cm" svg:x="10.844cm" svg:y="9.387cm">
          <text:p text:style-name="P8"><text:span text:style-name="T8">+ </text:span><text:span text:style-name="T9">moveRight</text:span><text:span text:style-name="T10">()</text:span><text:span text:style-name="T8">: void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0.883cm" svg:height="0.853cm" svg:x="10.844cm" svg:y="8.373cm">
          <text:p text:style-name="P8"><text:span text:style-name="T8">+ </text:span><text:span text:style-name="T9">moveLeft</text:span><text:span text:style-name="T10">()</text:span><text:span text:style-name="T8">: void</text:span></text:p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0.883cm" svg:height="0.632cm" svg:x="10.844cm" svg:y="6.698cm">
          <text:p text:style-name="P16"><text:span text:style-name="T11">- </text:span><text:span text:style-name="T12">x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10.883cm" svg:height="0.702cm" svg:x="10.844cm" svg:y="7.498cm">
          <text:p text:style-name="P16"><text:span text:style-name="T11">- </text:span><text:span text:style-name="T12">y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8.803cm" svg:height="2.12cm" svg:x="1.054cm" svg:y="10.647cm">
          <text:p text:style-name="P14"><text:span text:style-name="T6">- </text:span><text:span text:style-name="T16">distanceTracker</text:span><text:span text:style-name="T8">: </text:span><text:span text:style-name="T14">DistanceComponent</text:span></text:p>
          <text:p text:style-name="P14"><text:span text:style-name="T15">constructor(id, startX, star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9.476cm" svg:height="0.694cm" svg:x="33.07cm" svg:y="7.516cm">
          <text:p text:style-name="P10"><text:span text:style-name="T11">- </text:span><text:span text:style-name="T17">originX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33.07cm" svg:y="8.362cm">
          <text:p text:style-name="P10"><text:span text:style-name="T11">- </text:span><text:span text:style-name="T17">originY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9.479cm" svg:height="0.679cm" svg:x="33.07cm" svg:y="9.198cm">
          <text:p text:style-name="P10"><text:span text:style-name="T11">+ </text:span><text:span text:style-name="T13">getDistanceFromOrigin</text:span><text:span text:style-name="T11">(</text:span><text:span text:style-name="T10">): Object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83cm" svg:height="0.924cm" svg:x="39.525cm" svg:y="18.789cm">
          <draw:text-box>
            <text:p><text:span text:style-name="T1">Christopher Andrew Topalian</text:span></text:p>
          </draw:text-box>
        </draw:frame>
        <draw:frame draw:style-name="gr40" draw:text-style-name="P4" draw:layer="layout" svg:width="14.094cm" svg:height="0.924cm" svg:x="39.558cm" svg:y="19.692cm">
          <draw:text-box>
            <text:p text:style-name="P3"><text:span text:style-name="T1">https://github.com/ChristopherAndrewTopalian</text:span></text:p>
          </draw:text-box>
        </draw:frame>
        <draw:custom-shape draw:style-name="gr24" draw:text-style-name="P1" draw:layer="layout" svg:width="9.805cm" svg:height="8.488cm" svg:x="43.333cm" svg:y="4.273cm">
          <text:p text:style-name="P6"><text:span text:style-name="T3">EvasionComponent</text:span></text:p>
          <text:p text:style-name="P6"><text:span text:style-name="T5">constructor(targetId, speed, maxDistan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9.463cm" svg:height="0.694cm" svg:x="43.486cm" svg:y="6.671cm">
          <text:p text:style-name="P10"><text:span text:style-name="T11">- </text:span><text:span text:style-name="T17">targetId</text:span><text:span text:style-name="T10">: HTMLElem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43.486cm" svg:y="7.516cm">
          <text:p text:style-name="P10"><text:span text:style-name="T11">- </text:span><text:span text:style-name="T17">speed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43.486cm" svg:y="8.362cm">
          <text:p text:style-name="P10"><text:span text:style-name="T11">- </text:span><text:span text:style-name="T17">maxDistance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9.479cm" svg:height="0.679cm" svg:x="43.486cm" svg:y="11.798cm">
          <text:p text:style-name="P10"><text:span text:style-name="T11">+ </text:span><text:span text:style-name="T13">update</text:span><text:span text:style-name="T11">(</text:span><text:span text:style-name="T10">): void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43.486cm" svg:y="9.262cm">
          <text:p text:style-name="P10"><text:span text:style-name="T11">- </text:span><text:span text:style-name="T17">direction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43.486cm" svg:y="10.124cm">
          <text:p text:style-name="P10"><text:span text:style-name="T11">- </text:span><text:span text:style-name="T17">startX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43.486cm" svg:y="10.962cm">
          <text:p text:style-name="P10"><text:span text:style-name="T11">- </text:span><text:span text:style-name="T17">isInitialized</text:span><text:span text:style-name="T10">: Boolean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8.803cm" svg:height="2.12cm" svg:x="1.054cm" svg:y="12.947cm">
          <text:p text:style-name="P14"><text:span text:style-name="T6">- </text:span><text:span text:style-name="T16">evasion</text:span><text:span text:style-name="T8">: </text:span><text:span text:style-name="T14">EvasionComponent</text:span></text:p>
          <text:p text:style-name="P14"><text:span text:style-name="T15">constructor(id, speed, maxDistan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9.479cm" svg:height="0.862cm" svg:x="22.625cm" svg:y="7.732cm">
          <text:p text:style-name="P16"><text:span text:style-name="T10">+ </text:span><text:span text:style-name="T9">randomColor</text:span><text:span text:style-name="T10">(): void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8.803cm" svg:height="0.826cm" svg:x="1.054cm" svg:y="18.052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18">startEvasion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8.803cm" svg:height="0.826cm" svg:x="1.054cm" svg:y="18.998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18">haltEvasion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5" draw:layer="layout" svg:width="8.803cm" svg:height="0.745cm" svg:x="1.054cm" svg:y="15.247cm">
          <text:p text:style-name="P14"><text:span text:style-name="T6">- </text:span><text:span text:style-name="T16">patrolTimer</text:span><text:span text:style-name="T19">: 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0" draw:layer="layout" svg:width="26.77cm" svg:height="81.05cm" svg:x="0.535cm" svg:y="22.085cm">
          <draw:text-box>
            <text:p text:style-name="P18"><text:span text:style-name="T20">class</text:span><text:span text:style-name="T21"> </text:span><text:span text:style-name="T22">Drone</text:span></text:p>
            <text:p text:style-name="P18"><text:span text:style-name="T23">{</text:span></text:p>
            <text:p text:style-name="P18"><text:span text:style-name="T24">    </text:span><text:span text:style-name="T20">constructor</text:span><text:span text:style-name="T23">(</text:span><text:span text:style-name="T25">id</text:span><text:span text:style-name="T23">,</text:span><text:span text:style-name="T21"> </text:span><text:span text:style-name="T25">startX</text:span><text:span text:style-name="T23">,</text:span><text:span text:style-name="T21"> </text:span><text:span text:style-name="T25">startY</text:span><text:span text:style-name="T23">,</text:span><text:span text:style-name="T21"> </text:span><text:span text:style-name="T25">speed</text:span><text:span text:style-name="T21"> </text:span><text:span text:style-name="T23">=</text:span><text:span text:style-name="T21"> </text:span><text:span text:style-name="T26">2</text:span><text:span text:style-name="T23">,</text:span><text:span text:style-name="T21"> </text:span><text:span text:style-name="T25">maxDistance</text:span><text:span text:style-name="T21"> </text:span><text:span text:style-name="T23">=</text:span><text:span text:style-name="T21"> </text:span><text:span text:style-name="T26">200</text:span><text:span text:style-name="T23">)</text:span></text:p>
            <text:p text:style-name="P18"><text:span text:style-name="T24">    </text:span><text:span text:style-name="T23">{</text:span></text:p>
            <text:p text:style-name="P18"><text:span text:style-name="T24">        </text:span><text:span text:style-name="T27">this</text:span><text:span text:style-name="T23">.</text:span><text:span text:style-name="T25">id</text:span><text:span text:style-name="T21"> </text:span><text:span text:style-name="T23">=</text:span><text:span text:style-name="T21"> </text:span><text:span text:style-name="T25">id</text:span><text:span text:style-name="T23">;</text:span></text:p>
            <text:p text:style-name="P19"/>
            <text:p text:style-name="P18"><text:span text:style-name="T24">        </text:span><text:span text:style-name="T27">this</text:span><text:span text:style-name="T23">.</text:span><text:span text:style-name="T25">location</text:span><text:span text:style-name="T21"> </text:span><text:span text:style-name="T23">=</text:span><text:span text:style-name="T21"> </text:span><text:span text:style-name="T27">new</text:span><text:span text:style-name="T21"> </text:span><text:span text:style-name="T22">LocationComponent</text:span><text:span text:style-name="T21">(</text:span><text:span text:style-name="T25">id</text:span><text:span text:style-name="T23">,</text:span><text:span text:style-name="T21"> </text:span><text:span text:style-name="T25">startX</text:span><text:span text:style-name="T23">,</text:span><text:span text:style-name="T21"> </text:span><text:span text:style-name="T25">startY</text:span><text:span text:style-name="T21">)</text:span><text:span text:style-name="T23">;</text:span></text:p>
            <text:p text:style-name="P18"><text:span text:style-name="T24">        </text:span></text:p>
            <text:p text:style-name="P18"><text:span text:style-name="T24">        </text:span><text:span text:style-name="T27">this</text:span><text:span text:style-name="T23">.</text:span><text:span text:style-name="T25">led</text:span><text:span text:style-name="T21"> </text:span><text:span text:style-name="T23">=</text:span><text:span text:style-name="T21"> </text:span><text:span text:style-name="T27">new</text:span><text:span text:style-name="T21"> </text:span><text:span text:style-name="T22">LEDComponent</text:span><text:span text:style-name="T21">(</text:span><text:span text:style-name="T25">id</text:span><text:span text:style-name="T21">)</text:span><text:span text:style-name="T23">;</text:span></text:p>
            <text:p text:style-name="P19"/>
            <text:p text:style-name="P18"><text:span text:style-name="T28">        </text:span><text:span text:style-name="T29">// Initialize the distance chip, setting startX and startY as the origin</text:span></text:p>
            <text:p text:style-name="P18"><text:span text:style-name="T24">        </text:span><text:span text:style-name="T27">this</text:span><text:span text:style-name="T23">.</text:span><text:span text:style-name="T25">distanceTracker</text:span><text:span text:style-name="T21"> </text:span><text:span text:style-name="T23">=</text:span><text:span text:style-name="T21"> </text:span><text:span text:style-name="T27">new</text:span><text:span text:style-name="T21"> </text:span><text:span text:style-name="T22">DistanceComponent</text:span><text:span text:style-name="T21">(</text:span><text:span text:style-name="T25">id</text:span><text:span text:style-name="T23">,</text:span><text:span text:style-name="T21"> </text:span><text:span text:style-name="T25">startX</text:span><text:span text:style-name="T23">,</text:span><text:span text:style-name="T21"> </text:span><text:span text:style-name="T25">startY</text:span><text:span text:style-name="T21">)</text:span><text:span text:style-name="T23">;</text:span></text:p>
            <text:p text:style-name="P19"/>
            <text:p text:style-name="P18"><text:span text:style-name="T28">        </text:span><text:span text:style-name="T29">// Initialize the Evasion Chip</text:span></text:p>
            <text:p text:style-name="P18"><text:span text:style-name="T24">        </text:span><text:span text:style-name="T27">this</text:span><text:span text:style-name="T23">.</text:span><text:span text:style-name="T25">evasion</text:span><text:span text:style-name="T21"> </text:span><text:span text:style-name="T23">=</text:span><text:span text:style-name="T21"> </text:span><text:span text:style-name="T27">new</text:span><text:span text:style-name="T21"> </text:span><text:span text:style-name="T22">EvasionComponent</text:span><text:span text:style-name="T21">(</text:span><text:span text:style-name="T25">id</text:span><text:span text:style-name="T23">,</text:span><text:span text:style-name="T21"> </text:span><text:span text:style-name="T25">speed</text:span><text:span text:style-name="T23">,</text:span><text:span text:style-name="T21"> </text:span><text:span text:style-name="T25">maxDistance</text:span><text:span text:style-name="T21">)</text:span><text:span text:style-name="T23">;</text:span></text:p>
            <text:p text:style-name="P19"/>
            <text:p text:style-name="P18"><text:span text:style-name="T28">        </text:span><text:span text:style-name="T29">// A variable to store the engine loop so we can turn it off later</text:span></text:p>
            <text:p text:style-name="P18"><text:span text:style-name="T24">        </text:span><text:span text:style-name="T27">this</text:span><text:span text:style-name="T23">.</text:span><text:span text:style-name="T25">patrolTimer</text:span><text:span text:style-name="T21"> </text:span><text:span text:style-name="T23">=</text:span><text:span text:style-name="T21"> </text:span><text:span text:style-name="T27">null</text:span><text:span text:style-name="T23">;</text:span><text:span text:style-name="T21"> </text:span></text:p>
            <text:p text:style-name="P18"><text:span text:style-name="T24">    </text:span><text:span text:style-name="T23">}</text:span></text:p>
            <text:p text:style-name="P19"/>
            <text:p text:style-name="P18"><text:span text:style-name="T24">    </text:span><text:span text:style-name="T30">flyLeft</text:span><text:span text:style-name="T23">()</text:span></text:p>
            <text:p text:style-name="P18"><text:span text:style-name="T24">    </text:span><text:span text:style-name="T23">{</text:span></text:p>
            <text:p text:style-name="P18"><text:span text:style-name="T24">        </text:span><text:span text:style-name="T27">this</text:span><text:span text:style-name="T23">.</text:span><text:span text:style-name="T25">location</text:span><text:span text:style-name="T23">.</text:span><text:span text:style-name="T30">moveLeft</text:span><text:span text:style-name="T21">()</text:span><text:span text:style-name="T23">;</text:span></text:p>
            <text:p text:style-name="P19"/>
            <text:p text:style-name="P18"><text:span text:style-name="T24">        </text:span><text:span text:style-name="T20">let</text:span><text:span text:style-name="T21"> </text:span><text:span text:style-name="T25">distanceData</text:span><text:span text:style-name="T21"> </text:span><text:span text:style-name="T23">=</text:span><text:span text:style-name="T21"> </text:span><text:span text:style-name="T27">this</text:span><text:span text:style-name="T23">.</text:span><text:span text:style-name="T25">distanceTracker</text:span><text:span text:style-name="T23">.</text:span><text:span text:style-name="T30">getDistanceFromOrigin</text:span><text:span text:style-name="T21">()</text:span><text:span text:style-name="T23">;</text:span></text:p>
            <text:p text:style-name="P18"><text:span text:style-name="T24">        </text:span><text:span text:style-name="T30">ge</text:span><text:span text:style-name="T21">(</text:span><text:span text:style-name="T23">'</text:span><text:span text:style-name="T26">distanceBox</text:span><text:span text:style-name="T23">'</text:span><text:span text:style-name="T21">)</text:span><text:span text:style-name="T23">.</text:span><text:span text:style-name="T31">textContent</text:span><text:span text:style-name="T21"> </text:span><text:span text:style-name="T23">=</text:span><text:span text:style-name="T21"> </text:span><text:span text:style-name="T23">`</text:span><text:span text:style-name="T26">Distance from origin: </text:span><text:span text:style-name="T27">${</text:span><text:span text:style-name="T25">distanceData</text:span><text:span text:style-name="T23">.</text:span><text:span text:style-name="T25">total</text:span><text:span text:style-name="T27">}</text:span><text:span text:style-name="T26">px</text:span><text:span text:style-name="T23">`;</text:span></text:p>
            <text:p text:style-name="P18"><text:span text:style-name="T24">        </text:span><text:span text:style-name="T30">ge</text:span><text:span text:style-name="T21">(</text:span><text:span text:style-name="T23">'</text:span><text:span text:style-name="T26">infoBox</text:span><text:span text:style-name="T23">'</text:span><text:span text:style-name="T21">)</text:span><text:span text:style-name="T23">.</text:span><text:span text:style-name="T31">textContent</text:span><text:span text:style-name="T21"> </text:span><text:span text:style-name="T23">=</text:span><text:span text:style-name="T21"> </text:span><text:span text:style-name="T23">"</text:span><text:span text:style-name="T26">Status: Drone flying left.</text:span><text:span text:style-name="T23">";</text:span></text:p>
            <text:p text:style-name="P18"><text:span text:style-name="T24">    </text:span><text:span text:style-name="T23">}</text:span></text:p>
            <text:p text:style-name="P19"/>
            <text:p text:style-name="P18"><text:span text:style-name="T24">    </text:span><text:span text:style-name="T30">flyRight</text:span><text:span text:style-name="T23">()</text:span></text:p>
            <text:p text:style-name="P18"><text:span text:style-name="T24">    </text:span><text:span text:style-name="T23">{</text:span></text:p>
            <text:p text:style-name="P18"><text:span text:style-name="T24">        </text:span><text:span text:style-name="T27">this</text:span><text:span text:style-name="T23">.</text:span><text:span text:style-name="T25">location</text:span><text:span text:style-name="T23">.</text:span><text:span text:style-name="T30">moveRight</text:span><text:span text:style-name="T21">()</text:span><text:span text:style-name="T23">;</text:span></text:p>
            <text:p text:style-name="P19"/>
            <text:p text:style-name="P18"><text:span text:style-name="T24">        </text:span><text:span text:style-name="T20">let</text:span><text:span text:style-name="T21"> </text:span><text:span text:style-name="T25">distanceData</text:span><text:span text:style-name="T21"> </text:span><text:span text:style-name="T23">=</text:span><text:span text:style-name="T21"> </text:span><text:span text:style-name="T27">this</text:span><text:span text:style-name="T23">.</text:span><text:span text:style-name="T25">distanceTracker</text:span><text:span text:style-name="T23">.</text:span><text:span text:style-name="T30">getDistanceFromOrigin</text:span><text:span text:style-name="T21">()</text:span><text:span text:style-name="T23">;</text:span></text:p>
            <text:p text:style-name="P18"><text:span text:style-name="T24">        </text:span><text:span text:style-name="T30">ge</text:span><text:span text:style-name="T21">(</text:span><text:span text:style-name="T23">'</text:span><text:span text:style-name="T26">distanceBox</text:span><text:span text:style-name="T23">'</text:span><text:span text:style-name="T21">)</text:span><text:span text:style-name="T23">.</text:span><text:span text:style-name="T31">textContent</text:span><text:span text:style-name="T21"> </text:span><text:span text:style-name="T23">=</text:span><text:span text:style-name="T21"> </text:span><text:span text:style-name="T23">`</text:span><text:span text:style-name="T26">Distance from origin: </text:span><text:span text:style-name="T27">${</text:span><text:span text:style-name="T25">distanceData</text:span><text:span text:style-name="T23">.</text:span><text:span text:style-name="T25">total</text:span><text:span text:style-name="T27">}</text:span><text:span text:style-name="T26">px</text:span><text:span text:style-name="T23">`;</text:span></text:p>
            <text:p text:style-name="P18"><text:span text:style-name="T24">        </text:span><text:span text:style-name="T30">ge</text:span><text:span text:style-name="T21">(</text:span><text:span text:style-name="T23">'</text:span><text:span text:style-name="T26">infoBox</text:span><text:span text:style-name="T23">'</text:span><text:span text:style-name="T21">)</text:span><text:span text:style-name="T23">.</text:span><text:span text:style-name="T31">textContent</text:span><text:span text:style-name="T21"> </text:span><text:span text:style-name="T23">=</text:span><text:span text:style-name="T21"> </text:span><text:span text:style-name="T23">"</text:span><text:span text:style-name="T26">Status: Drone flying right.</text:span><text:span text:style-name="T23">";</text:span></text:p>
            <text:p text:style-name="P18"><text:span text:style-name="T24">    </text:span><text:span text:style-name="T23">}</text:span></text:p>
            <text:p text:style-name="P19"/>
            <text:p text:style-name="P18"><text:span text:style-name="T24">    </text:span><text:span text:style-name="T30">startEvasion</text:span><text:span text:style-name="T23">()</text:span></text:p>
            <text:p text:style-name="P18"><text:span text:style-name="T24">    </text:span><text:span text:style-name="T23">{</text:span></text:p>
            <text:p text:style-name="P18"><text:span text:style-name="T24">        </text:span><text:span text:style-name="T32">if</text:span><text:span text:style-name="T21"> (</text:span><text:span text:style-name="T27">this</text:span><text:span text:style-name="T23">.</text:span><text:span text:style-name="T25">patrolTimer</text:span><text:span text:style-name="T21"> !== </text:span><text:span text:style-name="T27">null</text:span><text:span text:style-name="T21">) </text:span><text:span text:style-name="T32">return</text:span><text:span text:style-name="T23">;</text:span><text:span text:style-name="T21"> </text:span></text:p>
            <text:p text:style-name="P19"/>
            <text:p text:style-name="P18"><text:span text:style-name="T24">        </text:span><text:span text:style-name="T30">ge</text:span><text:span text:style-name="T21">(</text:span><text:span text:style-name="T23">'</text:span><text:span text:style-name="T26">infoBox</text:span><text:span text:style-name="T23">'</text:span><text:span text:style-name="T21">)</text:span><text:span text:style-name="T23">.</text:span><text:span text:style-name="T31">textContent</text:span><text:span text:style-name="T21"> </text:span><text:span text:style-name="T23">=</text:span><text:span text:style-name="T21"> </text:span><text:span text:style-name="T23">"</text:span><text:span text:style-name="T26">Status: Drone executing evasive maneuvers.</text:span><text:span text:style-name="T23">";</text:span></text:p>
            <text:p text:style-name="P19"/>
            <text:p text:style-name="P18"><text:span text:style-name="T24">        </text:span><text:span text:style-name="T27">this</text:span><text:span text:style-name="T23">.</text:span><text:span text:style-name="T25">patrolTimer</text:span><text:span text:style-name="T21"> </text:span><text:span text:style-name="T23">=</text:span><text:span text:style-name="T21"> </text:span><text:span text:style-name="T33">setInterval</text:span><text:span text:style-name="T21">(</text:span><text:span text:style-name="T23">()</text:span><text:span text:style-name="T21"> </text:span><text:span text:style-name="T20">=&gt;</text:span><text:span text:style-name="T21"> </text:span></text:p>
            <text:p text:style-name="P18"><text:span text:style-name="T24">        </text:span><text:span text:style-name="T23">{</text:span></text:p>
            <text:p text:style-name="P18"><text:span text:style-name="T28">            </text:span><text:span text:style-name="T29">// The Evasion chip physically moves the element</text:span></text:p>
            <text:p text:style-name="P18"><text:span text:style-name="T24">            </text:span><text:span text:style-name="T27">this</text:span><text:span text:style-name="T23">.</text:span><text:span text:style-name="T25">evasion</text:span><text:span text:style-name="T23">.</text:span><text:span text:style-name="T30">update</text:span><text:span text:style-name="T21">()</text:span><text:span text:style-name="T23">;</text:span></text:p>
            <text:p text:style-name="P19"/>
            <text:p text:style-name="P18"><text:span text:style-name="T28">            </text:span><text:span text:style-name="T29">// We read the raw DOM location</text:span></text:p>
            <text:p text:style-name="P18"><text:span text:style-name="T24">            </text:span><text:span text:style-name="T20">let</text:span><text:span text:style-name="T21"> </text:span><text:span text:style-name="T25">rect</text:span><text:span text:style-name="T21"> </text:span><text:span text:style-name="T23">=</text:span><text:span text:style-name="T21"> </text:span><text:span text:style-name="T30">ge</text:span><text:span text:style-name="T21">(</text:span><text:span text:style-name="T27">this</text:span><text:span text:style-name="T23">.</text:span><text:span text:style-name="T25">id</text:span><text:span text:style-name="T21">)</text:span><text:span text:style-name="T23">.</text:span><text:span text:style-name="T30">getBoundingClientRect</text:span><text:span text:style-name="T21">()</text:span><text:span text:style-name="T23">;</text:span></text:p>
            <text:p text:style-name="P19"/>
            <text:p text:style-name="P18"><text:span text:style-name="T28">            </text:span><text:span text:style-name="T29">// We update the UI directly from the raw data</text:span></text:p>
            <text:p text:style-name="P18"><text:span text:style-name="T24">            </text:span><text:span text:style-name="T30">ge</text:span><text:span text:style-name="T21">(</text:span><text:span text:style-name="T23">'</text:span><text:span text:style-name="T26">distanceBox</text:span><text:span text:style-name="T23">'</text:span><text:span text:style-name="T21">)</text:span><text:span text:style-name="T23">.</text:span><text:span text:style-name="T31">textContent</text:span><text:span text:style-name="T21"> </text:span><text:span text:style-name="T23">=</text:span><text:span text:style-name="T21"> </text:span><text:span text:style-name="T23">`</text:span><text:span text:style-name="T26">Current Screen Position X: </text:span><text:span text:style-name="T27">${</text:span><text:span text:style-name="T31">Math</text:span><text:span text:style-name="T23">.</text:span><text:span text:style-name="T30">round</text:span><text:span text:style-name="T21">(</text:span><text:span text:style-name="T25">rect</text:span><text:span text:style-name="T23">.</text:span><text:span text:style-name="T31">left</text:span><text:span text:style-name="T21">)</text:span><text:span text:style-name="T27">}</text:span><text:span text:style-name="T26">px</text:span><text:span text:style-name="T23">`;</text:span></text:p>
            <text:p text:style-name="P19"/>
            <text:p text:style-name="P18"><text:span text:style-name="T24">        </text:span><text:span text:style-name="T23">},</text:span><text:span text:style-name="T21"> </text:span><text:span text:style-name="T26">1000</text:span><text:span text:style-name="T21"> / </text:span><text:span text:style-name="T26">60</text:span><text:span text:style-name="T21">)</text:span><text:span text:style-name="T23">;</text:span><text:span text:style-name="T21"> </text:span></text:p>
            <text:p text:style-name="P18"><text:span text:style-name="T24">    </text:span><text:span text:style-name="T23">}</text:span></text:p>
            <text:p text:style-name="P19"/>
            <text:p text:style-name="P18"><text:span text:style-name="T24">    </text:span><text:span text:style-name="T30">haltEvasion</text:span><text:span text:style-name="T23">()</text:span></text:p>
            <text:p text:style-name="P18"><text:span text:style-name="T24">    </text:span><text:span text:style-name="T23">{</text:span></text:p>
            <text:p text:style-name="P18"><text:span text:style-name="T28">        </text:span><text:span text:style-name="T29">// cut the power to the loop</text:span></text:p>
            <text:p text:style-name="P18"><text:span text:style-name="T24">        </text:span><text:span text:style-name="T33">clearInterval</text:span><text:span text:style-name="T21">(</text:span><text:span text:style-name="T27">this</text:span><text:span text:style-name="T23">.</text:span><text:span text:style-name="T25">patrolTimer</text:span><text:span text:style-name="T21">)</text:span><text:span text:style-name="T23">;</text:span></text:p>
            <text:p text:style-name="P18"><text:span text:style-name="T24">        </text:span><text:span text:style-name="T27">this</text:span><text:span text:style-name="T23">.</text:span><text:span text:style-name="T25">patrolTimer</text:span><text:span text:style-name="T21"> </text:span><text:span text:style-name="T23">=</text:span><text:span text:style-name="T21"> </text:span><text:span text:style-name="T27">null</text:span><text:span text:style-name="T23">;</text:span></text:p>
            <text:p text:style-name="P19"/>
            <text:p text:style-name="P18"><text:span text:style-name="T24">        </text:span><text:span text:style-name="T30">ge</text:span><text:span text:style-name="T21">(</text:span><text:span text:style-name="T23">'</text:span><text:span text:style-name="T26">infoBox</text:span><text:span text:style-name="T23">'</text:span><text:span text:style-name="T21">)</text:span><text:span text:style-name="T23">.</text:span><text:span text:style-name="T31">textContent</text:span><text:span text:style-name="T21"> </text:span><text:span text:style-name="T23">=</text:span><text:span text:style-name="T21"> </text:span><text:span text:style-name="T23">"</text:span><text:span text:style-name="T26">Status: Evasive maneuvers halted. Holding position.</text:span><text:span text:style-name="T23">";</text:span></text:p>
            <text:p text:style-name="P18"><text:span text:style-name="T24">    </text:span><text:span text:style-name="T23">}</text:span></text:p>
            <text:p text:style-name="P18"><text:span text:style-name="T23">}</text:span></text:p>
          </draw:text-box>
        </draw:frame>
        <draw:frame draw:style-name="gr28" draw:text-style-name="P20" draw:layer="layout" svg:width="25.083cm" svg:height="52.967cm" svg:x="89.77cm" svg:y="22.228cm">
          <draw:text-box>
            <text:p text:style-name="P18"><text:span text:style-name="T20">class</text:span><text:span text:style-name="T21"> </text:span><text:span text:style-name="T22">EvasionComponent</text:span><text:span text:style-name="T21"> </text:span></text:p>
            <text:p text:style-name="P18"><text:span text:style-name="T23">{</text:span></text:p>
            <text:p text:style-name="P18"><text:span text:style-name="T24">    </text:span><text:span text:style-name="T20">constructor</text:span><text:span text:style-name="T23">(</text:span><text:span text:style-name="T25">targetId</text:span><text:span text:style-name="T23">,</text:span><text:span text:style-name="T21"> </text:span><text:span text:style-name="T25">speed</text:span><text:span text:style-name="T23">,</text:span><text:span text:style-name="T21"> </text:span><text:span text:style-name="T25">maxDistance</text:span><text:span text:style-name="T23">)</text:span><text:span text:style-name="T21"> </text:span></text:p>
            <text:p text:style-name="P18"><text:span text:style-name="T24">    </text:span><text:span text:style-name="T23">{</text:span></text:p>
            <text:p text:style-name="P18"><text:span text:style-name="T28">        </text:span><text:span text:style-name="T29">// Data injected from the Container (The Drone)</text:span></text:p>
            <text:p text:style-name="P18"><text:span text:style-name="T24">        </text:span><text:span text:style-name="T27">this</text:span><text:span text:style-name="T23">.</text:span><text:span text:style-name="T25">targetId</text:span><text:span text:style-name="T21"> </text:span><text:span text:style-name="T23">=</text:span><text:span text:style-name="T21"> </text:span><text:span text:style-name="T25">targetId</text:span><text:span text:style-name="T23">;</text:span></text:p>
            <text:p text:style-name="P18"><text:span text:style-name="T24">        </text:span><text:span text:style-name="T27">this</text:span><text:span text:style-name="T23">.</text:span><text:span text:style-name="T25">speed</text:span><text:span text:style-name="T21"> </text:span><text:span text:style-name="T23">=</text:span><text:span text:style-name="T21"> </text:span><text:span text:style-name="T25">speed</text:span><text:span text:style-name="T23">;</text:span></text:p>
            <text:p text:style-name="P18"><text:span text:style-name="T24">        </text:span><text:span text:style-name="T27">this</text:span><text:span text:style-name="T23">.</text:span><text:span text:style-name="T25">maxDistance</text:span><text:span text:style-name="T21"> </text:span><text:span text:style-name="T23">=</text:span><text:span text:style-name="T21"> </text:span><text:span text:style-name="T25">maxDistance</text:span><text:span text:style-name="T23">;</text:span></text:p>
            <text:p text:style-name="P19"/>
            <text:p text:style-name="P18"><text:span text:style-name="T28">        </text:span><text:span text:style-name="T29">// Internal state data</text:span></text:p>
            <text:p text:style-name="P18"><text:span text:style-name="T24">        </text:span><text:span text:style-name="T27">this</text:span><text:span text:style-name="T23">.</text:span><text:span text:style-name="T25">direction</text:span><text:span text:style-name="T21"> </text:span><text:span text:style-name="T23">=</text:span><text:span text:style-name="T21"> </text:span><text:span text:style-name="T26">1</text:span><text:span text:style-name="T23">;</text:span><text:span text:style-name="T21">  </text:span><text:span text:style-name="T29">// 1 moves right, -1 moves left</text:span></text:p>
            <text:p text:style-name="P18"><text:span text:style-name="T24">        </text:span><text:span text:style-name="T27">this</text:span><text:span text:style-name="T23">.</text:span><text:span text:style-name="T25">startX</text:span><text:span text:style-name="T21"> </text:span><text:span text:style-name="T23">=</text:span><text:span text:style-name="T21"> </text:span><text:span text:style-name="T27">null</text:span><text:span text:style-name="T23">;</text:span><text:span text:style-name="T21">  </text:span><text:span text:style-name="T29">// Will record the starting position</text:span></text:p>
            <text:p text:style-name="P18"><text:span text:style-name="T24">        </text:span><text:span text:style-name="T27">this</text:span><text:span text:style-name="T23">.</text:span><text:span text:style-name="T25">isInitialized</text:span><text:span text:style-name="T21"> </text:span><text:span text:style-name="T23">=</text:span><text:span text:style-name="T21"> </text:span><text:span text:style-name="T27">false</text:span><text:span text:style-name="T23">;</text:span><text:span text:style-name="T21"> </text:span></text:p>
            <text:p text:style-name="P18"><text:span text:style-name="T24">    </text:span><text:span text:style-name="T23">}</text:span></text:p>
            <text:p text:style-name="P19"/>
            <text:p text:style-name="P18"><text:span text:style-name="T24">    </text:span><text:span text:style-name="T30">update</text:span><text:span text:style-name="T23">()</text:span><text:span text:style-name="T21"> </text:span></text:p>
            <text:p text:style-name="P18"><text:span text:style-name="T24">    </text:span><text:span text:style-name="T23">{</text:span></text:p>
            <text:p text:style-name="P18"><text:span text:style-name="T24">        </text:span><text:span text:style-name="T20">let</text:span><text:span text:style-name="T21"> </text:span><text:span text:style-name="T25">el</text:span><text:span text:style-name="T21"> </text:span><text:span text:style-name="T23">=</text:span><text:span text:style-name="T21"> </text:span><text:span text:style-name="T30">ge</text:span><text:span text:style-name="T21">(</text:span><text:span text:style-name="T27">this</text:span><text:span text:style-name="T23">.</text:span><text:span text:style-name="T25">targetId</text:span><text:span text:style-name="T21">)</text:span><text:span text:style-name="T23">;</text:span></text:p>
            <text:p text:style-name="P18"><text:span text:style-name="T24">        </text:span><text:span text:style-name="T32">if</text:span><text:span text:style-name="T21"> (!</text:span><text:span text:style-name="T25">el</text:span><text:span text:style-name="T21">) </text:span><text:span text:style-name="T32">return</text:span><text:span text:style-name="T23">;</text:span></text:p>
            <text:p text:style-name="P19"/>
            <text:p text:style-name="P18"><text:span text:style-name="T24">        </text:span><text:span text:style-name="T20">let</text:span><text:span text:style-name="T21"> </text:span><text:span text:style-name="T25">rect</text:span><text:span text:style-name="T21"> </text:span><text:span text:style-name="T23">=</text:span><text:span text:style-name="T21"> </text:span><text:span text:style-name="T25">el</text:span><text:span text:style-name="T23">.</text:span><text:span text:style-name="T30">getBoundingClientRect</text:span><text:span text:style-name="T21">()</text:span><text:span text:style-name="T23">;</text:span><text:span text:style-name="T21"> </text:span></text:p>
            <text:p text:style-name="P19"/>
            <text:p text:style-name="P18"><text:span text:style-name="T28">        </text:span><text:span text:style-name="T29">// Lock in the starting position on the very first frame</text:span></text:p>
            <text:p text:style-name="P18"><text:span text:style-name="T24">        </text:span><text:span text:style-name="T32">if</text:span><text:span text:style-name="T21"> (!</text:span><text:span text:style-name="T27">this</text:span><text:span text:style-name="T23">.</text:span><text:span text:style-name="T25">isInitialized</text:span><text:span text:style-name="T21">) </text:span></text:p>
            <text:p text:style-name="P18"><text:span text:style-name="T24">        </text:span><text:span text:style-name="T23">{</text:span></text:p>
            <text:p text:style-name="P18"><text:span text:style-name="T24">            </text:span><text:span text:style-name="T27">this</text:span><text:span text:style-name="T23">.</text:span><text:span text:style-name="T25">startX</text:span><text:span text:style-name="T21"> </text:span><text:span text:style-name="T23">=</text:span><text:span text:style-name="T21"> </text:span><text:span text:style-name="T25">rect</text:span><text:span text:style-name="T23">.</text:span><text:span text:style-name="T31">left</text:span><text:span text:style-name="T23">;</text:span></text:p>
            <text:p text:style-name="P18"><text:span text:style-name="T24">            </text:span><text:span text:style-name="T27">this</text:span><text:span text:style-name="T23">.</text:span><text:span text:style-name="T25">isInitialized</text:span><text:span text:style-name="T21"> </text:span><text:span text:style-name="T23">=</text:span><text:span text:style-name="T21"> </text:span><text:span text:style-name="T27">true</text:span><text:span text:style-name="T23">;</text:span></text:p>
            <text:p text:style-name="P18"><text:span text:style-name="T24">        </text:span><text:span text:style-name="T23">}</text:span></text:p>
            <text:p text:style-name="P19"/>
            <text:p text:style-name="P18"><text:span text:style-name="T28">        </text:span><text:span text:style-name="T29">// Calculate how far the drone has traveled from its origin</text:span></text:p>
            <text:p text:style-name="P18"><text:span text:style-name="T24">        </text:span><text:span text:style-name="T20">let</text:span><text:span text:style-name="T21"> </text:span><text:span text:style-name="T25">distanceTraveled</text:span><text:span text:style-name="T21"> </text:span><text:span text:style-name="T23">=</text:span><text:span text:style-name="T21"> </text:span><text:span text:style-name="T25">rect</text:span><text:span text:style-name="T23">.</text:span><text:span text:style-name="T31">left</text:span><text:span text:style-name="T21"> - </text:span><text:span text:style-name="T27">this</text:span><text:span text:style-name="T23">.</text:span><text:span text:style-name="T25">startX</text:span><text:span text:style-name="T23">;</text:span></text:p>
            <text:p text:style-name="P19"/>
            <text:p text:style-name="P18"><text:span text:style-name="T28">        </text:span><text:span text:style-name="T29">// If it moved too far right, flip direction to negative (left)</text:span></text:p>
            <text:p text:style-name="P18"><text:span text:style-name="T24">        </text:span><text:span text:style-name="T32">if</text:span><text:span text:style-name="T21"> (</text:span><text:span text:style-name="T25">distanceTraveled</text:span><text:span text:style-name="T21"> &gt;= </text:span><text:span text:style-name="T27">this</text:span><text:span text:style-name="T23">.</text:span><text:span text:style-name="T25">maxDistance</text:span><text:span text:style-name="T21">) </text:span></text:p>
            <text:p text:style-name="P18"><text:span text:style-name="T24">        </text:span><text:span text:style-name="T23">{</text:span></text:p>
            <text:p text:style-name="P18"><text:span text:style-name="T24">            </text:span><text:span text:style-name="T27">this</text:span><text:span text:style-name="T23">.</text:span><text:span text:style-name="T25">direction</text:span><text:span text:style-name="T21"> </text:span><text:span text:style-name="T23">=</text:span><text:span text:style-name="T21"> -</text:span><text:span text:style-name="T26">1</text:span><text:span text:style-name="T23">;</text:span></text:p>
            <text:p text:style-name="P18"><text:span text:style-name="T24">        </text:span><text:span text:style-name="T23">}</text:span></text:p>
            <text:p text:style-name="P18"><text:span text:style-name="T28">        </text:span><text:span text:style-name="T29">// If it made it back to the start, flip direction to positive (right)</text:span></text:p>
            <text:p text:style-name="P18"><text:span text:style-name="T24">        </text:span><text:span text:style-name="T32">else</text:span><text:span text:style-name="T21"> </text:span><text:span text:style-name="T32">if</text:span><text:span text:style-name="T21"> (</text:span><text:span text:style-name="T25">distanceTraveled</text:span><text:span text:style-name="T21"> &lt;= </text:span><text:span text:style-name="T26">0</text:span><text:span text:style-name="T21">) </text:span></text:p>
            <text:p text:style-name="P18"><text:span text:style-name="T24">        </text:span><text:span text:style-name="T23">{</text:span></text:p>
            <text:p text:style-name="P18"><text:span text:style-name="T24">            </text:span><text:span text:style-name="T27">this</text:span><text:span text:style-name="T23">.</text:span><text:span text:style-name="T25">direction</text:span><text:span text:style-name="T21"> </text:span><text:span text:style-name="T23">=</text:span><text:span text:style-name="T21"> </text:span><text:span text:style-name="T26">1</text:span><text:span text:style-name="T23">;</text:span></text:p>
            <text:p text:style-name="P18"><text:span text:style-name="T24">        </text:span><text:span text:style-name="T23">}</text:span></text:p>
            <text:p text:style-name="P19"/>
            <text:p text:style-name="P18"><text:span text:style-name="T28">        </text:span><text:span text:style-name="T29">// Apply the speed and direction to the exact current position</text:span></text:p>
            <text:p text:style-name="P18"><text:span text:style-name="T24">        </text:span><text:span text:style-name="T20">let</text:span><text:span text:style-name="T21"> </text:span><text:span text:style-name="T25">newX</text:span><text:span text:style-name="T21"> </text:span><text:span text:style-name="T23">=</text:span><text:span text:style-name="T21"> </text:span><text:span text:style-name="T25">rect</text:span><text:span text:style-name="T23">.</text:span><text:span text:style-name="T31">left</text:span><text:span text:style-name="T21"> + (</text:span><text:span text:style-name="T27">this</text:span><text:span text:style-name="T23">.</text:span><text:span text:style-name="T25">speed</text:span><text:span text:style-name="T21"> * </text:span><text:span text:style-name="T27">this</text:span><text:span text:style-name="T23">.</text:span><text:span text:style-name="T25">direction</text:span><text:span text:style-name="T21">)</text:span><text:span text:style-name="T23">;</text:span></text:p>
            <text:p text:style-name="P18"><text:span text:style-name="T24">        </text:span><text:span text:style-name="T25">el</text:span><text:span text:style-name="T23">.</text:span><text:span text:style-name="T31">style</text:span><text:span text:style-name="T23">.</text:span><text:span text:style-name="T31">left</text:span><text:span text:style-name="T21"> </text:span><text:span text:style-name="T23">=</text:span><text:span text:style-name="T21"> </text:span><text:span text:style-name="T25">newX</text:span><text:span text:style-name="T21"> + </text:span><text:span text:style-name="T23">"</text:span><text:span text:style-name="T26">px</text:span><text:span text:style-name="T23">";</text:span></text:p>
            <text:p text:style-name="P18"><text:span text:style-name="T24">    </text:span><text:span text:style-name="T23">}</text:span></text:p>
            <text:p text:style-name="P18"><text:span text:style-name="T23">}</text:span></text:p>
          </draw:text-box>
        </draw:frame>
        <draw:frame draw:style-name="gr29" draw:text-style-name="P21" draw:layer="layout" svg:width="16.475cm" svg:height="27.802cm" svg:x="28.687cm" svg:y="22.228cm">
          <draw:text-box>
            <text:p text:style-name="P18"><text:span text:style-name="T20">class</text:span><text:span text:style-name="T34"> </text:span><text:span text:style-name="T22">LocationComponent</text:span></text:p>
            <text:p text:style-name="P18"><text:span text:style-name="T23">{</text:span></text:p>
            <text:p text:style-name="P18"><text:span text:style-name="T35">    </text:span><text:span text:style-name="T20">constructor</text:span><text:span text:style-name="T23">(</text:span><text:span text:style-name="T34">elementId</text:span><text:span text:style-name="T23">,</text:span><text:span text:style-name="T34"> startX</text:span><text:span text:style-name="T23">,</text:span><text:span text:style-name="T34"> startY</text:span><text:span text:style-name="T23">)</text:span></text:p>
            <text:p text:style-name="P18"><text:span text:style-name="T36">    </text:span><text:span text:style-name="T23">{</text:span></text:p>
            <text:p text:style-name="P18"><text:span text:style-name="T36">        </text:span><text:span text:style-name="T27">this</text:span><text:span text:style-name="T23">.</text:span><text:span text:style-name="T25">element</text:span><text:span text:style-name="T34"> </text:span><text:span text:style-name="T23">=</text:span><text:span text:style-name="T34"> </text:span><text:span text:style-name="T30">ge</text:span><text:span text:style-name="T23">(</text:span><text:span text:style-name="T25">elementId</text:span><text:span text:style-name="T23">);</text:span></text:p>
            <text:p text:style-name="P18"><text:span text:style-name="T36">        </text:span><text:span text:style-name="T27">this</text:span><text:span text:style-name="T23">.</text:span><text:span text:style-name="T25">x</text:span><text:span text:style-name="T34"> </text:span><text:span text:style-name="T23">=</text:span><text:span text:style-name="T34"> </text:span><text:span text:style-name="T25">startX</text:span><text:span text:style-name="T23">;</text:span></text:p>
            <text:p text:style-name="P18"><text:span text:style-name="T36">        </text:span><text:span text:style-name="T27">this</text:span><text:span text:style-name="T23">.</text:span><text:span text:style-name="T25">y</text:span><text:span text:style-name="T34"> </text:span><text:span text:style-name="T23">=</text:span><text:span text:style-name="T34"> </text:span><text:span text:style-name="T25">startY</text:span><text:span text:style-name="T23">;</text:span></text:p>
            <text:p text:style-name="P19"/>
            <text:p text:style-name="P18"><text:span text:style-name="T28">        </text:span><text:span text:style-name="T29">// set the starting position in the DOM</text:span></text:p>
            <text:p text:style-name="P18"><text:span text:style-name="T36">        </text:span><text:span text:style-name="T27">this</text:span><text:span text:style-name="T23">.</text:span><text:span text:style-name="T25">element</text:span><text:span text:style-name="T23">.</text:span><text:span text:style-name="T25">style</text:span><text:span text:style-name="T23">.</text:span><text:span text:style-name="T25">left</text:span><text:span text:style-name="T34"> </text:span><text:span text:style-name="T23">=</text:span><text:span text:style-name="T34"> </text:span><text:span text:style-name="T27">this</text:span><text:span text:style-name="T23">.</text:span><text:span text:style-name="T25">x</text:span><text:span text:style-name="T34"> </text:span><text:span text:style-name="T21">+</text:span><text:span text:style-name="T34"> </text:span><text:span text:style-name="T23">"</text:span><text:span text:style-name="T26">px</text:span><text:span text:style-name="T23">";</text:span></text:p>
            <text:p text:style-name="P18"><text:span text:style-name="T36">        </text:span><text:span text:style-name="T27">this</text:span><text:span text:style-name="T23">.</text:span><text:span text:style-name="T25">element</text:span><text:span text:style-name="T23">.</text:span><text:span text:style-name="T25">style</text:span><text:span text:style-name="T23">.</text:span><text:span text:style-name="T25">top</text:span><text:span text:style-name="T34"> </text:span><text:span text:style-name="T23">=</text:span><text:span text:style-name="T34"> </text:span><text:span text:style-name="T27">this</text:span><text:span text:style-name="T23">.</text:span><text:span text:style-name="T25">y</text:span><text:span text:style-name="T34"> </text:span><text:span text:style-name="T21">+</text:span><text:span text:style-name="T34"> </text:span><text:span text:style-name="T23">"</text:span><text:span text:style-name="T26">px</text:span><text:span text:style-name="T23">";</text:span></text:p>
            <text:p text:style-name="P18"><text:span text:style-name="T36">    </text:span><text:span text:style-name="T23">}</text:span></text:p>
            <text:p text:style-name="P19"/>
            <text:p text:style-name="P18"><text:span text:style-name="T36">    </text:span><text:span text:style-name="T30">moveLeft</text:span><text:span text:style-name="T23">()</text:span></text:p>
            <text:p text:style-name="P18"><text:span text:style-name="T36">    </text:span><text:span text:style-name="T23">{</text:span></text:p>
            <text:p text:style-name="P18"><text:span text:style-name="T36">        </text:span><text:span text:style-name="T27">this</text:span><text:span text:style-name="T23">.</text:span><text:span text:style-name="T25">x</text:span><text:span text:style-name="T34"> </text:span><text:span text:style-name="T23">-=</text:span><text:span text:style-name="T34"> </text:span><text:span text:style-name="T26">50</text:span><text:span text:style-name="T23">;</text:span></text:p>
            <text:p text:style-name="P18"><text:span text:style-name="T36">        </text:span><text:span text:style-name="T27">this</text:span><text:span text:style-name="T23">.</text:span><text:span text:style-name="T25">element</text:span><text:span text:style-name="T23">.</text:span><text:span text:style-name="T25">style</text:span><text:span text:style-name="T23">.</text:span><text:span text:style-name="T25">left</text:span><text:span text:style-name="T34"> </text:span><text:span text:style-name="T23">=</text:span><text:span text:style-name="T34"> </text:span><text:span text:style-name="T27">this</text:span><text:span text:style-name="T23">.</text:span><text:span text:style-name="T25">x</text:span><text:span text:style-name="T34"> </text:span><text:span text:style-name="T21">+</text:span><text:span text:style-name="T34"> </text:span><text:span text:style-name="T23">"</text:span><text:span text:style-name="T26">px</text:span><text:span text:style-name="T23">";</text:span></text:p>
            <text:p text:style-name="P18"><text:span text:style-name="T36">    </text:span><text:span text:style-name="T23">}</text:span></text:p>
            <text:p text:style-name="P19"/>
            <text:p text:style-name="P18"><text:span text:style-name="T36">    </text:span><text:span text:style-name="T30">moveRight</text:span><text:span text:style-name="T23">()</text:span></text:p>
            <text:p text:style-name="P18"><text:span text:style-name="T36">    </text:span><text:span text:style-name="T23">{</text:span></text:p>
            <text:p text:style-name="P18"><text:span text:style-name="T36">        </text:span><text:span text:style-name="T27">this</text:span><text:span text:style-name="T23">.</text:span><text:span text:style-name="T25">x</text:span><text:span text:style-name="T34"> </text:span><text:span text:style-name="T23">+=</text:span><text:span text:style-name="T34"> </text:span><text:span text:style-name="T26">50</text:span><text:span text:style-name="T23">;</text:span></text:p>
            <text:p text:style-name="P18"><text:span text:style-name="T36">        </text:span><text:span text:style-name="T27">this</text:span><text:span text:style-name="T23">.</text:span><text:span text:style-name="T25">element</text:span><text:span text:style-name="T23">.</text:span><text:span text:style-name="T25">style</text:span><text:span text:style-name="T23">.</text:span><text:span text:style-name="T25">left</text:span><text:span text:style-name="T34"> </text:span><text:span text:style-name="T23">=</text:span><text:span text:style-name="T34"> </text:span><text:span text:style-name="T27">this</text:span><text:span text:style-name="T23">.</text:span><text:span text:style-name="T25">x</text:span><text:span text:style-name="T34"> </text:span><text:span text:style-name="T21">+</text:span><text:span text:style-name="T34"> </text:span><text:span text:style-name="T23">"</text:span><text:span text:style-name="T26">px</text:span><text:span text:style-name="T23">";</text:span></text:p>
            <text:p text:style-name="P18"><text:span text:style-name="T36">    </text:span><text:span text:style-name="T23">}</text:span></text:p>
            <text:p text:style-name="P18"><text:span text:style-name="T23">}</text:span></text:p>
          </draw:text-box>
        </draw:frame>
        <draw:frame draw:style-name="gr30" draw:text-style-name="P21" draw:layer="layout" svg:width="20.243cm" svg:height="22.405cm" svg:x="46.531cm" svg:y="22.228cm">
          <draw:text-box>
            <text:p text:style-name="P18"><text:span text:style-name="T20">class</text:span><text:span text:style-name="T21"> </text:span><text:span text:style-name="T22">LEDComponent</text:span></text:p>
            <text:p text:style-name="P18"><text:span text:style-name="T23">{</text:span></text:p>
            <text:p text:style-name="P18"><text:span text:style-name="T24">    </text:span><text:span text:style-name="T20">constructor</text:span><text:span text:style-name="T23">(</text:span><text:span text:style-name="T25">elementId</text:span><text:span text:style-name="T23">)</text:span></text:p>
            <text:p text:style-name="P18"><text:span text:style-name="T24">    </text:span><text:span text:style-name="T23">{</text:span></text:p>
            <text:p text:style-name="P18"><text:span text:style-name="T24">        </text:span><text:span text:style-name="T27">this</text:span><text:span text:style-name="T23">.</text:span><text:span text:style-name="T25">element</text:span><text:span text:style-name="T21"> </text:span><text:span text:style-name="T23">=</text:span><text:span text:style-name="T21"> </text:span><text:span text:style-name="T30">ge</text:span><text:span text:style-name="T21">(</text:span><text:span text:style-name="T25">elementId</text:span><text:span text:style-name="T21">)</text:span><text:span text:style-name="T23">;</text:span></text:p>
            <text:p text:style-name="P18"><text:span text:style-name="T24">    </text:span><text:span text:style-name="T23">}</text:span></text:p>
            <text:p text:style-name="P19"/>
            <text:p text:style-name="P18"><text:span text:style-name="T24">    </text:span><text:span text:style-name="T30">setColor</text:span><text:span text:style-name="T23">(</text:span><text:span text:style-name="T25">newColor</text:span><text:span text:style-name="T23">)</text:span></text:p>
            <text:p text:style-name="P18"><text:span text:style-name="T24">    </text:span><text:span text:style-name="T23">{</text:span></text:p>
            <text:p text:style-name="P18"><text:span text:style-name="T24">        </text:span><text:span text:style-name="T27">this</text:span><text:span text:style-name="T23">.</text:span><text:span text:style-name="T25">element</text:span><text:span text:style-name="T23">.</text:span><text:span text:style-name="T31">style</text:span><text:span text:style-name="T23">.</text:span><text:span text:style-name="T31">backgroundColor</text:span><text:span text:style-name="T21"> </text:span><text:span text:style-name="T23">=</text:span><text:span text:style-name="T21"> </text:span><text:span text:style-name="T25">newColor</text:span><text:span text:style-name="T23">;</text:span></text:p>
            <text:p text:style-name="P18"><text:span text:style-name="T24">    </text:span><text:span text:style-name="T23">}</text:span></text:p>
            <text:p text:style-name="P19"/>
            <text:p text:style-name="P18"><text:span text:style-name="T24">    </text:span><text:span text:style-name="T30">randomColor</text:span><text:span text:style-name="T23">()</text:span></text:p>
            <text:p text:style-name="P18"><text:span text:style-name="T24">    </text:span><text:span text:style-name="T23">{</text:span></text:p>
            <text:p text:style-name="P18"><text:span text:style-name="T24">        </text:span><text:span text:style-name="T20">let</text:span><text:span text:style-name="T21"> </text:span><text:span text:style-name="T25">r</text:span><text:span text:style-name="T21"> </text:span><text:span text:style-name="T23">=</text:span><text:span text:style-name="T21"> </text:span><text:span text:style-name="T31">Math</text:span><text:span text:style-name="T23">.</text:span><text:span text:style-name="T30">floor</text:span><text:span text:style-name="T21">(</text:span><text:span text:style-name="T31">Math</text:span><text:span text:style-name="T23">.</text:span><text:span text:style-name="T30">random</text:span><text:span text:style-name="T21">() * </text:span><text:span text:style-name="T26">255</text:span><text:span text:style-name="T21">)</text:span><text:span text:style-name="T23">;</text:span></text:p>
            <text:p text:style-name="P18"><text:span text:style-name="T24">        </text:span><text:span text:style-name="T20">let</text:span><text:span text:style-name="T21"> </text:span><text:span text:style-name="T25">g</text:span><text:span text:style-name="T21"> </text:span><text:span text:style-name="T23">=</text:span><text:span text:style-name="T21"> </text:span><text:span text:style-name="T31">Math</text:span><text:span text:style-name="T23">.</text:span><text:span text:style-name="T30">floor</text:span><text:span text:style-name="T21">(</text:span><text:span text:style-name="T31">Math</text:span><text:span text:style-name="T23">.</text:span><text:span text:style-name="T30">random</text:span><text:span text:style-name="T21">() * </text:span><text:span text:style-name="T26">255</text:span><text:span text:style-name="T21">)</text:span><text:span text:style-name="T23">;</text:span></text:p>
            <text:p text:style-name="P18"><text:span text:style-name="T24">        </text:span><text:span text:style-name="T20">let</text:span><text:span text:style-name="T21"> </text:span><text:span text:style-name="T25">b</text:span><text:span text:style-name="T21"> </text:span><text:span text:style-name="T23">=</text:span><text:span text:style-name="T21"> </text:span><text:span text:style-name="T31">Math</text:span><text:span text:style-name="T23">.</text:span><text:span text:style-name="T30">floor</text:span><text:span text:style-name="T21">(</text:span><text:span text:style-name="T31">Math</text:span><text:span text:style-name="T23">.</text:span><text:span text:style-name="T30">random</text:span><text:span text:style-name="T21">() * </text:span><text:span text:style-name="T26">255</text:span><text:span text:style-name="T21">)</text:span><text:span text:style-name="T23">;</text:span></text:p>
            <text:p text:style-name="P18"><text:span text:style-name="T24">        </text:span><text:span text:style-name="T27">this</text:span><text:span text:style-name="T23">.</text:span><text:span text:style-name="T30">setColor</text:span><text:span text:style-name="T21">(</text:span><text:span text:style-name="T23">`</text:span><text:span text:style-name="T26">rgb(</text:span><text:span text:style-name="T27">${</text:span><text:span text:style-name="T25">r</text:span><text:span text:style-name="T27">}</text:span><text:span text:style-name="T26">, </text:span><text:span text:style-name="T27">${</text:span><text:span text:style-name="T25">g</text:span><text:span text:style-name="T27">}</text:span><text:span text:style-name="T26">, </text:span><text:span text:style-name="T27">${</text:span><text:span text:style-name="T25">b</text:span><text:span text:style-name="T27">}</text:span><text:span text:style-name="T26">)</text:span><text:span text:style-name="T23">`</text:span><text:span text:style-name="T21">)</text:span><text:span text:style-name="T23">;</text:span></text:p>
            <text:p text:style-name="P18"><text:span text:style-name="T24">    </text:span><text:span text:style-name="T23">}</text:span></text:p>
            <text:p text:style-name="P18"><text:span text:style-name="T23">}</text:span></text:p>
          </draw:text-box>
        </draw:frame>
        <draw:frame draw:style-name="gr31" draw:text-style-name="P21" draw:layer="layout" svg:width="20.135cm" svg:height="39.867cm" svg:x="68.172cm" svg:y="22.228cm">
          <draw:text-box>
            <text:p text:style-name="P18"><text:span text:style-name="T20">class</text:span><text:span text:style-name="T21"> </text:span><text:span text:style-name="T22">DistanceComponent</text:span></text:p>
            <text:p text:style-name="P18"><text:span text:style-name="T23">{</text:span></text:p>
            <text:p text:style-name="P18"><text:span text:style-name="T24">    </text:span><text:span text:style-name="T20">constructor</text:span><text:span text:style-name="T23">(</text:span><text:span text:style-name="T25">elementId</text:span><text:span text:style-name="T23">,</text:span><text:span text:style-name="T21"> </text:span><text:span text:style-name="T25">originX</text:span><text:span text:style-name="T21"> </text:span><text:span text:style-name="T23">=</text:span><text:span text:style-name="T21"> </text:span><text:span text:style-name="T26">0</text:span><text:span text:style-name="T23">,</text:span><text:span text:style-name="T21"> </text:span><text:span text:style-name="T25">originY</text:span><text:span text:style-name="T21"> </text:span><text:span text:style-name="T23">=</text:span><text:span text:style-name="T21"> </text:span><text:span text:style-name="T26">0</text:span><text:span text:style-name="T23">)</text:span></text:p>
            <text:p text:style-name="P18"><text:span text:style-name="T24">    </text:span><text:span text:style-name="T23">{</text:span></text:p>
            <text:p text:style-name="P18"><text:span text:style-name="T24">        </text:span><text:span text:style-name="T27">this</text:span><text:span text:style-name="T23">.</text:span><text:span text:style-name="T25">elementId</text:span><text:span text:style-name="T21"> </text:span><text:span text:style-name="T23">=</text:span><text:span text:style-name="T21"> </text:span><text:span text:style-name="T25">elementId</text:span><text:span text:style-name="T23">;</text:span></text:p>
            <text:p text:style-name="P19"/>
            <text:p text:style-name="P18"><text:span text:style-name="T28">        </text:span><text:span text:style-name="T29">// The anchor point we are measuring from</text:span></text:p>
            <text:p text:style-name="P18"><text:span text:style-name="T24">        </text:span><text:span text:style-name="T27">this</text:span><text:span text:style-name="T23">.</text:span><text:span text:style-name="T25">originX</text:span><text:span text:style-name="T21"> </text:span><text:span text:style-name="T23">=</text:span><text:span text:style-name="T21"> </text:span><text:span text:style-name="T25">originX</text:span><text:span text:style-name="T23">;</text:span></text:p>
            <text:p text:style-name="P18"><text:span text:style-name="T24">        </text:span><text:span text:style-name="T27">this</text:span><text:span text:style-name="T23">.</text:span><text:span text:style-name="T25">originY</text:span><text:span text:style-name="T21"> </text:span><text:span text:style-name="T23">=</text:span><text:span text:style-name="T21"> </text:span><text:span text:style-name="T25">originY</text:span><text:span text:style-name="T23">;</text:span></text:p>
            <text:p text:style-name="P18"><text:span text:style-name="T24">    </text:span><text:span text:style-name="T23">}</text:span></text:p>
            <text:p text:style-name="P19"/>
            <text:p text:style-name="P18"><text:span text:style-name="T28">    </text:span><text:span text:style-name="T29">// asks the DOM for position, returns the math</text:span></text:p>
            <text:p text:style-name="P18"><text:span text:style-name="T24">    </text:span><text:span text:style-name="T30">getDistanceFromOrigin</text:span><text:span text:style-name="T23">()</text:span></text:p>
            <text:p text:style-name="P18"><text:span text:style-name="T24">    </text:span><text:span text:style-name="T23">{</text:span></text:p>
            <text:p text:style-name="P18"><text:span text:style-name="T28">        </text:span><text:span text:style-name="T29">// Uses our shortcut to get the physical DOM rect</text:span></text:p>
            <text:p text:style-name="P18"><text:span text:style-name="T24">        </text:span><text:span text:style-name="T20">let</text:span><text:span text:style-name="T21"> </text:span><text:span text:style-name="T25">rect</text:span><text:span text:style-name="T21"> </text:span><text:span text:style-name="T23">=</text:span><text:span text:style-name="T21"> </text:span><text:span text:style-name="T30">gr</text:span><text:span text:style-name="T21">(</text:span><text:span text:style-name="T27">this</text:span><text:span text:style-name="T23">.</text:span><text:span text:style-name="T25">elementId</text:span><text:span text:style-name="T21">)</text:span><text:span text:style-name="T23">;</text:span><text:span text:style-name="T21"> </text:span></text:p>
            <text:p text:style-name="P18"><text:span text:style-name="T24">        </text:span></text:p>
            <text:p text:style-name="P18"><text:span text:style-name="T28">        </text:span><text:span text:style-name="T29">// Calculate the difference between current position and origin</text:span></text:p>
            <text:p text:style-name="P18"><text:span text:style-name="T24">        </text:span><text:span text:style-name="T20">let</text:span><text:span text:style-name="T21"> </text:span><text:span text:style-name="T25">diffX</text:span><text:span text:style-name="T21"> </text:span><text:span text:style-name="T23">=</text:span><text:span text:style-name="T21"> </text:span><text:span text:style-name="T31">Math</text:span><text:span text:style-name="T23">.</text:span><text:span text:style-name="T30">abs</text:span><text:span text:style-name="T21">(</text:span><text:span text:style-name="T25">rect</text:span><text:span text:style-name="T23">.</text:span><text:span text:style-name="T31">x</text:span><text:span text:style-name="T21"> - </text:span><text:span text:style-name="T27">this</text:span><text:span text:style-name="T23">.</text:span><text:span text:style-name="T25">originX</text:span><text:span text:style-name="T21">)</text:span><text:span text:style-name="T23">;</text:span></text:p>
            <text:p text:style-name="P18"><text:span text:style-name="T24">        </text:span><text:span text:style-name="T20">let</text:span><text:span text:style-name="T21"> </text:span><text:span text:style-name="T25">diffY</text:span><text:span text:style-name="T21"> </text:span><text:span text:style-name="T23">=</text:span><text:span text:style-name="T21"> </text:span><text:span text:style-name="T31">Math</text:span><text:span text:style-name="T23">.</text:span><text:span text:style-name="T30">abs</text:span><text:span text:style-name="T21">(</text:span><text:span text:style-name="T25">rect</text:span><text:span text:style-name="T23">.</text:span><text:span text:style-name="T31">y</text:span><text:span text:style-name="T21"> - </text:span><text:span text:style-name="T27">this</text:span><text:span text:style-name="T23">.</text:span><text:span text:style-name="T25">originY</text:span><text:span text:style-name="T21">)</text:span><text:span text:style-name="T23">;</text:span></text:p>
            <text:p text:style-name="P19"/>
            <text:p text:style-name="P18"><text:span text:style-name="T28">        </text:span><text:span text:style-name="T29">// Calculate the true straight-line distance (Radial)</text:span></text:p>
            <text:p text:style-name="P18"><text:span text:style-name="T24">        </text:span><text:span text:style-name="T20">let</text:span><text:span text:style-name="T21"> </text:span><text:span text:style-name="T25">radialDistance</text:span><text:span text:style-name="T21"> </text:span><text:span text:style-name="T23">=</text:span><text:span text:style-name="T21"> </text:span><text:span text:style-name="T31">Math</text:span><text:span text:style-name="T23">.</text:span><text:span text:style-name="T30">floor</text:span><text:span text:style-name="T21">(</text:span><text:span text:style-name="T31">Math</text:span><text:span text:style-name="T23">.</text:span><text:span text:style-name="T30">sqrt</text:span><text:span text:style-name="T21">((</text:span><text:span text:style-name="T25">diffX</text:span><text:span text:style-name="T21"> * </text:span><text:span text:style-name="T25">diffX</text:span><text:span text:style-name="T21">) + (</text:span><text:span text:style-name="T25">diffY</text:span><text:span text:style-name="T21"> * </text:span><text:span text:style-name="T25">diffY</text:span><text:span text:style-name="T21">)))</text:span><text:span text:style-name="T23">;</text:span></text:p>
            <text:p text:style-name="P19"/>
            <text:p text:style-name="P18"><text:span text:style-name="T24">        </text:span><text:span text:style-name="T32">return</text:span><text:span text:style-name="T21"> </text:span><text:span text:style-name="T23">{</text:span><text:span text:style-name="T21"> </text:span></text:p>
            <text:p text:style-name="P18"><text:span text:style-name="T24">            </text:span><text:span text:style-name="T25">x</text:span><text:span text:style-name="T23">:</text:span><text:span text:style-name="T21"> </text:span><text:span text:style-name="T25">diffX</text:span><text:span text:style-name="T23">,</text:span><text:span text:style-name="T21"> </text:span></text:p>
            <text:p text:style-name="P18"><text:span text:style-name="T24">            </text:span><text:span text:style-name="T25">y</text:span><text:span text:style-name="T23">:</text:span><text:span text:style-name="T21"> </text:span><text:span text:style-name="T25">diffY</text:span><text:span text:style-name="T23">,</text:span><text:span text:style-name="T21"> </text:span></text:p>
            <text:p text:style-name="P18"><text:span text:style-name="T24">            </text:span><text:span text:style-name="T25">total</text:span><text:span text:style-name="T23">:</text:span><text:span text:style-name="T21"> </text:span><text:span text:style-name="T25">radialDistance</text:span><text:span text:style-name="T21"> </text:span></text:p>
            <text:p text:style-name="P18"><text:span text:style-name="T24">        </text:span><text:span text:style-name="T23">};</text:span></text:p>
            <text:p text:style-name="P18"><text:span text:style-name="T24">    </text:span><text:span text:style-name="T23">}</text:span></text:p>
            <text:p text:style-name="P18"><text:span text:style-name="T23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, Consolas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1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</office:styles>
  <office:automatic-styles>
    <style:page-layout style:name="PM0">
      <style:page-layout-properties fo:margin-top="0cm" fo:margin-bottom="0cm" fo:margin-left="0cm" fo:margin-right="0cm" fo:page-width="127cm" fo:page-height="1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1T09:08:14.822314600</meta:creation-date>
    <dc:date>2026-04-29T19:45:08.973724700</dc:date>
    <meta:editing-duration>P12DT14H6M50S</meta:editing-duration>
    <meta:editing-cycles>259</meta:editing-cycles>
    <meta:generator>LibreOffice/25.2.3.2$Windows_X86_64 LibreOffice_project/bbb074479178df812d175f709636b368952c2ce3</meta:generator>
    <dc:title>CATopalian JavaScript Component Based Architecture Flow</dc:title>
    <dc:publisher>Christopher Andrew Topalian</dc:publisher>
    <meta:document-statistic meta:object-count="90"/>
  </office:meta>
</office:document-meta>
</file>