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75.87cm" fo:min-width="88.27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9.625cm" fo:min-width="8.57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446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83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883cm" fo:min-width="10.63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3.957cm" fo:min-width="9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3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1.25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4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5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96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349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color="#00bfff" draw:fill="none" fo:min-height="27.552cm" loext:decorative="false"/>
      <style:paragraph-properties style:writing-mode="lr-tb"/>
    </style:style>
    <style:style style:name="gr24" style:family="graphic" style:parent-style-name="standard">
      <style:graphic-properties draw:stroke="solid" svg:stroke-color="#00bfff" draw:fill="none" fo:min-height="22.155cm" loext:decorative="false"/>
      <style:paragraph-properties style:writing-mode="lr-tb"/>
    </style:style>
    <style:style style:name="gr25" style:family="graphic" style:parent-style-name="standard">
      <style:graphic-properties draw:stroke="solid" svg:stroke-color="#00bfff" draw:fill="none" fo:min-height="39.617cm" loext:decorative="false"/>
      <style:paragraph-properties style:writing-mode="lr-tb"/>
    </style:style>
    <style:style style:name="gr26" style:family="graphic" style:parent-style-name="standard">
      <style:graphic-properties draw:stroke="solid" svg:stroke-color="#00bfff" draw:fill="none" fo:min-height="53.72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14.91cm" fo:min-width="42.867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4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6pt" fo:font-weight="bold" style:font-size-asian="16pt" style:font-size-complex="16pt"/>
    </style:style>
    <style:style style:name="P6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8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9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10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size-complex="15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left="0cm" fo:margin-right="0cm" style:line-height-at-least="1.085cm" fo:text-indent="0cm"/>
    </style:style>
    <style:style style:name="P19" style:family="paragraph">
      <style:paragraph-properties style:line-height-at-least="1.085cm"/>
    </style:style>
    <style:style style:name="P20" style:family="paragraph">
      <loext:graphic-properties draw:fill="none"/>
      <style:paragraph-properties fo:margin-left="0cm" fo:margin-right="0cm" style:line-height-at-least="1.085cm" fo:text-indent="0cm"/>
      <style:text-properties style:font-name="Arial" fo:font-size="22.5pt" fo:font-weight="bold" style:font-name-complex="Arial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4" style:family="text">
      <style:text-properties fo:font-variant="normal" fo:text-transform="none" fo:color="#ffc0cb" loext:opacity="100%" style:text-outline="false" style:text-line-through-style="none" style:text-line-through-type="none" style:font-name="Liberation Sans1" fo:font-size="17pt" fo:font-style="normal" fo:text-shadow="1pt 1pt" style:text-underline-style="none" fo:font-weight="bold" style:letter-kerning="true" style:font-name-asian="Microsoft YaHei" style:font-size-asian="17pt" style:font-style-asian="normal" style:font-weight-asian="bold" style:font-name-complex="Arial3" style:font-size-complex="1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c0cb" loext:opacity="100%" fo:font-size="17pt" fo:text-shadow="1pt 1pt" fo:font-weight="bold" style:font-size-asian="17pt" style:font-weight-asian="bold" style:font-size-complex="17pt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8" style:family="text">
      <style:text-properties fo:color="#ffffff" loext:opacity="100%" fo:font-size="15pt" fo:font-weight="bold" style:font-size-asian="15pt" style:font-size-complex="15pt"/>
    </style:style>
    <style:style style:name="T9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3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13" style:family="text">
      <style:text-properties fo:font-variant="normal" fo:text-transform="none" fo:color="#ffff00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3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ffff" loext:opacity="100%" fo:font-size="15pt" fo:font-weight="bold" style:font-size-asian="15pt" style:font-size-complex="15pt"/>
    </style:style>
    <style:style style:name="T15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9cccc" loext:opacity="100%" style:font-name="Arial" fo:font-size="22.5pt" fo:font-weight="bold" style:font-name-complex="Arial"/>
    </style:style>
    <style:style style:name="T18" style:family="text">
      <style:text-properties fo:color="#cccccc" loext:opacity="100%" style:font-name="Arial" fo:font-size="22.5pt" fo:font-weight="bold" style:font-name-complex="Arial"/>
    </style:style>
    <style:style style:name="T19" style:family="text">
      <style:text-properties fo:color="#00ffff" loext:opacity="100%" style:font-name="Arial" fo:font-size="22.5pt" fo:font-weight="bold" style:font-name-complex="Arial"/>
    </style:style>
    <style:style style:name="T20" style:family="text">
      <style:text-properties fo:color="#ffffff" loext:opacity="100%" style:font-name="Arial" fo:font-size="22.5pt" fo:font-weight="bold" style:font-name-complex="Arial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ccccc" loext:opacity="100%"/>
    </style:style>
    <style:style style:name="T23" style:family="text">
      <style:text-properties fo:color="#569cd6" loext:opacity="100%" style:font-name="Arial" fo:font-size="22.5pt" fo:font-weight="bold" style:font-name-complex="Arial"/>
    </style:style>
    <style:style style:name="T24" style:family="text">
      <style:text-properties fo:color="#bcb4ff" loext:opacity="100%" style:font-name="Arial" fo:font-size="22.5pt" fo:font-weight="bold" style:font-name-complex="Arial"/>
    </style:style>
    <style:style style:name="T25" style:family="text">
      <style:text-properties fo:color="#fffb00" loext:opacity="100%" style:font-name="Arial" fo:font-size="22.5pt" fo:font-weight="bold" style:font-name-complex="Arial"/>
    </style:style>
    <style:style style:name="T26" style:family="text">
      <style:text-properties fo:color="#ffffff" loext:opacity="100%"/>
    </style:style>
    <style:style style:name="T27" style:family="text">
      <style:text-properties fo:color="#959595" loext:opacity="100%" style:font-name="Arial" fo:font-size="22.5pt" fo:font-weight="bold" style:font-name-complex="Arial"/>
    </style:style>
    <style:style style:name="T28" style:family="text">
      <style:text-properties fo:color="#d4d4d4" loext:opacity="100%" style:font-name="Arial" fo:font-size="22.5pt" fo:font-weight="bold" style:font-name-complex="Arial"/>
    </style:style>
    <style:style style:name="T29" style:family="text">
      <style:text-properties fo:color="#d3d3d3" loext:opacity="100%" style:font-name="Arial" fo:font-size="22.5pt" fo:font-weight="bold" style:font-name-complex="Arial"/>
    </style:style>
    <style:style style:name="T30" style:family="text">
      <style:text-properties fo:color="#d4d4d4" loext:opacity="100%"/>
    </style:style>
    <style:style style:name="T31" style:family="text">
      <style:text-properties fo:color="#9cdcfe" loext:opacity="100%" style:font-name="Arial" fo:font-size="22.5pt" fo:font-weight="bold" style:font-name-complex="Arial"/>
    </style:style>
    <style:style style:name="T32" style:family="text">
      <style:text-properties fo:color="#f09dff" loext:opacity="100%" style:font-name="Arial" fo:font-size="22.5pt" fo:font-weight="bold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8.85cm" svg:height="76.2cm" svg:x="0.05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3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4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9.157cm" svg:height="9.955cm" svg:x="5.615cm" svg:y="5.275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8.803cm" svg:height="0.719cm" svg:x="5.787cm" svg:y="6.956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5.787cm" svg:y="14.171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5.787cm" svg:y="13.217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776cm" svg:x="66.576cm" svg:y="9.477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66.729cm" svg:y="11.875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24.625cm" svg:y="8.983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287cm" svg:x="44.427cm" svg:y="10.785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44.641cm" svg:y="12.409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1.586cm" svg:x="44.641cm" svg:y="13.236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text:p text:style-name="P10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803cm" svg:height="2.076cm" svg:x="5.787cm" svg:y="7.821cm">
          <text:p text:style-name="P14"><text:span text:style-name="T6">- </text:span><text:span text:style-name="T7">location</text:span><text:span text:style-name="T8">: </text:span><text:span text:style-name="T14">LocationComponent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8.803cm" svg:height="0.719cm" svg:x="5.787cm" svg:y="10.087cm">
          <text:p text:style-name="P14"><text:span text:style-name="T6">- </text:span><text:span text:style-name="T7">led</text:span><text:span text:style-name="T8">: </text:span><text:span text:style-name="T14">LEDComponent(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24.802cm" svg:y="10.621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24.802cm" svg:y="14.11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24.802cm" svg:y="13.096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0.883cm" svg:height="0.632cm" svg:x="24.802cm" svg:y="11.421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883cm" svg:height="0.702cm" svg:x="24.802cm" svg:y="12.221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803cm" svg:height="2.12cm" svg:x="5.787cm" svg:y="10.952cm">
          <text:p text:style-name="P14"><text:span text:style-name="T6">- </text:span><text:span text:style-name="T15">distanceTracker</text:span><text:span text:style-name="T8">: </text:span><text:span text:style-name="T14">DistanceComponent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66.729cm" svg:y="12.72cm">
          <text:p text:style-name="P10"><text:span text:style-name="T11">- </text:span><text:span text:style-name="T16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66.729cm" svg:y="13.566cm">
          <text:p text:style-name="P10"><text:span text:style-name="T11">- </text:span><text:span text:style-name="T16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66.729cm" svg:y="14.402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6.475cm" svg:height="27.802cm" svg:x="21.865cm" svg:y="15.695cm">
          <draw:text-box>
            <text:p text:style-name="P18"><text:span text:style-name="T17">class</text:span><text:span text:style-name="T18"> </text:span><text:span text:style-name="T19">LocationComponent</text:span></text:p>
            <text:p text:style-name="P18"><text:span text:style-name="T20">{</text:span></text:p>
            <text:p text:style-name="P18"><text:span text:style-name="T21">    </text:span><text:span text:style-name="T17">constructor</text:span><text:span text:style-name="T20">(</text:span><text:span text:style-name="T18">elementId</text:span><text:span text:style-name="T20">,</text:span><text:span text:style-name="T18"> startX</text:span><text:span text:style-name="T20">,</text:span><text:span text:style-name="T18"> startY</text:span><text:span text:style-name="T20">)</text:span></text:p>
            <text:p text:style-name="P18"><text:span text:style-name="T22">    </text:span><text:span text:style-name="T20">{</text:span></text:p>
            <text:p text:style-name="P18"><text:span text:style-name="T22">        </text:span><text:span text:style-name="T23">this</text:span><text:span text:style-name="T20">.</text:span><text:span text:style-name="T24">element</text:span><text:span text:style-name="T18"> </text:span><text:span text:style-name="T20">=</text:span><text:span text:style-name="T18"> </text:span><text:span text:style-name="T25">ge</text:span><text:span text:style-name="T20">(</text:span><text:span text:style-name="T24">elementId</text:span><text:span text:style-name="T20">);</text:span></text:p>
            <text:p text:style-name="P18"><text:span text:style-name="T22">        </text:span><text:span text:style-name="T23">this</text:span><text:span text:style-name="T20">.</text:span><text:span text:style-name="T24">x</text:span><text:span text:style-name="T18"> </text:span><text:span text:style-name="T20">=</text:span><text:span text:style-name="T18"> </text:span><text:span text:style-name="T24">startX</text:span><text:span text:style-name="T20">;</text:span></text:p>
            <text:p text:style-name="P18"><text:span text:style-name="T22">        </text:span><text:span text:style-name="T23">this</text:span><text:span text:style-name="T20">.</text:span><text:span text:style-name="T24">y</text:span><text:span text:style-name="T18"> </text:span><text:span text:style-name="T20">=</text:span><text:span text:style-name="T18"> </text:span><text:span text:style-name="T24">startY</text:span><text:span text:style-name="T20">;</text:span></text:p>
            <text:p text:style-name="P19"/>
            <text:p text:style-name="P18"><text:span text:style-name="T26">        </text:span><text:span text:style-name="T27">// set the starting position in the DOM</text:span></text:p>
            <text:p text:style-name="P18"><text:span text:style-name="T22">        </text:span><text:span text:style-name="T23">this</text:span><text:span text:style-name="T20">.</text:span><text:span text:style-name="T24">element</text:span><text:span text:style-name="T20">.</text:span><text:span text:style-name="T24">style</text:span><text:span text:style-name="T20">.</text:span><text:span text:style-name="T24">left</text:span><text:span text:style-name="T18"> </text:span><text:span text:style-name="T20">=</text:span><text:span text:style-name="T18"> </text:span><text:span text:style-name="T23">this</text:span><text:span text:style-name="T20">.</text:span><text:span text:style-name="T24">x</text:span><text:span text:style-name="T18"> </text:span><text:span text:style-name="T28">+</text:span><text:span text:style-name="T18"> </text:span><text:span text:style-name="T20">"</text:span><text:span text:style-name="T29">px</text:span><text:span text:style-name="T20">";</text:span></text:p>
            <text:p text:style-name="P18"><text:span text:style-name="T22">        </text:span><text:span text:style-name="T23">this</text:span><text:span text:style-name="T20">.</text:span><text:span text:style-name="T24">element</text:span><text:span text:style-name="T20">.</text:span><text:span text:style-name="T24">style</text:span><text:span text:style-name="T20">.</text:span><text:span text:style-name="T24">top</text:span><text:span text:style-name="T18"> </text:span><text:span text:style-name="T20">=</text:span><text:span text:style-name="T18"> </text:span><text:span text:style-name="T23">this</text:span><text:span text:style-name="T20">.</text:span><text:span text:style-name="T24">y</text:span><text:span text:style-name="T18"> </text:span><text:span text:style-name="T28">+</text:span><text:span text:style-name="T18"> </text:span><text:span text:style-name="T20">"</text:span><text:span text:style-name="T29">px</text:span><text:span text:style-name="T20">";</text:span></text:p>
            <text:p text:style-name="P18"><text:span text:style-name="T22">    </text:span><text:span text:style-name="T20">}</text:span></text:p>
            <text:p text:style-name="P19"/>
            <text:p text:style-name="P18"><text:span text:style-name="T22">    </text:span><text:span text:style-name="T25">moveLeft</text:span><text:span text:style-name="T20">()</text:span></text:p>
            <text:p text:style-name="P18"><text:span text:style-name="T22">    </text:span><text:span text:style-name="T20">{</text:span></text:p>
            <text:p text:style-name="P18"><text:span text:style-name="T22">        </text:span><text:span text:style-name="T23">this</text:span><text:span text:style-name="T20">.</text:span><text:span text:style-name="T24">x</text:span><text:span text:style-name="T18"> </text:span><text:span text:style-name="T20">-=</text:span><text:span text:style-name="T18"> </text:span><text:span text:style-name="T29">50</text:span><text:span text:style-name="T20">;</text:span></text:p>
            <text:p text:style-name="P18"><text:span text:style-name="T22">        </text:span><text:span text:style-name="T23">this</text:span><text:span text:style-name="T20">.</text:span><text:span text:style-name="T24">element</text:span><text:span text:style-name="T20">.</text:span><text:span text:style-name="T24">style</text:span><text:span text:style-name="T20">.</text:span><text:span text:style-name="T24">left</text:span><text:span text:style-name="T18"> </text:span><text:span text:style-name="T20">=</text:span><text:span text:style-name="T18"> </text:span><text:span text:style-name="T23">this</text:span><text:span text:style-name="T20">.</text:span><text:span text:style-name="T24">x</text:span><text:span text:style-name="T18"> </text:span><text:span text:style-name="T28">+</text:span><text:span text:style-name="T18"> </text:span><text:span text:style-name="T20">"</text:span><text:span text:style-name="T29">px</text:span><text:span text:style-name="T20">";</text:span></text:p>
            <text:p text:style-name="P18"><text:span text:style-name="T22">    </text:span><text:span text:style-name="T20">}</text:span></text:p>
            <text:p text:style-name="P19"/>
            <text:p text:style-name="P18"><text:span text:style-name="T22">    </text:span><text:span text:style-name="T25">moveRight</text:span><text:span text:style-name="T20">()</text:span></text:p>
            <text:p text:style-name="P18"><text:span text:style-name="T22">    </text:span><text:span text:style-name="T20">{</text:span></text:p>
            <text:p text:style-name="P18"><text:span text:style-name="T22">        </text:span><text:span text:style-name="T23">this</text:span><text:span text:style-name="T20">.</text:span><text:span text:style-name="T24">x</text:span><text:span text:style-name="T18"> </text:span><text:span text:style-name="T20">+=</text:span><text:span text:style-name="T18"> </text:span><text:span text:style-name="T29">50</text:span><text:span text:style-name="T20">;</text:span></text:p>
            <text:p text:style-name="P18"><text:span text:style-name="T22">        </text:span><text:span text:style-name="T23">this</text:span><text:span text:style-name="T20">.</text:span><text:span text:style-name="T24">element</text:span><text:span text:style-name="T20">.</text:span><text:span text:style-name="T24">style</text:span><text:span text:style-name="T20">.</text:span><text:span text:style-name="T24">left</text:span><text:span text:style-name="T18"> </text:span><text:span text:style-name="T20">=</text:span><text:span text:style-name="T18"> </text:span><text:span text:style-name="T23">this</text:span><text:span text:style-name="T20">.</text:span><text:span text:style-name="T24">x</text:span><text:span text:style-name="T18"> </text:span><text:span text:style-name="T28">+</text:span><text:span text:style-name="T18"> </text:span><text:span text:style-name="T20">"</text:span><text:span text:style-name="T29">px</text:span><text:span text:style-name="T20">";</text:span></text:p>
            <text:p text:style-name="P18"><text:span text:style-name="T22">    </text:span><text:span text:style-name="T20">}</text:span></text:p>
            <text:p text:style-name="P18"><text:span text:style-name="T20">}</text:span></text:p>
          </draw:text-box>
        </draw:frame>
        <draw:frame draw:style-name="gr24" draw:text-style-name="P20" draw:layer="layout" svg:width="20.243cm" svg:height="22.405cm" svg:x="39.509cm" svg:y="15.695cm">
          <draw:text-box>
            <text:p text:style-name="P18"><text:span text:style-name="T17">class</text:span><text:span text:style-name="T28"> </text:span><text:span text:style-name="T19">LEDComponent</text:span></text:p>
            <text:p text:style-name="P18"><text:span text:style-name="T20">{</text:span></text:p>
            <text:p text:style-name="P18"><text:span text:style-name="T30">    </text:span><text:span text:style-name="T17">constructor</text:span><text:span text:style-name="T20">(</text:span><text:span text:style-name="T24">elementId</text:span><text:span text:style-name="T20">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element</text:span><text:span text:style-name="T28"> </text:span><text:span text:style-name="T20">=</text:span><text:span text:style-name="T28"> </text:span><text:span text:style-name="T25">ge</text:span><text:span text:style-name="T28">(</text:span><text:span text:style-name="T24">elementId</text:span><text:span text:style-name="T28">)</text:span><text:span text:style-name="T20">;</text:span></text:p>
            <text:p text:style-name="P18"><text:span text:style-name="T30">    </text:span><text:span text:style-name="T20">}</text:span></text:p>
            <text:p text:style-name="P19"/>
            <text:p text:style-name="P18"><text:span text:style-name="T30">    </text:span><text:span text:style-name="T25">setColor</text:span><text:span text:style-name="T20">(</text:span><text:span text:style-name="T24">newColor</text:span><text:span text:style-name="T20">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element</text:span><text:span text:style-name="T20">.</text:span><text:span text:style-name="T31">style</text:span><text:span text:style-name="T20">.</text:span><text:span text:style-name="T31">backgroundColor</text:span><text:span text:style-name="T28"> </text:span><text:span text:style-name="T20">=</text:span><text:span text:style-name="T28"> </text:span><text:span text:style-name="T24">newColor</text:span><text:span text:style-name="T20">;</text:span></text:p>
            <text:p text:style-name="P18"><text:span text:style-name="T30">    </text:span><text:span text:style-name="T20">}</text:span></text:p>
            <text:p text:style-name="P19"/>
            <text:p text:style-name="P18"><text:span text:style-name="T30">    </text:span><text:span text:style-name="T25">randomColor</text:span><text:span text:style-name="T20">(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17">let</text:span><text:span text:style-name="T28"> </text:span><text:span text:style-name="T24">r</text:span><text:span text:style-name="T28"> </text:span><text:span text:style-name="T20">=</text:span><text:span text:style-name="T28"> </text:span><text:span text:style-name="T31">Math</text:span><text:span text:style-name="T20">.</text:span><text:span text:style-name="T25">floor</text:span><text:span text:style-name="T28">(</text:span><text:span text:style-name="T31">Math</text:span><text:span text:style-name="T20">.</text:span><text:span text:style-name="T25">random</text:span><text:span text:style-name="T28">() * </text:span><text:span text:style-name="T29">255</text:span><text:span text:style-name="T28">)</text:span><text:span text:style-name="T20">;</text:span></text:p>
            <text:p text:style-name="P18"><text:span text:style-name="T30">        </text:span><text:span text:style-name="T17">let</text:span><text:span text:style-name="T28"> </text:span><text:span text:style-name="T24">g</text:span><text:span text:style-name="T28"> </text:span><text:span text:style-name="T20">=</text:span><text:span text:style-name="T28"> </text:span><text:span text:style-name="T31">Math</text:span><text:span text:style-name="T20">.</text:span><text:span text:style-name="T25">floor</text:span><text:span text:style-name="T28">(</text:span><text:span text:style-name="T31">Math</text:span><text:span text:style-name="T20">.</text:span><text:span text:style-name="T25">random</text:span><text:span text:style-name="T28">() * </text:span><text:span text:style-name="T29">255</text:span><text:span text:style-name="T28">)</text:span><text:span text:style-name="T20">;</text:span></text:p>
            <text:p text:style-name="P18"><text:span text:style-name="T30">        </text:span><text:span text:style-name="T17">let</text:span><text:span text:style-name="T28"> </text:span><text:span text:style-name="T24">b</text:span><text:span text:style-name="T28"> </text:span><text:span text:style-name="T20">=</text:span><text:span text:style-name="T28"> </text:span><text:span text:style-name="T31">Math</text:span><text:span text:style-name="T20">.</text:span><text:span text:style-name="T25">floor</text:span><text:span text:style-name="T28">(</text:span><text:span text:style-name="T31">Math</text:span><text:span text:style-name="T20">.</text:span><text:span text:style-name="T25">random</text:span><text:span text:style-name="T28">() * </text:span><text:span text:style-name="T29">255</text:span><text:span text:style-name="T28">)</text:span><text:span text:style-name="T20">;</text:span></text:p>
            <text:p text:style-name="P18"><text:span text:style-name="T30">        </text:span><text:span text:style-name="T23">this</text:span><text:span text:style-name="T20">.</text:span><text:span text:style-name="T25">setColor</text:span><text:span text:style-name="T28">(</text:span><text:span text:style-name="T20">`</text:span><text:span text:style-name="T29">rgb(</text:span><text:span text:style-name="T23">${</text:span><text:span text:style-name="T24">r</text:span><text:span text:style-name="T23">}</text:span><text:span text:style-name="T29">, </text:span><text:span text:style-name="T23">${</text:span><text:span text:style-name="T24">g</text:span><text:span text:style-name="T23">}</text:span><text:span text:style-name="T29">, </text:span><text:span text:style-name="T23">${</text:span><text:span text:style-name="T24">b</text:span><text:span text:style-name="T23">}</text:span><text:span text:style-name="T29">)</text:span><text:span text:style-name="T20">`</text:span><text:span text:style-name="T28">)</text:span><text:span text:style-name="T20">;</text:span></text:p>
            <text:p text:style-name="P18"><text:span text:style-name="T30">    </text:span><text:span text:style-name="T20">}</text:span></text:p>
            <text:p text:style-name="P18"><text:span text:style-name="T20">}</text:span></text:p>
          </draw:text-box>
        </draw:frame>
        <draw:frame draw:style-name="gr25" draw:text-style-name="P20" draw:layer="layout" svg:width="20.135cm" svg:height="39.867cm" svg:x="61.15cm" svg:y="15.695cm">
          <draw:text-box>
            <text:p text:style-name="P18"><text:span text:style-name="T17">class</text:span><text:span text:style-name="T28"> </text:span><text:span text:style-name="T19">DistanceComponent</text:span></text:p>
            <text:p text:style-name="P18"><text:span text:style-name="T20">{</text:span></text:p>
            <text:p text:style-name="P18"><text:span text:style-name="T30">    </text:span><text:span text:style-name="T17">constructor</text:span><text:span text:style-name="T20">(</text:span><text:span text:style-name="T24">elementId</text:span><text:span text:style-name="T20">,</text:span><text:span text:style-name="T28"> </text:span><text:span text:style-name="T24">originX</text:span><text:span text:style-name="T28"> </text:span><text:span text:style-name="T20">=</text:span><text:span text:style-name="T28"> </text:span><text:span text:style-name="T29">0</text:span><text:span text:style-name="T20">,</text:span><text:span text:style-name="T28"> </text:span><text:span text:style-name="T24">originY</text:span><text:span text:style-name="T28"> </text:span><text:span text:style-name="T20">=</text:span><text:span text:style-name="T28"> </text:span><text:span text:style-name="T29">0</text:span><text:span text:style-name="T20">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elementId</text:span><text:span text:style-name="T28"> </text:span><text:span text:style-name="T20">=</text:span><text:span text:style-name="T28"> </text:span><text:span text:style-name="T24">elementId</text:span><text:span text:style-name="T20">;</text:span></text:p>
            <text:p text:style-name="P19"/>
            <text:p text:style-name="P18"><text:span text:style-name="T26">        </text:span><text:span text:style-name="T27">// The anchor point we are measuring from</text:span></text:p>
            <text:p text:style-name="P18"><text:span text:style-name="T30">        </text:span><text:span text:style-name="T23">this</text:span><text:span text:style-name="T20">.</text:span><text:span text:style-name="T24">originX</text:span><text:span text:style-name="T28"> </text:span><text:span text:style-name="T20">=</text:span><text:span text:style-name="T28"> </text:span><text:span text:style-name="T24">originX</text:span><text:span text:style-name="T20">;</text:span></text:p>
            <text:p text:style-name="P18"><text:span text:style-name="T30">        </text:span><text:span text:style-name="T23">this</text:span><text:span text:style-name="T20">.</text:span><text:span text:style-name="T24">originY</text:span><text:span text:style-name="T28"> </text:span><text:span text:style-name="T20">=</text:span><text:span text:style-name="T28"> </text:span><text:span text:style-name="T24">originY</text:span><text:span text:style-name="T20">;</text:span></text:p>
            <text:p text:style-name="P18"><text:span text:style-name="T30">    </text:span><text:span text:style-name="T20">}</text:span></text:p>
            <text:p text:style-name="P19"/>
            <text:p text:style-name="P18"><text:span text:style-name="T26">    </text:span><text:span text:style-name="T27">// asks the DOM for position, returns the math</text:span></text:p>
            <text:p text:style-name="P18"><text:span text:style-name="T30">    </text:span><text:span text:style-name="T25">getDistanceFromOrigin</text:span><text:span text:style-name="T20">()</text:span></text:p>
            <text:p text:style-name="P18"><text:span text:style-name="T30">    </text:span><text:span text:style-name="T20">{</text:span></text:p>
            <text:p text:style-name="P18"><text:span text:style-name="T26">        </text:span><text:span text:style-name="T27">// Uses our shortcut to get the physical DOM rect</text:span></text:p>
            <text:p text:style-name="P18"><text:span text:style-name="T30">        </text:span><text:span text:style-name="T17">let</text:span><text:span text:style-name="T28"> </text:span><text:span text:style-name="T24">rect</text:span><text:span text:style-name="T28"> </text:span><text:span text:style-name="T20">=</text:span><text:span text:style-name="T28"> </text:span><text:span text:style-name="T25">gr</text:span><text:span text:style-name="T28">(</text:span><text:span text:style-name="T23">this</text:span><text:span text:style-name="T20">.</text:span><text:span text:style-name="T24">elementId</text:span><text:span text:style-name="T28">)</text:span><text:span text:style-name="T20">;</text:span><text:span text:style-name="T28"> </text:span></text:p>
            <text:p text:style-name="P18"><text:span text:style-name="T30">        </text:span></text:p>
            <text:p text:style-name="P18"><text:span text:style-name="T26">        </text:span><text:span text:style-name="T27">// Calculate the difference between current position and origin</text:span></text:p>
            <text:p text:style-name="P18"><text:span text:style-name="T30">        </text:span><text:span text:style-name="T17">let</text:span><text:span text:style-name="T28"> </text:span><text:span text:style-name="T24">diffX</text:span><text:span text:style-name="T28"> </text:span><text:span text:style-name="T20">=</text:span><text:span text:style-name="T28"> </text:span><text:span text:style-name="T31">Math</text:span><text:span text:style-name="T20">.</text:span><text:span text:style-name="T25">abs</text:span><text:span text:style-name="T28">(</text:span><text:span text:style-name="T24">rect</text:span><text:span text:style-name="T20">.</text:span><text:span text:style-name="T31">x</text:span><text:span text:style-name="T28"> - </text:span><text:span text:style-name="T23">this</text:span><text:span text:style-name="T20">.</text:span><text:span text:style-name="T24">originX</text:span><text:span text:style-name="T28">)</text:span><text:span text:style-name="T20">;</text:span></text:p>
            <text:p text:style-name="P18"><text:span text:style-name="T30">        </text:span><text:span text:style-name="T17">let</text:span><text:span text:style-name="T28"> </text:span><text:span text:style-name="T24">diffY</text:span><text:span text:style-name="T28"> </text:span><text:span text:style-name="T20">=</text:span><text:span text:style-name="T28"> </text:span><text:span text:style-name="T31">Math</text:span><text:span text:style-name="T20">.</text:span><text:span text:style-name="T25">abs</text:span><text:span text:style-name="T28">(</text:span><text:span text:style-name="T24">rect</text:span><text:span text:style-name="T20">.</text:span><text:span text:style-name="T31">y</text:span><text:span text:style-name="T28"> - </text:span><text:span text:style-name="T23">this</text:span><text:span text:style-name="T20">.</text:span><text:span text:style-name="T24">originY</text:span><text:span text:style-name="T28">)</text:span><text:span text:style-name="T20">;</text:span></text:p>
            <text:p text:style-name="P19"/>
            <text:p text:style-name="P18"><text:span text:style-name="T26">        </text:span><text:span text:style-name="T27">// Calculate the true straight-line distance (Radial)</text:span></text:p>
            <text:p text:style-name="P18"><text:span text:style-name="T30">        </text:span><text:span text:style-name="T17">let</text:span><text:span text:style-name="T28"> </text:span><text:span text:style-name="T24">radialDistance</text:span><text:span text:style-name="T28"> </text:span><text:span text:style-name="T20">=</text:span><text:span text:style-name="T28"> </text:span><text:span text:style-name="T31">Math</text:span><text:span text:style-name="T20">.</text:span><text:span text:style-name="T25">floor</text:span><text:span text:style-name="T28">(</text:span><text:span text:style-name="T31">Math</text:span><text:span text:style-name="T20">.</text:span><text:span text:style-name="T25">sqrt</text:span><text:span text:style-name="T28">((</text:span><text:span text:style-name="T24">diffX</text:span><text:span text:style-name="T28"> * </text:span><text:span text:style-name="T24">diffX</text:span><text:span text:style-name="T28">) + (</text:span><text:span text:style-name="T24">diffY</text:span><text:span text:style-name="T28"> * </text:span><text:span text:style-name="T24">diffY</text:span><text:span text:style-name="T28">)))</text:span><text:span text:style-name="T20">;</text:span></text:p>
            <text:p text:style-name="P19"/>
            <text:p text:style-name="P18"><text:span text:style-name="T30">        </text:span><text:span text:style-name="T32">return</text:span><text:span text:style-name="T28"> </text:span><text:span text:style-name="T20">{</text:span><text:span text:style-name="T28"> </text:span></text:p>
            <text:p text:style-name="P18"><text:span text:style-name="T30">            </text:span><text:span text:style-name="T24">x</text:span><text:span text:style-name="T20">:</text:span><text:span text:style-name="T28"> </text:span><text:span text:style-name="T24">diffX</text:span><text:span text:style-name="T20">,</text:span><text:span text:style-name="T28"> </text:span></text:p>
            <text:p text:style-name="P18"><text:span text:style-name="T30">            </text:span><text:span text:style-name="T24">y</text:span><text:span text:style-name="T20">:</text:span><text:span text:style-name="T28"> </text:span><text:span text:style-name="T24">diffY</text:span><text:span text:style-name="T20">,</text:span><text:span text:style-name="T28"> </text:span></text:p>
            <text:p text:style-name="P18"><text:span text:style-name="T30">            </text:span><text:span text:style-name="T24">total</text:span><text:span text:style-name="T20">:</text:span><text:span text:style-name="T28"> </text:span><text:span text:style-name="T24">radialDistance</text:span><text:span text:style-name="T28"> </text:span></text:p>
            <text:p text:style-name="P18"><text:span text:style-name="T30">        </text:span><text:span text:style-name="T20">};</text:span></text:p>
            <text:p text:style-name="P18"><text:span text:style-name="T30">    </text:span><text:span text:style-name="T20">}</text:span></text:p>
            <text:p text:style-name="P18"><text:span text:style-name="T20">}</text:span></text:p>
          </draw:text-box>
        </draw:frame>
        <draw:frame draw:style-name="gr26" draw:text-style-name="P20" draw:layer="layout" svg:width="19.914cm" svg:height="53.975cm" svg:x="0.793cm" svg:y="15.695cm">
          <draw:text-box>
            <text:p text:style-name="P18"><text:span text:style-name="T17">class</text:span><text:span text:style-name="T28"> </text:span><text:span text:style-name="T19">Drone</text:span></text:p>
            <text:p text:style-name="P18"><text:span text:style-name="T20">{</text:span></text:p>
            <text:p text:style-name="P18"><text:span text:style-name="T30">    </text:span><text:span text:style-name="T17">constructor</text:span><text:span text:style-name="T20">(</text:span><text:span text:style-name="T24">id</text:span><text:span text:style-name="T20">,</text:span><text:span text:style-name="T28"> </text:span><text:span text:style-name="T24">startX</text:span><text:span text:style-name="T20">,</text:span><text:span text:style-name="T28"> </text:span><text:span text:style-name="T24">startY</text:span><text:span text:style-name="T20">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id</text:span><text:span text:style-name="T28"> </text:span><text:span text:style-name="T20">=</text:span><text:span text:style-name="T28"> </text:span><text:span text:style-name="T24">id</text:span><text:span text:style-name="T20">;</text:span></text:p>
            <text:p text:style-name="P19"/>
            <text:p text:style-name="P18"><text:span text:style-name="T30">        </text:span><text:span text:style-name="T23">this</text:span><text:span text:style-name="T20">.</text:span><text:span text:style-name="T24">location</text:span><text:span text:style-name="T28"> </text:span><text:span text:style-name="T20">=</text:span><text:span text:style-name="T28"> </text:span><text:span text:style-name="T23">new</text:span><text:span text:style-name="T28"> </text:span><text:span text:style-name="T19">LocationComponent</text:span><text:span text:style-name="T28">(</text:span><text:span text:style-name="T24">id</text:span><text:span text:style-name="T20">,</text:span><text:span text:style-name="T28"> </text:span><text:span text:style-name="T24">startX</text:span><text:span text:style-name="T20">,</text:span><text:span text:style-name="T28"> </text:span><text:span text:style-name="T24">startY</text:span><text:span text:style-name="T28">)</text:span><text:span text:style-name="T20">;</text:span></text:p>
            <text:p text:style-name="P19"/>
            <text:p text:style-name="P18"><text:span text:style-name="T30">        </text:span><text:span text:style-name="T23">this</text:span><text:span text:style-name="T20">.</text:span><text:span text:style-name="T24">led</text:span><text:span text:style-name="T28"> </text:span><text:span text:style-name="T20">=</text:span><text:span text:style-name="T28"> </text:span><text:span text:style-name="T23">new</text:span><text:span text:style-name="T28"> </text:span><text:span text:style-name="T19">LEDComponent</text:span><text:span text:style-name="T28">(</text:span><text:span text:style-name="T24">id</text:span><text:span text:style-name="T28">)</text:span><text:span text:style-name="T20">;</text:span></text:p>
            <text:p text:style-name="P19"/>
            <text:p text:style-name="P18"><text:span text:style-name="T30">        </text:span><text:span text:style-name="T23">this</text:span><text:span text:style-name="T20">.</text:span><text:span text:style-name="T24">distanceTracker</text:span><text:span text:style-name="T28"> </text:span><text:span text:style-name="T20">=</text:span><text:span text:style-name="T28"> </text:span><text:span text:style-name="T23">new</text:span><text:span text:style-name="T28"> </text:span><text:span text:style-name="T19">DistanceComponent</text:span><text:span text:style-name="T28">(</text:span><text:span text:style-name="T24">id</text:span><text:span text:style-name="T20">,</text:span><text:span text:style-name="T28"> </text:span><text:span text:style-name="T24">startX</text:span><text:span text:style-name="T20">,</text:span><text:span text:style-name="T28"> </text:span><text:span text:style-name="T24">startY</text:span><text:span text:style-name="T28">)</text:span><text:span text:style-name="T20">;</text:span></text:p>
            <text:p text:style-name="P18"><text:span text:style-name="T30">    </text:span><text:span text:style-name="T20">}</text:span></text:p>
            <text:p text:style-name="P19"/>
            <text:p text:style-name="P18"><text:span text:style-name="T30">    </text:span><text:span text:style-name="T25">flyLeft</text:span><text:span text:style-name="T20">(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location</text:span><text:span text:style-name="T20">.</text:span><text:span text:style-name="T25">moveLeft</text:span><text:span text:style-name="T28">()</text:span><text:span text:style-name="T20">;</text:span></text:p>
            <text:p text:style-name="P19"/>
            <text:p text:style-name="P18"><text:span text:style-name="T26">        </text:span><text:span text:style-name="T27">// Retrieve the math object from the chip</text:span></text:p>
            <text:p text:style-name="P18"><text:span text:style-name="T30">        </text:span><text:span text:style-name="T17">let</text:span><text:span text:style-name="T28"> </text:span><text:span text:style-name="T24">distanceData</text:span><text:span text:style-name="T28"> </text:span><text:span text:style-name="T20">=</text:span><text:span text:style-name="T28"> </text:span><text:span text:style-name="T23">this</text:span><text:span text:style-name="T20">.</text:span><text:span text:style-name="T24">distanceTracker</text:span><text:span text:style-name="T20">.</text:span><text:span text:style-name="T25">getDistanceFromOrigin</text:span><text:span text:style-name="T28">()</text:span><text:span text:style-name="T20">;</text:span></text:p>
            <text:p text:style-name="P19"/>
            <text:p text:style-name="P18"><text:span text:style-name="T26">        </text:span><text:span text:style-name="T27">// Update the UI with the true distance from where it spawned</text:span></text:p>
            <text:p text:style-name="P18"><text:span text:style-name="T30">        </text:span><text:span text:style-name="T25">ge</text:span><text:span text:style-name="T28">(</text:span><text:span text:style-name="T20">'</text:span><text:span text:style-name="T29">distanceBox</text:span><text:span text:style-name="T20">'</text:span><text:span text:style-name="T28">)</text:span><text:span text:style-name="T20">.</text:span><text:span text:style-name="T31">textContent</text:span><text:span text:style-name="T28"> </text:span><text:span text:style-name="T20">=</text:span><text:span text:style-name="T28"> </text:span><text:span text:style-name="T20">`</text:span><text:span text:style-name="T29">Distance from origin: </text:span><text:span text:style-name="T23">${</text:span><text:span text:style-name="T24">distanceData</text:span><text:span text:style-name="T20">.</text:span><text:span text:style-name="T24">total</text:span><text:span text:style-name="T23">}</text:span><text:span text:style-name="T29">px</text:span><text:span text:style-name="T20">`;</text:span></text:p>
            <text:p text:style-name="P19"/>
            <text:p text:style-name="P18"><text:span text:style-name="T30">        </text:span><text:span text:style-name="T25">ge</text:span><text:span text:style-name="T28">(</text:span><text:span text:style-name="T20">'</text:span><text:span text:style-name="T29">infoBox</text:span><text:span text:style-name="T20">'</text:span><text:span text:style-name="T28">)</text:span><text:span text:style-name="T20">.</text:span><text:span text:style-name="T31">textContent</text:span><text:span text:style-name="T28"> </text:span><text:span text:style-name="T20">=</text:span><text:span text:style-name="T28"> </text:span><text:span text:style-name="T20">"</text:span><text:span text:style-name="T29">Status: Drone flying left.</text:span><text:span text:style-name="T20">";</text:span></text:p>
            <text:p text:style-name="P18"><text:span text:style-name="T30">    </text:span><text:span text:style-name="T20">}</text:span></text:p>
            <text:p text:style-name="P19"/>
            <text:p text:style-name="P18"><text:span text:style-name="T30">    </text:span><text:span text:style-name="T25">flyRight</text:span><text:span text:style-name="T20">()</text:span></text:p>
            <text:p text:style-name="P18"><text:span text:style-name="T30">    </text:span><text:span text:style-name="T20">{</text:span></text:p>
            <text:p text:style-name="P18"><text:span text:style-name="T30">        </text:span><text:span text:style-name="T23">this</text:span><text:span text:style-name="T20">.</text:span><text:span text:style-name="T24">location</text:span><text:span text:style-name="T20">.</text:span><text:span text:style-name="T25">moveRight</text:span><text:span text:style-name="T28">()</text:span><text:span text:style-name="T20">;</text:span></text:p>
            <text:p text:style-name="P19"/>
            <text:p text:style-name="P18"><text:span text:style-name="T26">        </text:span><text:span text:style-name="T27">// Retrieve the math object from the chip</text:span></text:p>
            <text:p text:style-name="P18"><text:span text:style-name="T30">        </text:span><text:span text:style-name="T17">let</text:span><text:span text:style-name="T28"> </text:span><text:span text:style-name="T24">distanceData</text:span><text:span text:style-name="T28"> </text:span><text:span text:style-name="T20">=</text:span><text:span text:style-name="T28"> </text:span><text:span text:style-name="T23">this</text:span><text:span text:style-name="T20">.</text:span><text:span text:style-name="T24">distanceTracker</text:span><text:span text:style-name="T20">.</text:span><text:span text:style-name="T25">getDistanceFromOrigin</text:span><text:span text:style-name="T28">()</text:span><text:span text:style-name="T20">;</text:span></text:p>
            <text:p text:style-name="P19"/>
            <text:p text:style-name="P18"><text:span text:style-name="T26">        </text:span><text:span text:style-name="T27">// Update the UI with the true distance from where it spawned</text:span></text:p>
            <text:p text:style-name="P18"><text:span text:style-name="T30">        </text:span><text:span text:style-name="T25">ge</text:span><text:span text:style-name="T28">(</text:span><text:span text:style-name="T20">'</text:span><text:span text:style-name="T29">distanceBox</text:span><text:span text:style-name="T20">'</text:span><text:span text:style-name="T28">)</text:span><text:span text:style-name="T20">.</text:span><text:span text:style-name="T31">textContent</text:span><text:span text:style-name="T28"> </text:span><text:span text:style-name="T20">=</text:span><text:span text:style-name="T28"> </text:span><text:span text:style-name="T20">`</text:span><text:span text:style-name="T29">Distance from origin: </text:span><text:span text:style-name="T23">${</text:span><text:span text:style-name="T24">distanceData</text:span><text:span text:style-name="T20">.</text:span><text:span text:style-name="T24">total</text:span><text:span text:style-name="T23">}</text:span><text:span text:style-name="T29">px</text:span><text:span text:style-name="T20">`;</text:span></text:p>
            <text:p text:style-name="P19"/>
            <text:p text:style-name="P18"><text:span text:style-name="T30">        </text:span><text:span text:style-name="T25">ge</text:span><text:span text:style-name="T28">(</text:span><text:span text:style-name="T20">'</text:span><text:span text:style-name="T29">infoBox</text:span><text:span text:style-name="T20">'</text:span><text:span text:style-name="T28">)</text:span><text:span text:style-name="T20">.</text:span><text:span text:style-name="T31">textContent</text:span><text:span text:style-name="T28"> </text:span><text:span text:style-name="T20">=</text:span><text:span text:style-name="T28"> </text:span><text:span text:style-name="T20">"</text:span><text:span text:style-name="T29">Status: Drone flying right.</text:span><text:span text:style-name="T20">";</text:span></text:p>
            <text:p text:style-name="P18"><text:span text:style-name="T30">    </text:span><text:span text:style-name="T20">}</text:span></text:p>
            <text:p text:style-name="P18"><text:span text:style-name="T20">}</text:span></text:p>
          </draw:text-box>
        </draw:frame>
        <draw:frame draw:style-name="gr2" draw:text-style-name="P2" draw:layer="layout" svg:width="8.883cm" svg:height="0.924cm" svg:x="66.484cm" svg:y="56.197cm">
          <draw:text-box>
            <text:p><text:span text:style-name="T1">Christopher Andrew Topalian</text:span></text:p>
          </draw:text-box>
        </draw:frame>
        <draw:frame draw:style-name="gr27" draw:text-style-name="P4" draw:layer="layout" svg:width="14.445cm" svg:height="0.924cm" svg:x="66.517cm" svg:y="57.1cm">
          <draw:text-box>
            <text:p text:style-name="P3"><text:span text:style-name="T1">https://github.com/ChristopherAndrewTopalian</text:span></text:p>
          </draw:text-box>
        </draw:frame>
      </draw:page>
      <draw:page draw:name="page2" draw:style-name="dp1" draw:master-page-name="Default">
        <draw:custom-shape draw:style-name="gr28" draw:text-style-name="P1" draw:layer="layout" svg:width="43.447cm" svg:height="15.24cm" svg:x="0.05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29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30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9.157cm" svg:height="9.955cm" svg:x="0.75cm" svg:y="4.27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8.803cm" svg:height="0.719cm" svg:x="0.922cm" svg:y="5.951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0.922cm" svg:y="13.166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0.922cm" svg:y="12.212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776cm" svg:x="32.917cm" svg:y="4.273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33.07cm" svg:y="6.671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10.596cm" svg:y="4.26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287cm" svg:x="22.44cm" svg:y="4.262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22.654cm" svg:y="5.886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1.586cm" svg:x="22.654cm" svg:y="6.713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text:p text:style-name="P10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8.803cm" svg:height="2.076cm" svg:x="0.922cm" svg:y="6.816cm">
          <text:p text:style-name="P14"><text:span text:style-name="T6">- </text:span><text:span text:style-name="T7">location</text:span><text:span text:style-name="T8">: </text:span><text:span text:style-name="T14">LocationComponent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8.803cm" svg:height="0.719cm" svg:x="0.922cm" svg:y="9.082cm">
          <text:p text:style-name="P14"><text:span text:style-name="T6">- </text:span><text:span text:style-name="T7">led</text:span><text:span text:style-name="T8">: </text:span><text:span text:style-name="T14">LEDComponent(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10.773cm" svg:y="5.898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773cm" svg:y="9.387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773cm" svg:y="8.373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0.883cm" svg:height="0.632cm" svg:x="10.773cm" svg:y="6.698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0.883cm" svg:height="0.702cm" svg:x="10.773cm" svg:y="7.498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8.803cm" svg:height="2.12cm" svg:x="0.922cm" svg:y="9.947cm">
          <text:p text:style-name="P14"><text:span text:style-name="T6">- </text:span><text:span text:style-name="T15">distanceTracker</text:span><text:span text:style-name="T8">: </text:span><text:span text:style-name="T14">DistanceComponent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7.516cm">
          <text:p text:style-name="P10"><text:span text:style-name="T11">- </text:span><text:span text:style-name="T16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8.362cm">
          <text:p text:style-name="P10"><text:span text:style-name="T11">- </text:span><text:span text:style-name="T16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33.07cm" svg:y="9.198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3cm" svg:height="0.924cm" svg:x="28.74cm" svg:y="13.047cm">
          <draw:text-box>
            <text:p><text:span text:style-name="T1">Christopher Andrew Topalian</text:span></text:p>
          </draw:text-box>
        </draw:frame>
        <draw:frame draw:style-name="gr36" draw:text-style-name="P4" draw:layer="layout" svg:width="14.445cm" svg:height="0.924cm" svg:x="28.773cm" svg:y="13.95cm">
          <draw:text-box>
            <text:p text:style-name="P3"><text:span text:style-name="T1">https://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88.9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4-28T21:07:43.307817900</dc:date>
    <meta:editing-duration>P11DT22H8M56S</meta:editing-duration>
    <meta:editing-cycles>222</meta:editing-cycles>
    <meta:generator>LibreOffice/25.2.3.2$Windows_X86_64 LibreOffice_project/bbb074479178df812d175f709636b368952c2ce3</meta:generator>
    <dc:title>CATopalian JavaScript Component Based Architecture Flow</dc:title>
    <dc:publisher>Christopher Andrew Topalian</dc:publisher>
    <meta:document-statistic meta:object-count="58"/>
  </office:meta>
</office:document-meta>
</file>