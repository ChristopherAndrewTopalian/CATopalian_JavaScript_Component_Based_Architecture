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Consolas" style:font-family-generic="roman" style:font-pitch="variable"/>
    <style:font-face style:name="Arial4" svg:font-family="Arial, Consola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.0799in" style:contextual-spacing="false"/>
    </style:style>
    <style:style style:name="P2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officeooo:paragraph-rsid="0013b7d5"/>
    </style:style>
    <style:style style:name="P3" style:family="paragraph" style:parent-style-name="Standard">
      <style:paragraph-properties fo:line-height="60%"/>
    </style:style>
    <style:style style:name="P4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</style:style>
    <style:style style:name="P5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officeooo:paragraph-rsid="002350b4"/>
    </style:style>
    <style:style style:name="P6" style:family="paragraph" style:parent-style-name="Default_20_Drawing_20_Style">
      <style:paragraph-properties fo:margin-left="0in" fo:margin-right="0in" style:line-height-at-least="0in" fo:text-align="justify" style:justify-single-word="false" fo:text-indent="0in" style:auto-text-indent="false"/>
    </style:style>
    <style:style style:name="P7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fo:color="#ffffff" loext:opacity="100%" style:font-name="Arial3" fo:font-size="15pt" fo:font-weight="bold" style:font-size-asian="15pt" style:font-weight-asian="bold"/>
    </style:style>
    <style:style style:name="P8" style:family="paragraph" style:parent-style-name="Standard">
      <style:paragraph-properties fo:margin-left="0in" fo:margin-right="0in" style:line-height-at-least="0in" fo:text-align="start" style:justify-single-word="false" fo:text-indent="0in" style:auto-text-indent="false"/>
      <style:text-properties fo:color="#ffffff" loext:opacity="100%" fo:font-size="15pt" fo:font-weight="bold" style:font-size-asian="15pt" style:font-weight-asian="bold"/>
    </style:style>
    <style:style style:name="P9" style:family="paragraph" style:parent-style-name="Standard">
      <style:paragraph-properties fo:line-height="60%"/>
      <style:text-properties officeooo:rsid="000deb3e" officeooo:paragraph-rsid="000deb3e"/>
    </style:style>
    <style:style style:name="P10" style:family="paragraph" style:parent-style-name="Heading_20_2">
      <style:paragraph-properties fo:margin-top="0in" fo:margin-bottom="0.0799in" style:contextual-spacing="false" fo:break-before="page"/>
    </style:style>
    <style:style style:name="P11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fo:color="#ffc0cb" loext:opacity="100%" style:font-name="Liberation Sans" fo:font-size="17pt" fo:text-shadow="1pt 1pt" fo:font-weight="bold" style:font-size-asian="17pt" style:font-weight-asian="bold"/>
    </style:style>
    <style:style style:name="P12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fo:color="#00ffff" loext:opacity="100%" style:font-name="Liberation Sans" fo:font-size="17pt" fo:text-shadow="1pt 1pt" fo:font-weight="bold" style:font-size-asian="17pt" style:font-weight-asian="bold"/>
    </style:style>
    <style:style style:name="P13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fo:color="#ffffff" loext:opacity="100%" fo:font-size="15pt" fo:font-weight="bold" officeooo:rsid="0014be45" officeooo:paragraph-rsid="0014be45" style:font-size-asian="15pt" style:font-weight-asian="bold"/>
    </style:style>
    <style:style style:name="P14" style:family="paragraph" style:parent-style-name="Standard">
      <style:paragraph-properties fo:line-height="60%"/>
      <style:text-properties officeooo:rsid="0014be45" officeooo:paragraph-rsid="0014be45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fo:color="#ffffff" loext:opacity="100%" fo:font-size="15pt" fo:font-weight="bold" officeooo:rsid="001812d3" officeooo:paragraph-rsid="001812d3" style:font-size-asian="15pt" style:font-weight-asian="bold"/>
    </style:style>
    <style:style style:name="P17" style:family="paragraph" style:parent-style-name="Default_20_Drawing_20_Style">
      <style:paragraph-properties fo:margin-left="0in" fo:margin-right="0in" style:line-height-at-least="0in" fo:text-align="center" style:justify-single-word="false" fo:text-indent="0in" style:auto-text-indent="false"/>
      <style:text-properties fo:color="#00ffff" loext:opacity="100%" fo:font-size="17pt" fo:text-shadow="1pt 1pt" fo:font-weight="bold" style:font-size-asian="17pt" style:font-weight-asian="bold"/>
    </style:style>
    <style:style style:name="P18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/>
      <style:text-properties fo:color="#ffffff" loext:opacity="100%" fo:font-size="15pt" fo:font-weight="bold" style:font-size-asian="15pt" style:font-weight-asian="bold"/>
    </style:style>
    <style:style style:name="T1" style:family="text">
      <style:text-properties fo:color="#00ffff" loext:opacity="100%" style:font-name="Liberation Sans" fo:font-size="17pt" fo:text-shadow="1pt 1pt" fo:font-weight="bold" style:font-size-asian="17pt" style:font-weight-asian="bold"/>
    </style:style>
    <style:style style:name="T2" style:family="text">
      <style:text-properties fo:color="#00ffff" loext:opacity="100%" style:font-name="Liberation Sans" fo:font-size="17pt" fo:text-shadow="1pt 1pt" fo:font-weight="bold" officeooo:rsid="000ed06a" style:font-size-asian="17pt" style:font-weight-asian="bold"/>
    </style:style>
    <style:style style:name="T3" style:family="text">
      <style:text-properties fo:color="#00ffff" loext:opacity="100%" fo:font-size="17pt" fo:text-shadow="1pt 1pt" fo:font-weight="bold" style:font-size-asian="17pt" style:font-weight-asian="bold"/>
    </style:style>
    <style:style style:name="T4" style:family="text">
      <style:text-properties fo:color="#ffc0cb" loext:opacity="100%" style:font-name="Liberation Sans" fo:font-size="17pt" fo:text-shadow="1pt 1pt" fo:font-weight="bold" style:font-size-asian="17pt" style:font-weight-asian="bold"/>
    </style:style>
    <style:style style:name="T5" style:family="text">
      <style:text-properties fo:color="#c3bdf6" loext:opacity="100%" fo:font-size="17pt" fo:text-shadow="1pt 1pt" fo:font-weight="bold" style:font-size-asian="17pt" style:font-weight-asian="bold"/>
    </style:style>
    <style:style style:name="T6" style:family="text">
      <style:text-properties fo:color="#ffc0cb" loext:opacity="100%" fo:font-size="17pt" fo:text-shadow="1pt 1pt" fo:font-weight="bold" style:font-size-asian="17pt" style:font-weight-asian="bold"/>
    </style:style>
    <style:style style:name="T7" style:family="text">
      <style:text-properties fo:color="#ffffff" loext:opacity="100%" fo:font-size="15pt" fo:font-weight="bold" style:font-size-asian="15pt" style:font-weight-asian="bold"/>
    </style:style>
    <style:style style:name="T8" style:family="text">
      <style:text-properties fo:color="#ffffff" loext:opacity="100%" style:font-name="Liberation Sans" fo:font-size="15pt" fo:font-weight="bold" style:font-size-asian="15pt" style:font-weight-asian="bold"/>
    </style:style>
    <style:style style:name="T9" style:family="text">
      <style:text-properties fo:color="#bcb4ff" loext:opacity="100%" style:font-name="Arial3" fo:font-size="15pt" fo:font-weight="bold" style:font-size-asian="15pt" style:font-weight-asian="bold"/>
    </style:style>
    <style:style style:name="T10" style:family="text">
      <style:text-properties fo:color="#ffffff" loext:opacity="100%" style:font-name="Arial3" fo:font-size="15pt" fo:font-weight="bold" style:font-size-asian="15pt" style:font-weight-asian="bold"/>
    </style:style>
    <style:style style:name="T11" style:family="text">
      <style:text-properties fo:color="#00ffff" loext:opacity="100%" fo:font-size="15pt" fo:font-weight="bold" style:font-size-asian="15pt" style:font-weight-asian="bold"/>
    </style:style>
    <style:style style:name="T12" style:family="text">
      <style:text-properties fo:color="#ffc0cb" loext:opacity="100%" fo:font-size="15pt" fo:font-weight="bold" style:font-size-asian="15pt" style:font-weight-asian="bold"/>
    </style:style>
    <style:style style:name="T13" style:family="text">
      <style:text-properties fo:color="#c3bdf6" loext:opacity="100%" fo:font-size="15pt" fo:font-weight="bold" style:font-size-asian="15pt" style:font-weight-asian="bold"/>
    </style:style>
    <style:style style:name="T14" style:family="text">
      <style:text-properties fo:color="#ffff00" loext:opacity="100%" fo:font-size="15pt" fo:font-weight="bold" style:font-size-asian="15pt" style:font-weight-asian="bold"/>
    </style:style>
    <style:style style:name="T15" style:family="text">
      <style:text-properties fo:color="#c3bdf6" loext:opacity="100%"/>
    </style:style>
    <style:style style:name="T16" style:family="text">
      <style:text-properties fo:font-size="15pt" fo:font-weight="bold" style:font-size-asian="15pt" style:font-weight-asian="bold"/>
    </style:style>
    <style:style style:name="T17" style:family="text">
      <style:text-properties fo:color="#ffff00" loext:opacity="100%" style:font-name="Liberation Sans" fo:font-size="15pt" fo:font-weight="bold" style:font-size-asian="15pt" style:font-weight-asian="bold"/>
    </style:style>
    <style:style style:name="T18" style:family="text">
      <style:text-properties fo:color="#c3bdf6" loext:opacity="100%" style:font-name="Liberation Sans" fo:font-size="17pt" fo:text-shadow="1pt 1pt" fo:font-weight="bold" style:font-size-asian="17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on</text:span><text:span text:style-name="T2">e</text:span></text:h>
      <text:p text:style-name="P2" loext:marker-style-name="T3"><text:span text:style-name="T4">constructor(</text:span><text:span text:style-name="T5">id</text:span><text:span text:style-name="T6">, </text:span><text:span text:style-name="T5">startX</text:span><text:span text:style-name="T6">, </text:span><text:span text:style-name="T5">startY</text:span><text:span text:style-name="T6">, </text:span><text:span text:style-name="T5">speed</text:span><text:span text:style-name="T6"> = 2, </text:span><text:span text:style-name="T5">maxDistance</text:span><text:span text:style-name="T6"> = 200)</text:span></text:p>
      <text:p text:style-name="P3"/>
      <text:p text:style-name="P4" loext:marker-style-name="T7"><text:span text:style-name="T8">- </text:span><text:span text:style-name="T9">id</text:span><text:span text:style-name="T7">: String</text:span></text:p>
      <text:p text:style-name="P5" loext:marker-style-name="T7"><text:span text:style-name="T8">- </text:span><text:span text:style-name="T9">patrolTimer</text:span><text:span text:style-name="T10">: Number</text:span></text:p>
      <text:p text:style-name="P6" loext:marker-style-name="T7"><text:span text:style-name="T8">- </text:span><text:span text:style-name="T9">location</text:span><text:span text:style-name="T7">: new </text:span><text:a xlink:type="simple" xlink:href="#1.1.LocationComponent|outline" text:style-name="Internet_20_link" text:visited-style-name="Visited_20_Internet_20_Link"><text:span text:style-name="T11">LocationComponent</text:span></text:a><text:span text:style-name="T12">(</text:span><text:span text:style-name="T13">id</text:span><text:span text:style-name="T12">, </text:span><text:span text:style-name="T13">startX</text:span><text:span text:style-name="T12">, </text:span><text:span text:style-name="T13">startY</text:span><text:span text:style-name="T12">)</text:span></text:p>
      <text:p text:style-name="P4" loext:marker-style-name="T7"><text:span text:style-name="T8">- </text:span><text:span text:style-name="T9">led</text:span><text:span text:style-name="T7">: new </text:span><text:a xlink:type="simple" xlink:href="#1.2.LEDComponent|outline" text:style-name="Internet_20_link" text:visited-style-name="Visited_20_Internet_20_Link"><text:span text:style-name="T11">LEDComponent</text:span></text:a><text:span text:style-name="T12">(</text:span><text:span text:style-name="T13">id</text:span><text:span text:style-name="T12">)</text:span></text:p>
      <text:p text:style-name="P4" loext:marker-style-name="T7"><text:span text:style-name="T8">- </text:span><text:span text:style-name="T9">distanceTracker</text:span><text:span text:style-name="T7">: new </text:span><text:a xlink:type="simple" xlink:href="#1.3.DistanceComponent|outline" text:style-name="Internet_20_link" text:visited-style-name="Visited_20_Internet_20_Link"><text:span text:style-name="T11">DistanceComponent</text:span></text:a><text:span text:style-name="T12">(</text:span><text:span text:style-name="T13">id</text:span><text:span text:style-name="T12">, </text:span><text:span text:style-name="T13">startX</text:span><text:span text:style-name="T12">, </text:span><text:span text:style-name="T13">startY</text:span><text:span text:style-name="T12">)</text:span></text:p>
      <text:p text:style-name="P4" loext:marker-style-name="T7"><text:span text:style-name="T8">- </text:span><text:span text:style-name="T9">evasion</text:span><text:span text:style-name="T7">: new </text:span><text:a xlink:type="simple" xlink:href="#1.4.EvasionComponent|outline" text:style-name="Internet_20_link" text:visited-style-name="Visited_20_Internet_20_Link"><text:span text:style-name="T11">EvasionComponent</text:span></text:a><text:span text:style-name="T12">(</text:span><text:span text:style-name="T13">id</text:span><text:span text:style-name="T12">, </text:span><text:span text:style-name="T13">speed</text:span><text:span text:style-name="T12">, </text:span><text:span text:style-name="T13">maxDistance</text:span><text:span text:style-name="T12">)</text:span></text:p>
      <text:p text:style-name="P7" loext:marker-style-name="T7"/>
      <text:p text:style-name="P4" loext:marker-style-name="T7"><text:span text:style-name="T8">+ </text:span><text:span text:style-name="T14">flyLeft</text:span><text:span text:style-name="T7">(): void</text:span></text:p>
      <text:p text:style-name="P4" loext:marker-style-name="T7"><text:span text:style-name="T8">+ </text:span><text:span text:style-name="T14">flyRight</text:span><text:span text:style-name="T7">(): void</text:span></text:p>
      <text:p text:style-name="P4" loext:marker-style-name="T7"><text:span text:style-name="T8">+ </text:span><text:span text:style-name="T14">startEvasion</text:span><text:span text:style-name="T7">(): void</text:span></text:p>
      <text:p text:style-name="P4" loext:marker-style-name="T7"><text:span text:style-name="T8">+ </text:span><text:span text:style-name="T14">haltEvasion</text:span><text:span text:style-name="T7">(): void</text:span></text:p>
      <text:p text:style-name="P4" loext:marker-style-name="T7"><text:span text:style-name="T7"/></text:p>
      <text:p text:style-name="P8" loext:marker-style-name="T7"/>
      <text:p text:style-name="P8" loext:marker-style-name="T7"/>
      <text:p text:style-name="P9"/>
      <text:h text:style-name="P10" text:outline-level="2"><text:a xlink:type="simple" xlink:href="#1.Drone|outline" text:style-name="Internet_20_link" text:visited-style-name="Visited_20_Internet_20_Link">LocationComponent</text:a></text:h>
      <text:p text:style-name="P11" loext:marker-style-name="T3">constructor(<text:span text:style-name="T15">elementId</text:span>, <text:span text:style-name="T15">startX</text:span>, <text:span text:style-name="T15">startY</text:span>)</text:p>
      <text:p text:style-name="P12" loext:marker-style-name="T3"/>
      <text:p text:style-name="P4" loext:marker-style-name="T7"><text:span text:style-name="T8">- </text:span><text:span text:style-name="T9">element</text:span><text:span text:style-name="T7">: HTMLElement</text:span></text:p>
      <text:p text:style-name="P4" loext:marker-style-name="T7"><text:span text:style-name="T8">- </text:span><text:span text:style-name="T9">x</text:span><text:span text:style-name="T7">: Number</text:span></text:p>
      <text:p text:style-name="P4" loext:marker-style-name="T7"><text:span text:style-name="T8">- </text:span><text:span text:style-name="T9">y</text:span><text:span text:style-name="T7">: Number</text:span></text:p>
      <text:p text:style-name="P13" loext:marker-style-name="T7"/>
      <text:p text:style-name="P4" loext:marker-style-name="T7"><text:span text:style-name="T8">+ </text:span><text:span text:style-name="T14">moveLeft</text:span><text:span text:style-name="T7">(): void</text:span></text:p>
      <text:p text:style-name="P4" loext:marker-style-name="T7"><text:span text:style-name="T8">+ </text:span><text:span text:style-name="T14">moveRight</text:span><text:span text:style-name="T7">(): void</text:span></text:p>
      <text:p text:style-name="P14"/>
      <text:h text:style-name="P15" text:outline-level="2"><text:a xlink:type="simple" xlink:href="#1.Drone|outline" text:style-name="Internet_20_link" text:visited-style-name="Visited_20_Internet_20_Link">LEDComponent</text:a></text:h>
      <text:p text:style-name="P11" loext:marker-style-name="T3">constructor(<text:span text:style-name="T15">elementId</text:span>)</text:p>
      <text:p text:style-name="P12" loext:marker-style-name="T3"/>
      <text:p text:style-name="P4" loext:marker-style-name="T16"><text:span text:style-name="T8">- </text:span><text:span text:style-name="T9">element</text:span><text:span text:style-name="T7">: HTMLElement</text:span></text:p>
      <text:p text:style-name="P16" loext:marker-style-name="T16"/>
      <text:p text:style-name="P4" loext:marker-style-name="T7"><text:span text:style-name="T8">+ </text:span><text:span text:style-name="T17">setColor</text:span><text:span text:style-name="T8">(</text:span><text:span text:style-name="T9">newColor</text:span><text:span text:style-name="T7">: String): void</text:span></text:p>
      <text:p text:style-name="P4" loext:marker-style-name="T7"><text:span text:style-name="T8">+ </text:span><text:span text:style-name="T14">randomColor</text:span><text:span text:style-name="T7">(): void</text:span></text:p>
      <text:p text:style-name="P14"/>
      <text:h text:style-name="P15" text:outline-level="2"><text:a xlink:type="simple" xlink:href="#1.Drone|outline" text:style-name="Internet_20_link" text:visited-style-name="Visited_20_Internet_20_Link">DistanceComponent</text:a></text:h>
      <text:p text:style-name="P4" loext:marker-style-name="T3"><text:span text:style-name="T4">constructor(</text:span><text:span text:style-name="T18">elementId</text:span><text:span text:style-name="T4">, </text:span><text:span text:style-name="T18">originX</text:span><text:span text:style-name="T4"> </text:span><text:span text:style-name="T6">= 0, </text:span><text:span text:style-name="T5">originY</text:span><text:span text:style-name="T6"> = 0)</text:span></text:p>
      <text:p text:style-name="P17" loext:marker-style-name="T3"/>
      <text:p text:style-name="P4" loext:marker-style-name="T7"><text:span text:style-name="T8">- </text:span><text:span text:style-name="T9">elementId</text:span><text:span text:style-name="T7">: HTMLElement</text:span></text:p>
      <text:p text:style-name="P4" loext:marker-style-name="T7"><text:span text:style-name="T8">- </text:span><text:span text:style-name="T9">originX</text:span><text:span text:style-name="T7">: Number</text:span></text:p>
      <text:p text:style-name="P4" loext:marker-style-name="T7"><text:span text:style-name="T8">- </text:span><text:span text:style-name="T9">originY</text:span><text:span text:style-name="T7">: Number</text:span></text:p>
      <text:p text:style-name="P18" loext:marker-style-name="T7"/>
      <text:p text:style-name="P4" loext:marker-style-name="T7"><text:span text:style-name="T8">+ </text:span><text:span text:style-name="T17">getDistanceFromOrigin</text:span><text:span text:style-name="T8">(</text:span><text:span text:style-name="T7">): Object</text:span></text:p>
      <text:p text:style-name="P14"/>
      <text:h text:style-name="P15" text:outline-level="2"><text:a xlink:type="simple" xlink:href="#1.Drone|outline" text:style-name="Internet_20_link" text:visited-style-name="Visited_20_Internet_20_Link">EvasionComponent</text:a></text:h>
      <text:p text:style-name="P4" loext:marker-style-name="T3"><text:span text:style-name="T4">constructor(</text:span><text:span text:style-name="T18">targetId</text:span><text:span text:style-name="T4">, </text:span><text:span text:style-name="T18">speed</text:span><text:span text:style-name="T4">, </text:span><text:span text:style-name="T5">maxDistance</text:span><text:span text:style-name="T6">)</text:span></text:p>
      <text:p text:style-name="P17" loext:marker-style-name="T3"/>
      <text:p text:style-name="P4" loext:marker-style-name="T7"><text:span text:style-name="T8">- </text:span><text:span text:style-name="T9">targetId</text:span><text:span text:style-name="T7">: HTMLElement</text:span></text:p>
      <text:p text:style-name="P4" loext:marker-style-name="T7"><text:span text:style-name="T8">- </text:span><text:span text:style-name="T9">speed</text:span><text:span text:style-name="T7">: Number</text:span></text:p>
      <text:p text:style-name="P4" loext:marker-style-name="T7"><text:span text:style-name="T8">- </text:span><text:span text:style-name="T9">maxDistance</text:span><text:span text:style-name="T7">: Number</text:span></text:p>
      <text:p text:style-name="P4" loext:marker-style-name="T7"><text:span text:style-name="T8">- </text:span><text:span text:style-name="T9">direction</text:span><text:span text:style-name="T7">: Number</text:span></text:p>
      <text:p text:style-name="P4" loext:marker-style-name="T7"><text:span text:style-name="T8">- </text:span><text:span text:style-name="T9">startX</text:span><text:span text:style-name="T7">: Number</text:span></text:p>
      <text:p text:style-name="P4" loext:marker-style-name="T7"><text:span text:style-name="T8">- </text:span><text:span text:style-name="T9">isInitialized</text:span><text:span text:style-name="T7">: Boolean</text:span></text:p>
      <text:p text:style-name="P18" loext:marker-style-name="T7"/>
      <text:p text:style-name="P4" loext:marker-style-name="T7"><text:span text:style-name="T8">+ </text:span><text:span text:style-name="T17">update</text:span><text:span text:style-name="T8">(</text:span><text:span text:style-name="T7">): void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Consolas" style:font-family-generic="roman" style:font-pitch="variable"/>
    <style:font-face style:name="Arial4" svg:font-family="Arial, Consola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.0799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4" style:font-family-complex="Arial, Consolas" style:font-family-generic-complex="system" style:font-pitch-complex="variable" style:font-size-complex="12pt" style:text-emphasize="non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in" fo:margin-bottom="0.0799in" style:contextual-spacing="false"/>
      <style:text-properties fo:color="#00ffff" loext:opacity="100%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ff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00ff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23:52:51.974768300</meta:creation-date>
    <dc:date>2026-05-03T23:18:45.208994700</dc:date>
    <meta:editing-duration>PT17H30M45S</meta:editing-duration>
    <meta:editing-cycles>27</meta:editing-cycles>
    <meta:generator>LibreOffice/25.2.3.2$Windows_X86_64 LibreOffice_project/bbb074479178df812d175f709636b368952c2ce3</meta:generator>
    <dc:publisher>Christopher Andrew Topalian</dc:publisher>
    <dc:subject>Component Based Architecture</dc:subject>
    <dc:title>CATopalian JavaScript Component Based Architecture</dc:title>
    <meta:document-statistic meta:table-count="0" meta:image-count="0" meta:object-count="0" meta:page-count="5" meta:paragraph-count="39" meta:word-count="126" meta:character-count="966" meta:non-whitespace-character-count="879"/>
  </office:meta>
</office:document-meta>
</file>