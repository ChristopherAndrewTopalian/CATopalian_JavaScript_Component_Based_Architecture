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, Consolas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20.396cm" fo:min-width="53.228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3.867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15.602cm" fo:min-width="8.83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8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496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5.504cm" fo:min-width="9.225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64cm" fo:min-width="8.883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5.883cm" fo:min-width="10.632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4.21cm" fo:min-width="9.31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36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532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67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646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5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523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0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7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642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64cm" fo:min-width="8.896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349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8.158cm" fo:min-width="9.225cm" fo:padding-top="0.165cm" fo:padding-bottom="0.165cm" fo:padding-left="0.29cm" fo:padding-right="0.29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415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writing-mode="lr-tb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2" style:family="paragraph">
      <loext:graphic-properties draw:fill="none"/>
      <style:text-properties fo:color="#a9a9a9" loext:opacity="100%" fo:font-size="17pt" fo:font-weight="bold" style:font-size-asian="17pt" style:font-size-complex="17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a9a9a9" loext:opacity="100%" fo:font-size="17pt" fo:font-weight="bold" style:font-size-asian="17pt" style:font-size-complex="17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ffff" loext:opacity="100%" fo:font-size="16pt" fo:font-weight="bold" style:font-size-asian="16pt" style:font-size-complex="16pt"/>
    </style:style>
    <style:style style:name="P6" style:family="paragraph">
      <style:paragraph-properties fo:text-align="center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8" style:family="paragraph">
      <style:paragraph-properties fo:text-align="start"/>
      <style:text-properties fo:color="#ffffff" loext:opacity="100%" fo:font-size="15pt" fo:font-weight="bold" style:font-size-asian="15pt" style:font-size-complex="15pt"/>
    </style:style>
    <style:style style:name="P9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size-complex="15pt"/>
    </style:style>
    <style:style style:name="P10" style:family="paragraph">
      <style:paragraph-properties fo:text-align="start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5pt" fo:font-weight="bold" style:font-size-asian="15pt" style:font-size-complex="15pt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5pt" fo:font-weight="bold" style:font-size-asian="15pt" style:font-size-complex="15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a9a9a9" loext:opacity="100%" style:text-outline="false" style:text-line-through-style="none" style:text-line-through-type="none" style:font-name="Arial" fo:font-size="17pt" fo:font-style="normal" fo:text-shadow="none" style:text-underline-style="none" fo:font-weight="bold" style:letter-kerning="true" style:font-name-asian="Microsoft YaHei" style:font-size-asian="17pt" style:font-style-asian="normal" style:font-weight-asian="normal" style:font-name-complex="Ari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f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T4" style:family="text">
      <style:text-properties fo:font-variant="normal" fo:text-transform="none" fo:color="#ffc0cb" loext:opacity="100%" style:text-outline="false" style:text-line-through-style="none" style:text-line-through-type="none" style:font-name="Liberation Sans" fo:font-size="17pt" fo:font-style="normal" fo:text-shadow="1pt 1pt" style:text-underline-style="none" fo:font-weight="bold" style:letter-kerning="true" style:font-name-asian="Microsoft YaHei" style:font-size-asian="17pt" style:font-style-asian="normal" style:font-weight-asian="bold" style:font-name-complex="Arial2" style:font-size-complex="1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c0cb" loext:opacity="100%" fo:font-size="17pt" fo:text-shadow="1pt 1pt" fo:font-weight="bold" style:font-size-asian="17pt" style:font-weight-asian="bold" style:font-size-complex="17pt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cb4ff" loext:opacity="100%" style:font-name="Arial" fo:font-size="15pt" fo:font-weight="bold" style:font-size-asian="15pt" style:font-name-complex="Arial" style:font-size-complex="15pt"/>
    </style:style>
    <style:style style:name="T8" style:family="text">
      <style:text-properties fo:color="#ffffff" loext:opacity="100%" fo:font-size="15pt" fo:font-weight="bold" style:font-size-asian="15pt" style:font-size-complex="15pt"/>
    </style:style>
    <style:style style:name="T9" style:family="text"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2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bcb4ff" loext:opacity="100%" style:font-name="Arial" fo:font-size="15pt" fo:font-weight="bold" style:font-size-asian="15pt" style:font-weight-asian="bold" style:font-name-complex="Arial" style:font-size-complex="15pt" style:font-weight-complex="bold"/>
    </style:style>
    <style:style style:name="T13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2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ffff" loext:opacity="100%" fo:font-size="15pt" fo:font-weight="bold" style:font-size-asian="15pt" style:font-size-complex="15pt"/>
    </style:style>
    <style:style style:name="T15" style:family="text">
      <style:text-properties fo:color="#ffc0cb" loext:opacity="100%" fo:font-size="15pt" fo:font-weight="bold" style:font-size-asian="15pt" style:font-size-complex="15pt"/>
    </style:style>
    <style:style style:name="T16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00" loext:opacity="100%" fo:font-size="15pt" fo:font-weight="bold" style:font-size-asian="15pt" style:font-size-complex="15pt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3.808cm" svg:height="20.726cm" svg:x="0.05cm" svg:y="0cm">
          <draw:glue-point draw:id="4" svg:x="2.533cm" svg:y="5.051cm"/>
          <draw:glue-point draw:id="5" svg:x="-2.027cm" svg:y="5.051cm"/>
          <draw:glue-point draw:id="6" svg:x="0.089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883cm" svg:height="0.924cm" svg:x="7.329cm" svg:y="0.307cm">
          <draw:text-box>
            <text:p><text:span text:style-name="T1">Christopher Andrew Topalian</text:span></text:p>
          </draw:text-box>
        </draw:frame>
        <draw:frame draw:style-name="gr3" draw:text-style-name="P4" draw:layer="layout" svg:width="14.445cm" svg:height="0.924cm" svg:x="7.362cm" svg:y="1.21cm">
          <draw:text-box>
            <text:p text:style-name="P3"><text:span text:style-name="T1">https://github.com/ChristopherAndrewTopalian</text:span></text:p>
          </draw:text-box>
        </draw:frame>
        <draw:frame draw:style-name="gr4" draw:text-style-name="P5" draw:layer="layout" svg:width="7.271cm" svg:height="4.117cm" svg:x="0.388cm" svg:y="0.117cm">
          <draw:text-box>
            <text:p text:style-name="P3"><text:span text:style-name="T2">Component</text:span></text:p>
            <text:p text:style-name="P3"><text:span text:style-name="T2">Based</text:span></text:p>
            <text:p text:style-name="P3"><text:span text:style-name="T2">Architecture</text:span></text:p>
          </draw:text-box>
        </draw:frame>
        <draw:custom-shape draw:style-name="gr5" draw:text-style-name="P1" draw:layer="layout" svg:width="9.41cm" svg:height="15.932cm" svg:x="0.75cm" svg:y="4.27cm">
          <draw:glue-point draw:id="4" svg:x="2.533cm" svg:y="5.051cm"/>
          <draw:glue-point draw:id="5" svg:x="-2.027cm" svg:y="5.051cm"/>
          <draw:glue-point draw:id="6" svg:x="0.089cm" svg:y="5.001cm"/>
          <text:p text:style-name="P6"><text:span text:style-name="T3">Drone</text:span></text:p>
          <text:p text:style-name="P7"><text:span text:style-name="T4">constructor(</text:span><text:span text:style-name="T5">id, startX, startY, speed = 2, maxDistance = 20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8.803cm" svg:height="0.719cm" svg:x="1.054cm" svg:y="6.651cm">
          <text:p text:style-name="P8"><text:span text:style-name="T6">- </text:span><text:span text:style-name="T7">id</text:span><text:span text:style-name="T8">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1.054cm" svg:y="17.09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Righ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1.054cm" svg:y="16.136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Lef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9.805cm" svg:height="5.834cm" svg:x="32.917cm" svg:y="4.273cm">
          <text:p text:style-name="P6"><text:span text:style-name="T3">DistanceComponent</text:span></text:p>
          <text:p text:style-name="P6"><text:span text:style-name="T5">constructor(elementId, originX = 0, originY =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33.07cm" svg:y="6.671cm">
          <text:p text:style-name="P10"><text:span text:style-name="T11">- </text:span><text:span text:style-name="T12">elemen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212cm" svg:height="6.213cm" svg:x="10.667cm" svg:y="4.26cm">
          <text:p text:style-name="P6"><text:span text:style-name="T3">LocationComponent</text:span></text:p>
          <text:p text:style-name="P6"><text:span text:style-name="T5">constructor(element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98cm" svg:height="4.54cm" svg:x="22.411cm" svg:y="4.262cm">
          <text:p text:style-name="P6"><text:span text:style-name="T3">LEDComponent</text:span></text:p>
          <text:p text:style-name="P6"><text:span text:style-name="T5">constructor(elementId)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479cm" svg:height="0.666cm" svg:x="22.625cm" svg:y="5.886cm">
          <text:p text:style-name="P12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479cm" svg:height="0.862cm" svg:x="22.625cm" svg:y="6.713cm">
          <text:p text:style-name="P10"><text:span text:style-name="T11">+ </text:span><text:span text:style-name="T13">setColor</text:span><text:span text:style-name="T11">(</text:span><text:span text:style-name="T12">newColor</text:span><text:span text:style-name="T10">: String): vo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8.803cm" svg:height="2.009cm" svg:x="1.054cm" svg:y="7.516cm">
          <text:p text:style-name="P14"><text:span text:style-name="T6">- </text:span><text:span text:style-name="T7">location</text:span><text:span text:style-name="T8">: new </text:span><text:span text:style-name="T14">LocationComponent</text:span><text:span text:style-name="T15">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8.803cm" svg:height="0.976cm" svg:x="1.054cm" svg:y="9.693cm">
          <text:p text:style-name="P14"><text:span text:style-name="T6">- </text:span><text:span text:style-name="T7">led</text:span><text:span text:style-name="T8">: new </text:span><text:span text:style-name="T14">LEDComponent</text:span><text:span text:style-name="T15">(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0.883cm" svg:height="0.68cm" svg:x="10.844cm" svg:y="5.898cm">
          <text:p text:style-name="P10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10.844cm" svg:y="9.387cm">
          <text:p text:style-name="P8"><text:span text:style-name="T8">+ </text:span><text:span text:style-name="T9">moveRigh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10.844cm" svg:y="8.373cm">
          <text:p text:style-name="P8"><text:span text:style-name="T8">+ </text:span><text:span text:style-name="T9">moveLef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0.883cm" svg:height="0.632cm" svg:x="10.844cm" svg:y="6.698cm">
          <text:p text:style-name="P16"><text:span text:style-name="T11">- </text:span><text:span text:style-name="T12">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0.883cm" svg:height="0.702cm" svg:x="10.844cm" svg:y="7.498cm">
          <text:p text:style-name="P16"><text:span text:style-name="T11">- </text:span><text:span text:style-name="T12">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803cm" svg:height="1.972cm" svg:x="1.054cm" svg:y="10.843cm">
          <text:p text:style-name="P14"><text:span text:style-name="T6">- </text:span><text:span text:style-name="T16">distanceTracker</text:span><text:span text:style-name="T8">: new </text:span><text:span text:style-name="T14">DistanceComponent</text:span><text:span text:style-name="T15">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9.476cm" svg:height="0.694cm" svg:x="33.07cm" svg:y="7.516cm">
          <text:p text:style-name="P10"><text:span text:style-name="T11">- </text:span><text:span text:style-name="T17">origin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33.07cm" svg:y="8.362cm">
          <text:p text:style-name="P10"><text:span text:style-name="T11">- </text:span><text:span text:style-name="T17">origin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33.07cm" svg:y="9.198cm">
          <text:p text:style-name="P10"><text:span text:style-name="T11">+ </text:span><text:span text:style-name="T13">getDistanceFromOrigin</text:span><text:span text:style-name="T11">(</text:span><text:span text:style-name="T10">): Object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83cm" svg:height="0.924cm" svg:x="39.525cm" svg:y="18.789cm">
          <draw:text-box>
            <text:p><text:span text:style-name="T1">Christopher Andrew Topalian</text:span></text:p>
          </draw:text-box>
        </draw:frame>
        <draw:frame draw:style-name="gr23" draw:text-style-name="P4" draw:layer="layout" svg:width="14.094cm" svg:height="0.924cm" svg:x="39.558cm" svg:y="19.692cm">
          <draw:text-box>
            <text:p text:style-name="P3"><text:span text:style-name="T1">https://github.com/ChristopherAndrewTopalian</text:span></text:p>
          </draw:text-box>
        </draw:frame>
        <draw:custom-shape draw:style-name="gr24" draw:text-style-name="P1" draw:layer="layout" svg:width="9.805cm" svg:height="8.488cm" svg:x="43.333cm" svg:y="4.273cm">
          <text:p text:style-name="P6"><text:span text:style-name="T3">EvasionComponent</text:span></text:p>
          <text:p text:style-name="P6"><text:span text:style-name="T5">constructor(targetId, speed, maxDista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43.486cm" svg:y="6.671cm">
          <text:p text:style-name="P10"><text:span text:style-name="T11">- </text:span><text:span text:style-name="T17">targe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7.516cm">
          <text:p text:style-name="P10"><text:span text:style-name="T11">- </text:span><text:span text:style-name="T17">speed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8.362cm">
          <text:p text:style-name="P10"><text:span text:style-name="T11">- </text:span><text:span text:style-name="T17">maxDistance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43.486cm" svg:y="11.798cm">
          <text:p text:style-name="P10"><text:span text:style-name="T11">+ </text:span><text:span text:style-name="T13">update</text:span><text:span text:style-name="T11">(</text:span><text:span text:style-name="T10">): void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9.262cm">
          <text:p text:style-name="P10"><text:span text:style-name="T11">- </text:span><text:span text:style-name="T17">direction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10.124cm">
          <text:p text:style-name="P10"><text:span text:style-name="T11">- </text:span><text:span text:style-name="T17">start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10.962cm">
          <text:p text:style-name="P10"><text:span text:style-name="T11">- </text:span><text:span text:style-name="T17">isInitialized</text:span><text:span text:style-name="T10">: Boolean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.803cm" svg:height="2.12cm" svg:x="1.054cm" svg:y="12.947cm">
          <text:p text:style-name="P14"><text:span text:style-name="T6">- </text:span><text:span text:style-name="T16">evasion</text:span><text:span text:style-name="T8">: new </text:span><text:span text:style-name="T14">EvasionComponent</text:span><text:span text:style-name="T15">(id, speed, maxDista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9.479cm" svg:height="0.862cm" svg:x="22.625cm" svg:y="7.732cm">
          <text:p text:style-name="P16"><text:span text:style-name="T10">+ </text:span><text:span text:style-name="T9">randomColor</text:span><text:span text:style-name="T10">(): voi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803cm" svg:height="0.826cm" svg:x="1.054cm" svg:y="18.052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startEvasion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1.054cm" svg:y="18.9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haltEvasion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8.803cm" svg:height="0.745cm" svg:x="1.054cm" svg:y="15.247cm">
          <text:p text:style-name="P14"><text:span text:style-name="T6">- </text:span><text:span text:style-name="T16">patrolTimer</text:span><text:span text:style-name="T19">: Numb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, Consolas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09:08:14.822314600</meta:creation-date>
    <dc:date>2026-05-04T03:14:36.598712000</dc:date>
    <meta:editing-duration>P13DT22H11M</meta:editing-duration>
    <meta:editing-cycles>268</meta:editing-cycles>
    <meta:generator>LibreOffice/25.2.3.2$Windows_X86_64 LibreOffice_project/bbb074479178df812d175f709636b368952c2ce3</meta:generator>
    <dc:title>CATopalian JavaScript Component Based Architecture Flow</dc:title>
    <dc:publisher>Christopher Andrew Topalian</dc:publisher>
    <meta:document-statistic meta:object-count="40"/>
  </office:meta>
</office:document-meta>
</file>